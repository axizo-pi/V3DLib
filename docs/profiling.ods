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1.0291in"/>
    </style:style>
    <style:style style:name="co7" style:family="table-column">
      <style:table-column-properties fo:break-before="auto" style:column-width="1.8547in"/>
    </style:style>
    <style:style style:name="co8" style:family="table-column">
      <style:table-column-properties fo:break-before="auto" style:column-width="3.0984in"/>
    </style:style>
    <style:style style:name="co9" style:family="table-column">
      <style:table-column-properties fo:break-before="auto" style:column-width="1.2972in"/>
    </style:style>
    <style:style style:name="co10" style:family="table-column">
      <style:table-column-properties fo:break-before="auto" style:column-width="1.6291in"/>
    </style:style>
    <style:style style:name="co11" style:family="table-column">
      <style:table-column-properties fo:break-before="auto" style:column-width="1.222in"/>
    </style:style>
    <style:style style:name="co12" style:family="table-column">
      <style:table-column-properties fo:break-before="auto" style:column-width="1.3508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3.0339in"/>
    </style:style>
    <style:style style:name="co15" style:family="table-column">
      <style:table-column-properties fo:break-before="auto" style:column-width="1.0717in"/>
    </style:style>
    <style:style style:name="co16" style:family="table-column">
      <style:table-column-properties fo:break-before="auto" style:column-width="2.0902in"/>
    </style:style>
    <style:style style:name="co17" style:family="table-column">
      <style:table-column-properties fo:break-before="auto" style:column-width="1.6189in"/>
    </style:style>
    <style:style style:name="co18" style:family="table-column">
      <style:table-column-properties fo:break-before="auto" style:column-width="2.1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1" style:family="table-cell" style:parent-style-name="Default" style:data-style-name="N81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padding-bottom="0.0138in" fo:padding-left="0.111in" fo:padding-right="0.0138in" fo:padding-top="0.0138in" style:vertical-align="automatic"/>
    </style:style>
    <style:style style:name="ce54" style:family="table-cell" style:parent-style-name="Default">
      <style:table-cell-properties fo:padding-bottom="0.0138in" fo:padding-left="0.111in" fo:padding-right="0.0138in" fo:padding-top="0.0138in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padding-bottom="0.0138in" fo:padding-left="0.111in" fo:padding-right="0.0138in" fo:padding-top="0.0138in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padding-bottom="0.0138in" fo:padding-left="0.111in" fo:padding-right="0.0138in" fo:padding-top="0.0138in" style:vertical-align="automatic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-bottom="0.0138in" fo:padding-left="0.111in" fo:padding-right="0.0138in" fo:padding-top="0.0138in" style:vertical-align="automatic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border-left="0.74pt solid #000000" fo:border-right="none" fo:border-top="none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65" style:family="table-cell" style:parent-style-name="Default">
      <style:table-cell-properties fo:border-bottom="none" fo:border-left="0.74pt solid #000000" fo:border-right="none" fo:border-top="none"/>
    </style:style>
    <style:style style:name="ce66" style:family="table-cell" style:parent-style-name="Default">
      <style:table-cell-properties fo:border-bottom="none" fo:border-left="0.74pt solid #000000" fo:border-right="none" fo:border-top="none"/>
      <style:text-properties style:text-underline-style="none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</style:style>
    <style:style style:name="ce68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7.4669in" svg:height="3.5461in" svg:x="10.6315in" svg:y="0.2823in">
            <draw:object draw:notify-on-update-of-ranges="Profiles.B4:Profiles.F4 Profiles.A5:Profiles.A5 Profiles.B5:Profiles.F5 Profiles.A6:Profiles.A6 Profiles.B6:Profiles.F6 Profiles.A7:Profiles.A7 Profiles.B7:Profiles.F7 Profiles.A8:Profiles.A8 Profiles.B8:Profiles.F8 Profiles.A9:Profiles.A9 Profiles.B9:Profiles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04in" svg:height="3.5453in" svg:x="11.6835in" svg:y="4.5614in">
            <draw:object draw:notify-on-update-of-ranges="Profiles.B30:Profiles.J30 Profiles.A31:Profiles.A31 Profiles.B31:Profiles.J31 Profiles.A32:Profiles.A32 Profiles.B32:Profiles.J32 Profiles.A33:Profiles.A33 Profiles.B33:Profiles.J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3004in" svg:height="3.5453in" svg:x="11.3579in" svg:y="8.9642in">
            <draw:object draw:notify-on-update-of-ranges="Profiles.B52:Profiles.F52 Profiles.A53:Profiles.A53 Profiles.B53:Profiles.F53 Profiles.A54:Profiles.A54 Profiles.B54:Profiles.F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04in" svg:height="3.5453in" svg:x="11.4969in" svg:y="13.3043in">
            <draw:object draw:notify-on-update-of-ranges="Profiles.B80:Profiles.F80 Profiles.A81:Profiles.A81 Profiles.B81:Profiles.F81 Profiles.A82:Profiles.A82 Profiles.B82:Profiles.F82 Profiles.A83:Profiles.A83 Profiles.B83:Profiles.F83 Profiles.A84:Profiles.A84 Profiles.B84:Profiles.F8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04in" svg:height="3.5453in" svg:x="11.8437in" svg:y="17.1114in">
            <draw:object draw:notify-on-update-of-ranges="Profiles.B98:Profiles.C98 Profiles.A99:Profiles.A99 Profiles.B99:Profiles.C99 Profiles.A100:Profiles.A100 Profiles.B100:Profiles.C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3028in" svg:height="3.535in" svg:x="11.8264in" svg:y="21.1913in">
            <draw:object draw:notify-on-update-of-ranges="Profiles.B121:Profiles.B128 Profiles.C120:Profiles.C120 Profiles.C121:Profiles.C128 Profiles.B121:Profiles.B128 Profiles.D120:Profiles.D120 Profiles.D121:Profiles.D128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8"/>
          <table:table-cell table:number-columns-repeated="7"/>
        </table:table-row>
        <table:table-row table:style-name="ro2">
          <table:table-cell table:style-name="ce17" office:value-type="string" calcext:value-type="string">
            <text:p>Matrix</text:p>
          </table:table-cell>
          <table:table-cell table:style-name="ce43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latform</text:p>
          </table:table-cell>
          <table:table-cell table:style-name="ce18" office:value-type="string" calcext:value-type="string">
            <text:p>cpu</text:p>
          </table:table-cell>
          <table:table-cell table:style-name="ce18" office:value-type="string" calcext:value-type="string">
            <text:p>dotvector</text:p>
          </table:table-cell>
          <table:table-cell table:style-name="ce18" table:number-columns-repeated="2"/>
          <table:table-cell office:value-type="string" calcext:value-type="string">
            <text:p>1248 ro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style-name="ce1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4"/>
          <table:table-cell table:style-name="ce15" table:formula="of:=[$Timing.F30]" office:value-type="float" office:value="4.431674" calcext:value-type="float">
            <text:p>4.431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number-columns-repeated="2"/>
          <table:table-cell table:style-name="ce15" table:formula="of:=[$Timing.F29]" office:value-type="float" office:value="46.243967" calcext:value-type="float">
            <text:p>46.243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number-columns-repeated="2"/>
          <table:table-cell table:style-name="ce15" table:formula="of:=[$Timing.F27]" office:value-type="float" office:value="12.905957" calcext:value-type="float">
            <text:p>12.905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/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number-columns-repeated="2"/>
          <table:table-cell table:style-name="ce15" table:formula="of:=[$Timing.F28]" office:value-type="float" office:value="3.094523" calcext:value-type="float">
            <text:p>3.094523</text:p>
          </table:table-cell>
          <table:table-cell table:number-columns-repeated="3"/>
        </table:table-row>
        <table:table-row table:style-name="ro1" table:number-rows-repeated="16">
          <table:table-cell table:number-columns-repeated="9"/>
        </table:table-row>
        <table:table-row table:style-name="ro2">
          <table:table-cell table:style-name="ce17" office:value-type="string" calcext:value-type="string">
            <text:p>Rot3D</text:p>
          </table:table-cell>
          <table:table-cell table:number-columns-repeated="8"/>
        </table:table-row>
        <table:table-row table:style-name="ro2">
          <table:table-cell table:style-name="ce17"/>
          <table:table-cell office:value-type="string" calcext:value-type="string">
            <text:p>192,000 vertices</text:p>
          </table:table-cell>
          <table:table-cell table:number-columns-repeated="7"/>
        </table:table-row>
        <table:table-row table:style-name="ro2">
          <table:table-cell table:style-name="ce17"/>
          <table:table-cell office:value-type="string" calcext:value-type="string">
            <text:p>Updated on 20260202</text:p>
          </table:table-cell>
          <table:table-cell table:number-columns-repeated="3"/>
          <table:table-cell office:value-type="string" calcext:value-type="string">
            <text:p>Values, where redone, are median of 5</text:p>
          </table:table-cell>
          <table:table-cell table:number-columns-repeated="3"/>
        </table:table-row>
        <table:table-row table:style-name="ro2">
          <table:table-cell table:style-name="ce17"/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1a</text:p>
          </table:table-cell>
          <table:table-cell office:value-type="string" calcext:value-type="string">
            <text:p>Kernel1a Max QPUs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Max <text:s/>QPUs</text:p>
          </table:table-cell>
          <table:table-cell office:value-type="string" calcext:value-type="string">
            <text:p>Kernel3</text:p>
          </table:table-cell>
          <table:table-cell office:value-type="string" calcext:value-type="string">
            <text:p>Kernel3 Max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office:value-type="float" office:value="0.016009" calcext:value-type="float">
            <text:p>0.016009</text:p>
          </table:table-cell>
          <table:table-cell office:value-type="float" office:value="0.020724" calcext:value-type="float">
            <text:p>0.020724</text:p>
          </table:table-cell>
          <table:table-cell office:value-type="float" office:value="0.024813" calcext:value-type="float">
            <text:p>0.024813</text:p>
          </table:table-cell>
          <table:table-cell office:value-type="float" office:value="0.013057" calcext:value-type="float">
            <text:p>0.013057</text:p>
          </table:table-cell>
          <table:table-cell table:formula="of:=[$Timing.F108]" office:value-type="float" office:value="0.015441" calcext:value-type="float">
            <text:p>0.015441</text:p>
          </table:table-cell>
          <table:table-cell office:value-type="float" office:value="0.013057" calcext:value-type="float">
            <text:p>0.013057</text:p>
          </table:table-cell>
          <table:table-cell office:value-type="float" office:value="0.014803" calcext:value-type="float">
            <text:p>0.014803</text:p>
          </table:table-cell>
          <table:table-cell office:value-type="float" office:value="0.013066" calcext:value-type="float">
            <text:p>0.013066</text:p>
          </table:table-cell>
        </table:table-row>
        <table:table-row table:style-name="ro1">
          <table:table-cell office:value-type="string" calcext:value-type="string">
            <text:p>Pi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0297" calcext:value-type="float">
            <text:p>0.010297</text:p>
          </table:table-cell>
          <table:table-cell office:value-type="float" office:value="0.011673" calcext:value-type="float">
            <text:p>0.011673</text:p>
          </table:table-cell>
          <table:table-cell office:value-type="float" office:value="0.006082" calcext:value-type="float">
            <text:p>0.006082</text:p>
          </table:table-cell>
          <table:table-cell office:value-type="float" office:value="0.008178" calcext:value-type="float">
            <text:p>0.008178</text:p>
          </table:table-cell>
          <table:table-cell office:value-type="float" office:value="0.005183" calcext:value-type="float">
            <text:p>0.005183</text:p>
          </table:table-cell>
          <table:table-cell office:value-type="float" office:value="0.006655" calcext:value-type="float">
            <text:p>0.006655</text:p>
          </table:table-cell>
          <table:table-cell office:value-type="float" office:value="0.005126" calcext:value-type="float">
            <text:p>0.005126</text:p>
          </table:table-cell>
        </table:table-row>
        <table:table-row table:style-name="ro1">
          <table:table-cell office:value-type="string" calcext:value-type="string">
            <text:p>Pi5</text:p>
          </table:table-cell>
          <table:table-cell office:value-type="float" office:value="0.002224" calcext:value-type="float">
            <text:p>0.002224</text:p>
          </table:table-cell>
          <table:table-cell office:value-type="float" office:value="0.008812" calcext:value-type="float">
            <text:p>0.008812</text:p>
          </table:table-cell>
          <table:table-cell office:value-type="float" office:value="0.008748" calcext:value-type="float">
            <text:p>0.008748</text:p>
          </table:table-cell>
          <table:table-cell office:value-type="float" office:value="0.004084" calcext:value-type="float">
            <text:p>0.004084</text:p>
          </table:table-cell>
          <table:table-cell office:value-type="float" office:value="0.006057" calcext:value-type="float">
            <text:p>0.006057</text:p>
          </table:table-cell>
          <table:table-cell office:value-type="float" office:value="0.003775" calcext:value-type="float">
            <text:p>0.003775</text:p>
          </table:table-cell>
          <table:table-cell office:value-type="float" office:value="0.006365" calcext:value-type="float">
            <text:p>0.006365</text:p>
          </table:table-cell>
          <table:table-cell office:value-type="float" office:value="0.003766" calcext:value-type="float">
            <text:p>0.003766</text:p>
          </table:table-cell>
        </table:table-row>
        <table:table-row table:style-name="ro1" table:number-rows-repeated="16">
          <table:table-cell table:number-columns-repeated="9"/>
        </table:table-row>
        <table:table-row table:style-name="ro2">
          <table:table-cell table:style-name="ce17" office:value-type="string" calcext:value-type="string">
            <text:p>Mandelbro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table:number-columns-repeated="2"/>
          <table:table-cell office:value-type="string" calcext:value-type="string">
            <text:p>Multi 1 QP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64]" office:value-type="float" office:value="7.075472" calcext:value-type="float">
            <text:p>7.075472</text:p>
          </table:table-cell>
          <table:table-cell table:formula="of:=[$Timing.F165]" office:value-type="float" office:value="3.002719" calcext:value-type="float">
            <text:p>3.002719</text:p>
          </table:table-cell>
          <table:table-cell table:number-columns-repeated="2"/>
          <table:table-cell table:formula="of:=[$Timing.F166]" office:value-type="float" office:value="2.979217" calcext:value-type="float">
            <text:p>2.979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60]" office:value-type="float" office:value="2.632804" calcext:value-type="float">
            <text:p>2.632804</text:p>
          </table:table-cell>
          <table:table-cell table:formula="of:=[$Timing.F161]" office:value-type="float" office:value="1.991902" calcext:value-type="float">
            <text:p>1.991902</text:p>
          </table:table-cell>
          <table:table-cell table:number-columns-repeated="2"/>
          <table:table-cell table:formula="of:=[$Timing.F162]" office:value-type="float" office:value="2.012528" calcext:value-type="float">
            <text:p>2.012528</text:p>
          </table:table-cell>
          <table:table-cell table:number-columns-repeated="3"/>
        </table:table-row>
        <table:table-row table:style-name="ro1" table:number-rows-repeated="20">
          <table:table-cell table:number-columns-repeated="9"/>
        </table:table-row>
        <table:table-row table:style-name="ro2">
          <table:table-cell table:style-name="ce17" office:value-type="string" calcext:value-type="string">
            <text:p>DMA vs TMU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n pi3</text:p>
          </table:table-cell>
          <table:table-cell office:value-type="string" calcext:value-type="string">
            <text:p>Rot3D -v=1024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 gather optimiza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 QPU</text:p>
          </table:table-cell>
          <table:table-cell office:value-type="string" calcext:value-type="string">
            <text:p>2 QPUs</text:p>
          </table:table-cell>
          <table:table-cell table:number-columns-repeated="2"/>
          <table:table-cell office:value-type="string" calcext:value-type="string">
            <text:p>4 QP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A 1 QPU kernel</text:p>
          </table:table-cell>
          <table:table-cell office:value-type="float" office:value="0.170312" calcext:value-type="float">
            <text:p>0.170312</text:p>
          </table:table-cell>
          <table:table-cell office:value-type="float" office:value="0.193194" calcext:value-type="float">
            <text:p>0.193194</text:p>
          </table:table-cell>
          <table:table-cell table:number-columns-repeated="2"/>
          <table:table-cell office:value-type="float" office:value="0.326194" calcext:value-type="float">
            <text:p>0.326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U 1 QPU kernel</text:p>
          </table:table-cell>
          <table:table-cell office:value-type="float" office:value="0.116388" calcext:value-type="float">
            <text:p>0.116388</text:p>
          </table:table-cell>
          <table:table-cell office:value-type="float" office:value="0.143072" calcext:value-type="float">
            <text:p>0.143072</text:p>
          </table:table-cell>
          <table:table-cell table:number-columns-repeated="2"/>
          <table:table-cell office:value-type="float" office:value="0.273717" calcext:value-type="float">
            <text:p>0.273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A multi QPU kernel</text:p>
          </table:table-cell>
          <table:table-cell office:value-type="float" office:value="0.169547" calcext:value-type="float">
            <text:p>0.169547</text:p>
          </table:table-cell>
          <table:table-cell office:value-type="float" office:value="0.095414" calcext:value-type="float">
            <text:p>0.095414</text:p>
          </table:table-cell>
          <table:table-cell table:number-columns-repeated="2"/>
          <table:table-cell office:value-type="float" office:value="0.08213" calcext:value-type="float">
            <text:p>0.08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U multi QPU kernel</text:p>
          </table:table-cell>
          <table:table-cell office:value-type="float" office:value="0.115114" calcext:value-type="float">
            <text:p>0.115114</text:p>
          </table:table-cell>
          <table:table-cell office:value-type="float" office:value="0.074205" calcext:value-type="float">
            <text:p>0.074205</text:p>
          </table:table-cell>
          <table:table-cell table:number-columns-repeated="2"/>
          <table:table-cell office:value-type="float" office:value="0.068838" calcext:value-type="float">
            <text:p>0.068838</text:p>
          </table:table-cell>
          <table:table-cell table:number-columns-repeated="3"/>
        </table:table-row>
        <table:table-row table:style-name="ro1" table:number-rows-repeated="11">
          <table:table-cell table:number-columns-repeated="9"/>
        </table:table-row>
        <table:table-row table:style-name="ro2">
          <table:table-cell table:style-name="ce17" office:value-type="string" calcext:value-type="string">
            <text:p>Rot3D for 1-QPU kerne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Matrix</text:p>
          </table:table-cell>
          <table:table-cell table:style-name="ce24" office:value-type="string" calcext:value-type="string">
            <text:p>Rot3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MU</text:p>
          </table:table-cell>
          <table:table-cell table:formula="of:=21.919793 /46.146597 *100" office:value-type="float" office:value="47.5003454750954" calcext:value-type="float">
            <text:p>47.5003454750954</text:p>
          </table:table-cell>
          <table:table-cell table:formula="of:=0.116388/0.170312*100" office:value-type="float" office:value="68.3381088825215" calcext:value-type="float">
            <text:p>68.3381088825215</text:p>
          </table:table-cell>
          <table:table-cell table:number-columns-repeated="6"/>
        </table:table-row>
        <table:table-row table:style-name="ro1" table:number-rows-repeated="14">
          <table:table-cell table:number-columns-repeated="9"/>
        </table:table-row>
        <table:table-row table:style-name="ro2">
          <table:table-cell table:style-name="ce17" office:value-type="string" calcext:value-type="string">
            <text:p>Gravity <text:s/>Batch Step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ith default values, num QPU’s ==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n of at least 3 run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batch_steps</text:p>
          </table:table-cell>
          <table:table-cell table:style-name="ce24" office:value-type="string" calcext:value-type="string">
            <text:p>Time 1 QPU</text:p>
          </table:table-cell>
          <table:table-cell table:style-name="ce24" office:value-type="string" calcext:value-type="string">
            <text:p>Time Max QPU’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.046829" calcext:value-type="float">
            <text:p>9.046829</text:p>
          </table:table-cell>
          <table:table-cell office:value-type="float" office:value="4.660485" calcext:value-type="float">
            <text:p>4.6604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704621" calcext:value-type="float">
            <text:p>6.704621</text:p>
          </table:table-cell>
          <table:table-cell office:value-type="float" office:value="2.634295" calcext:value-type="float">
            <text:p>2.6342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316423" calcext:value-type="float">
            <text:p>5.316423</text:p>
          </table:table-cell>
          <table:table-cell office:value-type="float" office:value="1.28237" calcext:value-type="float">
            <text:p>1.282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870404" calcext:value-type="float">
            <text:p>4.870404</text:p>
          </table:table-cell>
          <table:table-cell office:value-type="float" office:value="0.85728" calcext:value-type="float">
            <text:p>0.857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.656257" calcext:value-type="float">
            <text:p>4.6562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.523773" calcext:value-type="float">
            <text:p>4.523773</text:p>
          </table:table-cell>
          <table:table-cell office:value-type="float" office:value="0.520911" calcext:value-type="float">
            <text:p>0.5209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.482469" calcext:value-type="float">
            <text:p>4.482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.466597" calcext:value-type="float">
            <text:p>4.466597</text:p>
          </table:table-cell>
          <table:table-cell office:value-type="float" office:value="0.459195" calcext:value-type="float">
            <text:p>0.459195</text:p>
          </table:table-cell>
          <table:table-cell table:number-columns-repeated="5"/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Time 1 QPU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Time(x)</text:p>
          </table:table-cell>
          <table:table-cell table:style-name="ce24" office:value-type="string" calcext:value-type="string">
            <text:p>Time(y)</text:p>
          </table:table-cell>
          <table:table-cell table:style-name="ce24" office:value-type="string" calcext:value-type="string">
            <text:p>x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046829" calcext:value-type="float">
            <text:p>9.046829</text:p>
          </table:table-cell>
          <table:table-cell office:value-type="float" office:value="6.704621" calcext:value-type="float">
            <text:p>6.7046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41]*[.E141]*([.B141] - [.C141])/([.E141] - [.D141])" office:value-type="float" office:value="4.684416" calcext:value-type="float">
            <text:p>4.684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046829" calcext:value-type="float">
            <text:p>9.046829</text:p>
          </table:table-cell>
          <table:table-cell office:value-type="float" office:value="5.316423" calcext:value-type="float">
            <text:p>5.3164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142]*[.E142]*([.B142] - [.C142])/([.E142] - [.D142])" office:value-type="float" office:value="4.6630075" calcext:value-type="float">
            <text:p>4.66300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046829" calcext:value-type="float">
            <text:p>9.046829</text:p>
          </table:table-cell>
          <table:table-cell office:value-type="float" office:value="4.466597" calcext:value-type="float">
            <text:p>4.46659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D143]*[.E143]*([.B143] - [.C143])/([.E143] - [.D143])" office:value-type="float" office:value="4.60324824120603" calcext:value-type="float">
            <text:p>4.603248241206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04621" calcext:value-type="float">
            <text:p>6.704621</text:p>
          </table:table-cell>
          <table:table-cell office:value-type="float" office:value="5.316423" calcext:value-type="float">
            <text:p>5.3164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44]*[.E144]*([.B144] - [.C144])/([.E144] - [.D144])" office:value-type="float" office:value="4.62732666666667" calcext:value-type="float">
            <text:p>4.62732666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04621" calcext:value-type="float">
            <text:p>6.704621</text:p>
          </table:table-cell>
          <table:table-cell office:value-type="float" office:value="4.466597" calcext:value-type="float">
            <text:p>4.46659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[.D145]*[.E145]*([.B145] - [.C145])/([.E145] - [.D145])" office:value-type="float" office:value="4.52126060606061" calcext:value-type="float">
            <text:p>4.52126060606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23773" calcext:value-type="float">
            <text:p>4.523773</text:p>
          </table:table-cell>
          <table:table-cell office:value-type="float" office:value="4.482469" calcext:value-type="float">
            <text:p>4.482469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[.D146]*[.E146]*([.B146] - [.C146])/([.E146] - [.D146])" office:value-type="float" office:value="4.13040000000002" calcext:value-type="float">
            <text:p>4.1304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82469" calcext:value-type="float">
            <text:p>4.482469</text:p>
          </table:table-cell>
          <table:table-cell office:value-type="float" office:value="4.466597" calcext:value-type="float">
            <text:p>4.466597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formula="of:=[.D147]*[.E147]*([.B147] - [.C147])/([.E147] - [.D147])" office:value-type="float" office:value="3.17439999999998" calcext:value-type="float">
            <text:p>3.17439999999998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Time Max QPU’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Time(x)</text:p>
          </table:table-cell>
          <table:table-cell table:style-name="ce24" office:value-type="string" calcext:value-type="string">
            <text:p>Time(y)</text:p>
          </table:table-cell>
          <table:table-cell table:style-name="ce24" office:value-type="string" calcext:value-type="string">
            <text:p>x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60485" calcext:value-type="float">
            <text:p>4.660485</text:p>
          </table:table-cell>
          <table:table-cell office:value-type="float" office:value="2.634295" calcext:value-type="float">
            <text:p>2.6342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53]*[.E153]*([.B153] - [.C153])/([.E153] - [.D153])" office:value-type="float" office:value="4.05238" calcext:value-type="float">
            <text:p>4.052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60485" calcext:value-type="float">
            <text:p>4.660485</text:p>
          </table:table-cell>
          <table:table-cell office:value-type="float" office:value="0.459195" calcext:value-type="float">
            <text:p>0.45919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D154]*[.E154]*([.B154] - [.C154])/([.E154] - [.D154])" office:value-type="float" office:value="4.22240201005025" calcext:value-type="float">
            <text:p>4.22240201005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728" calcext:value-type="float">
            <text:p>0.85728</text:p>
          </table:table-cell>
          <table:table-cell office:value-type="float" office:value="0.520911" calcext:value-type="float">
            <text:p>0.52091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[.D155]*[.E155]*([.B155] - [.C155])/([.E155] - [.D155])" office:value-type="float" office:value="4.2046125" calcext:value-type="float">
            <text:p>4.2046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20911" calcext:value-type="float">
            <text:p>0.520911</text:p>
          </table:table-cell>
          <table:table-cell office:value-type="float" office:value="0.459195" calcext:value-type="float">
            <text:p>0.45919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formula="of:=[.D156]*[.E156]*([.B156] - [.C156])/([.E156] - [.D156])" office:value-type="float" office:value="4.1144" calcext:value-type="float">
            <text:p>4.1144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style-name="ce17" office:value-type="string" calcext:value-type="string">
            <text:p>LSTM Kernel Call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Time (s)</text:p>
          </table:table-cell>
          <table:table-cell table:style-name="ce24" office:value-type="string" calcext:value-type="string">
            <text:p>Kernel Calls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.176" calcext:value-type="float">
            <text:p>72.176</text:p>
          </table:table-cell>
          <table:table-cell office:value-type="float" office:value="150130" calcext:value-type="float">
            <text:p>1501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.634" calcext:value-type="float">
            <text:p>71.634</text:p>
          </table:table-cell>
          <table:table-cell office:value-type="float" office:value="140130" calcext:value-type="float">
            <text:p>1401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.701" calcext:value-type="float">
            <text:p>71.701</text:p>
          </table:table-cell>
          <table:table-cell office:value-type="float" office:value="135130" calcext:value-type="float">
            <text:p>1351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.932" calcext:value-type="float">
            <text:p>69.932</text:p>
          </table:table-cell>
          <table:table-cell office:value-type="float" office:value="130130" calcext:value-type="float">
            <text:p>1301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.124" calcext:value-type="float">
            <text:p>71.124</text:p>
          </table:table-cell>
          <table:table-cell office:value-type="float" office:value="120130" calcext:value-type="float">
            <text:p>120130</text:p>
          </table:table-cell>
          <table:table-cell table:number-columns-repeated="6"/>
        </table:table-row>
      </table:table>
      <table:table table:name="Timing" table:style-name="ta1">
        <table:shapes>
          <draw:frame draw:z-index="0" draw:style-name="gr1" draw:text-style-name="P1" svg:width="6.2988in" svg:height="4.4161in" svg:x="11.1213in" svg:y="39.2272in">
            <draw:object draw:notify-on-update-of-ranges="Timing.J214:Timing.S214 Timing.I215:Timing.I215 Timing.J215:Timing.S215 Timing.I216:Timing.I216 Timing.J216:Timing.S216 Timing.I217:Timing.I217 Timing.J217:Timing.S2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6.2988in" svg:height="3.5429in" svg:x="11.7764in" svg:y="45.4807in">
            <draw:object draw:notify-on-update-of-ranges="Timing.J249:Timing.U249 Timing.I250:Timing.I250 Timing.J250:Timing.U250 Timing.I251:Timing.I251 Timing.J251:Timing.U251 Timing.I252:Timing.I252 Timing.J252:Timing.U25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7.4602in" svg:height="4.5803in" svg:x="10.2969in" svg:y="80.4122in">
            <draw:object draw:notify-on-update-of-ranges="Timing.J444:Timing.V444 Timing.I445:Timing.I445 Timing.J445:Timing.V445 Timing.I446:Timing.I446 Timing.J446:Timing.V446 Timing.I447:Timing.I447 Timing.J447:Timing.V44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6" draw:style-name="gr1" draw:text-style-name="P1" svg:width="8.4417in" svg:height="3.9799in" svg:x="10.9689in" svg:y="33.8425in">
            <draw:object draw:notify-on-update-of-ranges="Timing.K185:Timing.O185 Timing.J186:Timing.J186 Timing.K186:Timing.O186 Timing.J187:Timing.J187 Timing.K187:Timing.O18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3" table:default-cell-style-name="ce18"/>
        <table:table-column table:style-name="co7" table:default-cell-style-name="Default"/>
        <table:table-column table:style-name="co3" table:default-cell-style-name="Default"/>
        <table:table-column table:style-name="co8" table:default-cell-style-name="ce53"/>
        <table:table-column table:style-name="co9" table:default-cell-style-name="ce53"/>
        <table:table-column table:style-name="co10" table:default-cell-style-name="Default"/>
        <table:table-column table:style-name="co2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22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22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Timing:</text:p>
          </table:table-cell>
          <table:table-cell office:value-type="string" calcext:value-type="string">
            <text:p>median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Matrix – Evolution</text:p>
          </table:table-cell>
          <table:table-cell table:style-name="ce43"/>
          <table:table-cell table:number-columns-repeated="1022"/>
        </table:table-row>
        <table:table-row table:style-name="ro2">
          <table:table-cell table:style-name="ce17"/>
          <table:table-cell table:style-name="ce43"/>
          <table:table-cell table:number-columns-repeated="1022"/>
        </table:table-row>
        <table:table-row table:style-name="ro1">
          <table:table-cell table:style-name="ce46" office:value-type="string" calcext:value-type="string">
            <text:p>Note:</text:p>
          </table:table-cell>
          <table:table-cell table:style-name="ce48" office:value-type="string" calcext:value-type="string">
            <text:p>Implemented loop unroll, but had little (actually adverse) effect on performance of Matrix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 office:value-type="string" calcext:value-type="string">
            <text:p>olivia prefix:</text:p>
          </table:table-cell>
          <table:table-cell table:style-name="ce48" office:value-type="string" calcext:value-type="string">
            <text:p>./obj/emu-debug/bin/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 office:value-type="string" calcext:value-type="string">
            <text:p>qpu prefix:</text:p>
          </table:table-cell>
          <table:table-cell table:style-name="ce48" office:value-type="string" calcext:value-type="string">
            <text:p>sudo 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 office:value-type="string" calcext:value-type="string">
            <text:p>cpu prefix:</text:p>
          </table:table-cell>
          <table:table-cell table:style-name="ce48" office:value-type="string" calcext:value-type="string">
            <text:p>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/>
          <table:table-cell table:style-name="ce48" table:number-columns-repeated="3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table:style-name="ce48" office:value-type="string" calcext:value-type="string">
            <text:p>Matrix -d=512 -p=5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office:value-type="string" calcext:value-type="string">
            <text:p>e0be96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146597" calcext:value-type="float">
            <text:p>46.146597</text:p>
          </table:table-cell>
          <table:table-cell office:value-type="string" calcext:value-type="string">
            <text:p>added prefetch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tmu</text:p>
          </table:table-cell>
          <table:table-cell office:value-type="float" office:value="21.919793" calcext:value-type="float">
            <text:p>21.919793</text:p>
          </table:table-cell>
          <table:table-cell office:value-type="string" calcext:value-type="string">
            <text:p>TMU beats DMA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907181" calcext:value-type="float">
            <text:p>6.90718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4.430315" calcext:value-type="float">
            <text:p>4.4303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0.413163" calcext:value-type="float">
            <text:p>10.4131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8919" calcext:value-type="float">
            <text:p>2.7189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062061" calcext:value-type="float">
            <text:p>2.062061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n=8 -read=prefetch</text:p>
          </table:table-cell>
          <table:table-cell office:value-type="float" office:value="0.408764" calcext:value-type="float">
            <text:p>0.408764</text:p>
          </table:table-cell>
          <table:table-cell table:number-columns-repeated="2"/>
          <table:table-cell office:value-type="string" calcext:value-type="string">
            <text:p>From here on, not much progres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261619" calcext:value-type="float">
            <text:p>0.2616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n=8 -read=prefetch</text:p>
          </table:table-cell>
          <table:table-cell office:value-type="float" office:value="1.272363" calcext:value-type="float">
            <text:p>1.2723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 -read=prefetch</text:p>
          </table:table-cell>
          <table:table-cell/>
          <table:table-cell office:value-type="string" calcext:value-type="string">
            <text:p>5 x Failed to invoke kernel on QPUs; can’t deal with dim=51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d=576 -n=12 -read=prefetch </text:p>
          </table:table-cell>
          <table:table-cell office:value-type="float" office:value="1.302592" calcext:value-type="float">
            <text:p>1.302592</text:p>
          </table:table-cell>
          <table:table-cell office:value-type="string" calcext:value-type="string">
            <text:p><text:s/>-d=576=12*16*3 OK !!! -d=560 also works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4 -read=prefetch</text:p>
          </table:table-cell>
          <table:table-cell office:value-type="float" office:value="2.681338" calcext:value-type="float">
            <text:p>2.68133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51924" calcext:value-type="float">
            <text:p>0.519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d=576 -n=12 -read=none</text:p>
          </table:table-cell>
          <table:table-cell office:value-type="float" office:value="0.449125" calcext:value-type="float">
            <text:p>0.449125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2.60706" calcext:value-type="float">
            <text:p>22.60706</text:p>
          </table:table-cell>
          <table:table-cell office:value-type="string" calcext:value-type="string">
            <text:p>TMU default</text:p>
          </table:table-cell>
          <table:table-cell/>
          <table:table-cell office:value-type="string" calcext:value-type="string">
            <text:p>TODO register progress from here on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7663" calcext:value-type="float">
            <text:p>2.77663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1.419429" calcext:value-type="float">
            <text:p>21.419429</text:p>
          </table:table-cell>
          <table:table-cell office:value-type="string" calcext:value-type="string">
            <text:p>evolutionary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340426" calcext:value-type="float">
            <text:p>6.34042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627358" calcext:value-type="float">
            <text:p>2.62735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1.387184" calcext:value-type="float">
            <text:p>1.387184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8.184979" calcext:value-type="float">
            <text:p>8.18497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2854" calcext:value-type="float">
            <text:p>2.71285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12833" calcext:value-type="float">
            <text:p>2.71283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0.408038" calcext:value-type="float">
            <text:p>0.408038</text:p>
          </table:table-cell>
          <table:table-cell table:number-columns-repeated="1018"/>
        </table:table-row>
        <table:table-row table:style-name="ro1" table:number-rows-repeated="2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Matrix – Platform compare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sudo ./obj/qpu-debug/bin/Matrix -d=304 -p=10</text:p>
          </table:table-cell>
          <table:table-cell table:number-columns-repeated="3"/>
          <table:table-cell office:value-type="string" calcext:value-type="string">
            <text:p>Value -d for successful run on Pi and Pi2</text:p>
          </table:table-cell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</text:p>
          </table:table-cell>
          <table:table-cell/>
          <table:table-cell office:value-type="float" office:value="9.452398" calcext:value-type="float">
            <text:p>9.452398</text:p>
          </table:table-cell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3.098437" calcext:value-type="float">
            <text:p>3.098437</text:p>
          </table:table-cell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451657" calcext:value-type="float">
            <text:p>2.451657</text:p>
          </table:table-cell>
          <table:table-cell table:style-name="ce56" table:number-columns-repeated="2"/>
          <table:table-cell table:number-columns-repeated="1016"/>
        </table:table-row>
        <table:table-row table:style-name="ro1" table:number-rows-repeated="4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 table:number-rows-repeated="6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 table:number-rows-repeated="18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51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table:style-name="ce51" office:value-type="string" calcext:value-type="string">
            <text:p>'84931e5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312" calcext:value-type="float">
            <text:p>0.170312</text:p>
          </table:table-cell>
          <table:table-cell office:value-type="string" calcext:value-type="string">
            <text:p>DMA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2</text:p>
          </table:table-cell>
          <table:table-cell office:value-type="float" office:value="0.193194" calcext:value-type="float">
            <text:p>0.193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4</text:p>
          </table:table-cell>
          <table:table-cell office:value-type="float" office:value="0.326194" calcext:value-type="float">
            <text:p>0.326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8</text:p>
          </table:table-cell>
          <table:table-cell office:value-type="float" office:value="0.652056" calcext:value-type="float">
            <text:p>0.65205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12</text:p>
          </table:table-cell>
          <table:table-cell office:value-type="float" office:value="0.978683" calcext:value-type="float">
            <text:p>0.97868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6388" calcext:value-type="float">
            <text:p>0.116388</text:p>
          </table:table-cell>
          <table:table-cell office:value-type="string" calcext:value-type="string">
            <text:p>TMU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143072" calcext:value-type="float">
            <text:p>0.14307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273717" calcext:value-type="float">
            <text:p>0.273717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546734" calcext:value-type="float">
            <text:p>0.54673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819782" calcext:value-type="float">
            <text:p>0.81978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69547" calcext:value-type="float">
            <text:p>0.169547</text:p>
          </table:table-cell>
          <table:table-cell office:value-type="string" calcext:value-type="string">
            <text:p>DMA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95414" calcext:value-type="float">
            <text:p>0.09541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8213" calcext:value-type="float">
            <text:p>0.0821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82325" calcext:value-type="float">
            <text:p>0.08232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82253" calcext:value-type="float">
            <text:p>0.08225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5114" calcext:value-type="float">
            <text:p>0.115114</text:p>
          </table:table-cell>
          <table:table-cell office:value-type="string" calcext:value-type="string">
            <text:p>TMU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74205" calcext:value-type="float">
            <text:p>0.07420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68838" calcext:value-type="float">
            <text:p>0.068838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6886" calcext:value-type="float">
            <text:p>0.0688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68878" calcext:value-type="float">
            <text:p>0.06887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</text:p>
          </table:table-cell>
          <table:table-cell office:value-type="float" office:value="0.080277" calcext:value-type="float">
            <text:p>0.080277</text:p>
          </table:table-cell>
          <table:table-cell office:value-type="string" calcext:value-type="string">
            <text:p>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 -n=8</text:p>
          </table:table-cell>
          <table:table-cell office:value-type="float" office:value="0.068896" calcext:value-type="float">
            <text:p>0.068896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</text:p>
          </table:table-cell>
          <table:table-cell office:value-type="float" office:value="0.079137" calcext:value-type="float">
            <text:p>0.079137</text:p>
          </table:table-cell>
          <table:table-cell office:value-type="string" calcext:value-type="string">
            <text:p>max 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934" calcext:value-type="float">
            <text:p>0.068934</text:p>
          </table:table-cell>
          <table:table-cell table:number-columns-repeated="2"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249" calcext:value-type="float">
            <text:p>0.170249</text:p>
          </table:table-cell>
          <table:table-cell office:value-type="string" calcext:value-type="string">
            <text:p>DM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119732" calcext:value-type="float">
            <text:p>0.119732</text:p>
          </table:table-cell>
          <table:table-cell office:value-type="string" calcext:value-type="string">
            <text:p>TMU (default now)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844" calcext:value-type="float">
            <text:p>0.068844</text:p>
          </table:table-cell>
          <table:table-cell office:value-type="string" calcext:value-type="string">
            <text:p>DMA – no diff, as expected, DMA not used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068841" calcext:value-type="float">
            <text:p>0.068841</text:p>
          </table:table-cell>
          <table:table-cell office:value-type="string" calcext:value-type="string">
            <text:p>TMU (default now)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Mandelbrot</text:p>
          </table:table-cell>
          <table:table-cell table:number-columns-repeated="15"/>
          <table:table-cell office:value-type="string" calcext:value-type="string">
            <text:p>`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 table:number-columns-repeated="2"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ingle</text:p>
          </table:table-cell>
          <table:table-cell office:value-type="float" office:value="2.989145" calcext:value-type="float">
            <text:p>2.989145</text:p>
          </table:table-cell>
          <table:table-cell office:value-type="string" calcext:value-type="string">
            <text:p>TMU (default now) – no diff, expected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multi -n=8</text:p>
          </table:table-cell>
          <table:table-cell office:value-type="float" office:value="0.44865" calcext:value-type="float">
            <text:p>0.4486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502466" calcext:value-type="float">
            <text:p>2.50246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Heat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Default:</text:p>
          </table:table-cell>
          <table:table-cell office:value-type="string" calcext:value-type="string">
            <text:p>1500 steps</text:p>
          </table:table-cell>
          <table:table-cell table:number-columns-repeated="1022"/>
        </table:table-row>
        <table:table-row table:style-name="ro1">
          <table:table-cell table:style-name="ce22"/>
          <table:table-cell office:value-type="string" calcext:value-type="string">
            <text:p>width:</text:p>
          </table:table-cell>
          <table:table-cell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table:style-name="ce22"/>
          <table:table-cell office:value-type="string" calcext:value-type="string">
            <text:p>height:</text:p>
          </table:table-cell>
          <table:table-cell office:value-type="float" office:value="506" calcext:value-type="float">
            <text:p>50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7.850646" calcext:value-type="float">
            <text:p>67.85064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81162" calcext:value-type="float">
            <text:p>16.811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675662" calcext:value-type="float">
            <text:p>16.67566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72.006978" calcext:value-type="float">
            <text:p>72.006978</text:p>
          </table:table-cell>
          <table:table-cell office:value-type="string" calcext:value-type="string">
            <text:p>NB slower than pi3!</text:p>
          </table:table-cell>
          <table:table-cell table:number-columns-repeated="2"/>
          <table:table-cell office:value-type="string" calcext:value-type="string">
            <text:p>pi3</text:p>
          </table:table-cell>
          <table:table-cell office:value-type="float" office:value="58.47852" calcext:value-type="float">
            <text:p>58.47852</text:p>
          </table:table-cell>
          <table:table-cell office:value-type="float" office:value="29.671871" calcext:value-type="float">
            <text:p>29.671871</text:p>
          </table:table-cell>
          <table:table-cell office:value-type="float" office:value="16.260778" calcext:value-type="float">
            <text:p>16.260778</text:p>
          </table:table-cell>
          <table:table-cell office:value-type="float" office:value="16.239317" calcext:value-type="float">
            <text:p>16.239317</text:p>
          </table:table-cell>
          <table:table-cell office:value-type="float" office:value="16.254746" calcext:value-type="float">
            <text:p>16.254746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64243" calcext:value-type="float">
            <text:p>5.264243</text:p>
          </table:table-cell>
          <table:table-cell office:value-type="string" calcext:value-type="string">
            <text:p>NB &gt; 8 times faster</text:p>
          </table:table-cell>
          <table:table-cell table:number-columns-repeated="2"/>
          <table:table-cell office:value-type="string" calcext:value-type="string">
            <text:p>pi4 64-bits</text:p>
          </table:table-cell>
          <table:table-cell office:value-type="float" office:value="34.449104" calcext:value-type="float">
            <text:p>34.449104</text:p>
          </table:table-cell>
          <table:table-cell table:number-columns-repeated="2"/>
          <table:table-cell office:value-type="float" office:value="4.425815" calcext:value-type="float">
            <text:p>4.425815</text:p>
          </table:table-cell>
          <table:table-cell table:number-columns-repeated="1010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6.906035" calcext:value-type="float">
            <text:p>66.906035</text:p>
          </table:table-cell>
          <table:table-cell office:value-type="string" calcext:value-type="string">
            <text:p>TMU (default now) – no diff, expected</text:p>
          </table:table-cell>
          <table:table-cell table:number-columns-repeated="1017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36.943515" calcext:value-type="float">
            <text:p>36.943515</text:p>
          </table:table-cell>
          <table:table-cell table:style-name="Default" office:value-type="string" calcext:value-type="string">
            <text:p>encoding in load()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46611" calcext:value-type="float">
            <text:p>5.246611</text:p>
          </table:table-cell>
          <table:table-cell table:number-columns-repeated="1018"/>
        </table:table-row>
        <table:table-row table:style-name="ro1">
          <table:table-cell office:value-type="float" office:value="20210423" calcext:value-type="float">
            <text:p>20210423</text:p>
          </table:table-cell>
          <table:table-cell office:value-type="string" calcext:value-type="string">
            <text:p>fd7c097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63.935462" calcext:value-type="float">
            <text:p>63.9354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041854" calcext:value-type="float">
            <text:p>5.041854</text:p>
          </table:table-cell>
          <table:table-cell table:number-columns-repeated="1018"/>
        </table:table-row>
        <table:table-row table:style-name="ro1">
          <table:table-cell office:value-type="float" office:value="20210427" calcext:value-type="float">
            <text:p>20210427</text:p>
          </table:table-cell>
          <table:table-cell office:value-type="string" calcext:value-type="string">
            <text:p>335dde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calar</text:p>
          </table:table-cell>
          <table:table-cell office:value-type="float" office:value="17.626494" calcext:value-type="float">
            <text:p>17.62649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34.449104" calcext:value-type="float">
            <text:p>34.4491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4.425815" calcext:value-type="float">
            <text:p>4.4258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calar</text:p>
          </table:table-cell>
          <table:table-cell office:value-type="float" office:value="75.609017" calcext:value-type="float">
            <text:p>75.60901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8.47852" calcext:value-type="float">
            <text:p>58.4785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2</text:p>
          </table:table-cell>
          <table:table-cell office:value-type="float" office:value="29.671871" calcext:value-type="float">
            <text:p>29.67187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4</text:p>
          </table:table-cell>
          <table:table-cell office:value-type="float" office:value="16.260778" calcext:value-type="float">
            <text:p>16.26077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239317" calcext:value-type="float">
            <text:p>16.2393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254746" calcext:value-type="float">
            <text:p>16.25474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7" office:value-type="string" calcext:value-type="string">
            <text:p>DFT – in unit test, 10 iterations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ith prefetch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ingle run, no median of 3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Preparation of data and compile takes longer and longer. However, the actual run is quite fast.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/>
          <table:table-cell table:style-name="ce24" office:value-type="string" calcext:value-type="string">
            <text:p>-n=12</text:p>
          </table:table-cell>
          <table:table-cell table:style-name="ce24" table:number-columns-repeated="1014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89" calcext:value-type="float">
            <text:p>0.003189</text:p>
          </table:table-cell>
          <table:table-cell table:style-name="ce19" office:value-type="string" calcext:value-type="string">
            <text:p>matrix mult</text:p>
          </table:table-cell>
          <table:table-cell table:style-name="ce19"/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4" calcext:value-type="float">
            <text:p>0.002954</text:p>
          </table:table-cell>
          <table:table-cell office:value-type="string" calcext:value-type="string">
            <text:p><text:s/></text:p>
          </table:table-cell>
          <table:table-cell/>
          <table:table-cell table:style-name="ce19" office:value-type="string" calcext:value-type="string">
            <text:p>matrix mult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28" calcext:value-type="float">
            <text:p>0.003028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complex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0.006102" calcext:value-type="float">
            <text:p>0.006102</text:p>
          </table:table-cell>
          <table:table-cell office:value-type="float" office:value="0.008257" calcext:value-type="float">
            <text:p>0.008257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8153" calcext:value-type="float">
            <text:p>0.018153</text:p>
          </table:table-cell>
          <table:table-cell office:value-type="float" office:value="0.047119" calcext:value-type="float">
            <text:p>0.047119</text:p>
          </table:table-cell>
          <table:table-cell office:value-type="float" office:value="0.053517" calcext:value-type="float">
            <text:p>0.053517</text:p>
          </table:table-cell>
          <table:table-cell office:value-type="float" office:value="0.060098" calcext:value-type="float">
            <text:p>0.060098</text:p>
          </table:table-cell>
          <table:table-cell office:value-type="float" office:value="0.07089" calcext:value-type="float">
            <text:p>0.07089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205" calcext:value-type="float">
            <text:p>0.003205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float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232" calcext:value-type="float">
            <text:p>0.0042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61" calcext:value-type="float">
            <text:p>0.003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39" calcext:value-type="float">
            <text:p>0.003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2" calcext:value-type="float">
            <text:p>0.00384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32" calcext:value-type="float">
            <text:p>0.00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408" calcext:value-type="float">
            <text:p>0.004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3202" calcext:value-type="float">
            <text:p>0.0032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3246" calcext:value-type="float">
            <text:p>0.0032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3484" calcext:value-type="float">
            <text:p>0.0034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2575" calcext:value-type="float">
            <text:p>0.0125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897" calcext:value-type="float">
            <text:p>0.0058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935" calcext:value-type="float">
            <text:p>0.005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102" calcext:value-type="float">
            <text:p>0.0061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1235" calcext:value-type="float">
            <text:p>0.0112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332" calcext:value-type="float">
            <text:p>0.005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26" calcext:value-type="float">
            <text:p>0.005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5413" calcext:value-type="float">
            <text:p>0.0054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782" calcext:value-type="float">
            <text:p>0.0057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843" calcext:value-type="float">
            <text:p>0.0038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376" calcext:value-type="float">
            <text:p>0.0033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3631" calcext:value-type="float">
            <text:p>0.0036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546" calcext:value-type="float">
            <text:p>0.02754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2174" calcext:value-type="float">
            <text:p>0.0121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8176" calcext:value-type="float">
            <text:p>0.0081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8257" calcext:value-type="float">
            <text:p>0.008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779" calcext:value-type="float">
            <text:p>0.010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7291" calcext:value-type="float">
            <text:p>0.00729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Pi4 – 10 iterations, n=8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7299" calcext:value-type="float">
            <text:p>0.00729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7838" calcext:value-type="float">
            <text:p>0.007838</text:p>
          </table:table-cell>
          <table:table-cell office:value-type="string" calcext:value-type="string">
            <text:p>matrix mult</text:p>
          </table:table-cell>
          <table:table-cell/>
          <table:table-cell table:style-name="ce19" office:value-type="string" calcext:value-type="string">
            <text:p>matrix mult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4315" calcext:value-type="float">
            <text:p>0.004315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6737" calcext:value-type="float">
            <text:p>0.00673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complex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4115" calcext:value-type="float">
            <text:p>0.004115</text:p>
          </table:table-cell>
          <table:table-cell office:value-type="float" office:value="0.006028" calcext:value-type="float">
            <text:p>0.006028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0.011345" calcext:value-type="float">
            <text:p>0.011345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3665" calcext:value-type="float">
            <text:p>0.003665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float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3795" calcext:value-type="float">
            <text:p>0.003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9055" calcext:value-type="float">
            <text:p>0.0490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5693" calcext:value-type="float">
            <text:p>0.015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9787" calcext:value-type="float">
            <text:p>0.0097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994" calcext:value-type="float">
            <text:p>0.009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3475" calcext:value-type="float">
            <text:p>0.04347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3827" calcext:value-type="float">
            <text:p>0.01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667" calcext:value-type="float">
            <text:p>0.0086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752" calcext:value-type="float">
            <text:p>0.00875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164" calcext:value-type="float">
            <text:p>0.01016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5653" calcext:value-type="float">
            <text:p>0.0056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32" calcext:value-type="float">
            <text:p>0.0045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918" calcext:value-type="float">
            <text:p>0.0039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7642" calcext:value-type="float">
            <text:p>0.07764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7048" calcext:value-type="float">
            <text:p>0.0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9609" calcext:value-type="float">
            <text:p>0.019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8447" calcext:value-type="float">
            <text:p>0.06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3816" calcext:value-type="float">
            <text:p>0.0238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7313" calcext:value-type="float">
            <text:p>0.0173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836" calcext:value-type="float">
            <text:p>0.0108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3214" calcext:value-type="float">
            <text:p>0.0132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5572" calcext:value-type="float">
            <text:p>0.0055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985" calcext:value-type="float">
            <text:p>0.0049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4371" calcext:value-type="float">
            <text:p>0.0043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66755" calcext:value-type="float">
            <text:p>0.1667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6251" calcext:value-type="float">
            <text:p>0.0462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308" calcext:value-type="float">
            <text:p>0.03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8153" calcext:value-type="float">
            <text:p>0.0181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4335" calcext:value-type="float">
            <text:p>0.1343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257" calcext:value-type="float">
            <text:p>0.037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368" calcext:value-type="float">
            <text:p>0.026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932" calcext:value-type="float">
            <text:p>0.014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6484" calcext:value-type="float">
            <text:p>0.01648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6779" calcext:value-type="float">
            <text:p>0.006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5132" calcext:value-type="float">
            <text:p>0.0051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555" calcext:value-type="float">
            <text:p>0.005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91901" calcext:value-type="float">
            <text:p>0.2919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89356" calcext:value-type="float">
            <text:p>0.0893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6924" calcext:value-type="float">
            <text:p>0.0469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7119" calcext:value-type="float">
            <text:p>0.0471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56896" calcext:value-type="float">
            <text:p>0.2568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8618" calcext:value-type="float">
            <text:p>0.0786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1326" calcext:value-type="float">
            <text:p>0.041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1515" calcext:value-type="float">
            <text:p>0.041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0271" calcext:value-type="float">
            <text:p>0.020271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7571" calcext:value-type="float">
            <text:p>0.0075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5819" calcext:value-type="float">
            <text:p>0.0058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6194" calcext:value-type="float">
            <text:p>0.006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8535" calcext:value-type="float">
            <text:p>0.3853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101742" calcext:value-type="float">
            <text:p>0.1017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53541" calcext:value-type="float">
            <text:p>0.0535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53517" calcext:value-type="float">
            <text:p>0.0535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38708" calcext:value-type="float">
            <text:p>0.33870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90073" calcext:value-type="float">
            <text:p>0.0900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7049" calcext:value-type="float">
            <text:p>0.0470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6905" calcext:value-type="float">
            <text:p>0.046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9558" calcext:value-type="float">
            <text:p>0.0095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7747" calcext:value-type="float">
            <text:p>0.0077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6648" calcext:value-type="float">
            <text:p>0.006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93295" calcext:value-type="float">
            <text:p>0.49329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4252" calcext:value-type="float">
            <text:p>0.1442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88502" calcext:value-type="float">
            <text:p>0.0885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0098" calcext:value-type="float">
            <text:p>0.0600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33333" calcext:value-type="float">
            <text:p>0.4333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25651" calcext:value-type="float">
            <text:p>0.1256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8042" calcext:value-type="float">
            <text:p>0.0780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54444" calcext:value-type="float">
            <text:p>0.05444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2788" calcext:value-type="float">
            <text:p>0.04278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4801" calcext:value-type="float">
            <text:p>0.014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1187" calcext:value-type="float">
            <text:p>0.011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9613" calcext:value-type="float">
            <text:p>0.0096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648697" calcext:value-type="float">
            <text:p>0.64869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68519" calcext:value-type="float">
            <text:p>0.1685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103965" calcext:value-type="float">
            <text:p>0.1039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7089" calcext:value-type="float">
            <text:p>0.070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8032" calcext:value-type="float">
            <text:p>0.538032</text:p>
          </table:table-cell>
          <table:table-cell office:value-type="string" calcext:value-type="string">
            <text:p>inline float</text:p>
          </table:table-cell>
          <table:table-cell/>
          <table:table-cell office:value-type="string" calcext:value-type="string">
            <text:p>From here on, missing values failed (reg allocation insufficient capacity)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41316" calcext:value-type="float">
            <text:p>0.1413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5998" calcext:value-type="float">
            <text:p>0.085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909" calcext:value-type="float">
            <text:p>0.058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657072" calcext:value-type="float">
            <text:p>0.6570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84263" calcext:value-type="float">
            <text:p>0.1842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5275" calcext:value-type="float">
            <text:p>0.095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9002" calcext:value-type="float">
            <text:p>0.0690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786104" calcext:value-type="float">
            <text:p>0.7861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200467" calcext:value-type="float">
            <text:p>0.200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103576" calcext:value-type="float">
            <text:p>0.103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70138" calcext:value-type="float">
            <text:p>0.07013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932557" calcext:value-type="float">
            <text:p>0.932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914" calcext:value-type="float">
            <text:p>0.2579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1266" calcext:value-type="float">
            <text:p>0.1512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3362" calcext:value-type="float">
            <text:p>0.1133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1.086446" calcext:value-type="float">
            <text:p>1.0864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5729" calcext:value-type="float">
            <text:p>0.275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1067" calcext:value-type="float">
            <text:p>0.1610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1933" calcext:value-type="float">
            <text:p>0.12193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251007" calcext:value-type="float">
            <text:p>1.2510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731" calcext:value-type="float">
            <text:p>0.341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461" calcext:value-type="float">
            <text:p>0.17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0795" calcext:value-type="float">
            <text:p>0.130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427054" calcext:value-type="float">
            <text:p>1.4270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0621" calcext:value-type="float">
            <text:p>0.360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609" calcext:value-type="float">
            <text:p>0.18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39617" calcext:value-type="float">
            <text:p>0.1396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616136" calcext:value-type="float">
            <text:p>1.6161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1898" calcext:value-type="float">
            <text:p>0.431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6167" calcext:value-type="float">
            <text:p>0.246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48483" calcext:value-type="float">
            <text:p>0.148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817172" calcext:value-type="float">
            <text:p>1.8171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5695" calcext:value-type="float">
            <text:p>0.45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59832" calcext:value-type="float">
            <text:p>0.2598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57388" calcext:value-type="float">
            <text:p>0.15738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2.029241" calcext:value-type="float">
            <text:p>2.02924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7906" calcext:value-type="float">
            <text:p>0.5379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5559" calcext:value-type="float">
            <text:p>0.2755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1621" calcext:value-type="float">
            <text:p>0.221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252849" calcext:value-type="float">
            <text:p>2.252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449" calcext:value-type="float">
            <text:p>0.5644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3" office:value-type="string" calcext:value-type="string">
            <text:p>matrix mul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89982" calcext:value-type="float">
            <text:p>0.28998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5"/>
        </table:table-row>
        <table:table-row table:style-name="ro1">
          <table:table-cell table:number-columns-repeated="8"/>
          <table:table-cell office:value-type="string" calcext:value-type="string">
            <text:p>pi1</text:p>
          </table:table-cell>
          <table:table-cell office:value-type="float" office:value="0.005854" calcext:value-type="float">
            <text:p>0.005854</text:p>
          </table:table-cell>
          <table:table-cell office:value-type="float" office:value="0.006329" calcext:value-type="float">
            <text:p>0.006329</text:p>
          </table:table-cell>
          <table:table-cell office:value-type="float" office:value="0.006731" calcext:value-type="float">
            <text:p>0.006731</text:p>
          </table:table-cell>
          <table:table-cell office:value-type="float" office:value="0.007711" calcext:value-type="float">
            <text:p>0.007711</text:p>
          </table:table-cell>
          <table:table-cell office:value-type="float" office:value="0.008032" calcext:value-type="float">
            <text:p>0.008032</text:p>
          </table:table-cell>
          <table:table-cell office:value-type="float" office:value="0.008537" calcext:value-type="float">
            <text:p>0.008537</text:p>
          </table:table-cell>
          <table:table-cell office:value-type="float" office:value="0.009337" calcext:value-type="float">
            <text:p>0.009337</text:p>
          </table:table-cell>
          <table:table-cell office:value-type="float" office:value="0.010306" calcext:value-type="float">
            <text:p>0.010306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0.013397" calcext:value-type="float">
            <text:p>0.013397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4097" calcext:value-type="float">
            <text:p>0.23409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2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491299" calcext:value-type="float">
            <text:p>2.491299</text:p>
          </table:table-cell>
          <table:table-cell office:value-type="string" calcext:value-type="string">
            <text:p>inline float</text:p>
          </table:table-cell>
          <table:table-cell/>
          <table:table-cell office:value-type="string" calcext:value-type="string">
            <text:p>pi3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4621" calcext:value-type="float">
            <text:p>0.004621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005453" calcext:value-type="float">
            <text:p>0.005453</text:p>
          </table:table-cell>
          <table:table-cell office:value-type="float" office:value="0.007625" calcext:value-type="float">
            <text:p>0.007625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365" calcext:value-type="float">
            <text:p>0.653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</text:p>
          </table:table-cell>
          <table:table-cell office:value-type="float" office:value="0.003428" calcext:value-type="float">
            <text:p>0.003428</text:p>
          </table:table-cell>
          <table:table-cell/>
          <table:table-cell office:value-type="float" office:value="0.003521" calcext:value-type="float">
            <text:p>0.003521</text:p>
          </table:table-cell>
          <table:table-cell/>
          <table:table-cell office:value-type="float" office:value="0.004315" calcext:value-type="float">
            <text:p>0.004315</text:p>
          </table:table-cell>
          <table:table-cell/>
          <table:table-cell office:value-type="float" office:value="0.004609" calcext:value-type="float">
            <text:p>0.004609</text:p>
          </table:table-cell>
          <table:table-cell/>
          <table:table-cell office:value-type="float" office:value="0.006737" calcext:value-type="float">
            <text:p>0.006737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5265" calcext:value-type="float">
            <text:p>0.3652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3718" calcext:value-type="float">
            <text:p>0.2437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string" calcext:value-type="string">
            <text:p>7f53a89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487" calcext:value-type="float">
            <text:p>0.002487</text:p>
          </table:table-cell>
          <table:table-cell office:value-type="string" calcext:value-type="string">
            <text:p>matrix mult</text:p>
          </table:table-cell>
          <table:table-cell/>
          <table:table-cell>
            <draw:frame draw:z-index="1" draw:style-name="gr1" draw:text-style-name="P1" svg:width="7.5685in" svg:height="4.0055in" svg:x="0.0024in" svg:y="0.1028in">
              <draw:object draw:notify-on-update-of-ranges="Timing.J372:Timing.S372 Timing.I373:Timing.I373 Timing.J373:Timing.S373 Timing.I374:Timing.I374 Timing.J374:Timing.S374 Timing.I375:Timing.I375 Timing.J375:Timing.S375 Timing.I376:Timing.I376 Timing.J376:Timing.S37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322" calcext:value-type="float">
            <text:p>0.0023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417" calcext:value-type="float">
            <text:p>0.0024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477" calcext:value-type="float">
            <text:p>0.0024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94" calcext:value-type="float">
            <text:p>0.00319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3" calcext:value-type="float">
            <text:p>0.0029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07" calcext:value-type="float">
            <text:p>0.0030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063" calcext:value-type="float">
            <text:p>0.0030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902" calcext:value-type="float">
            <text:p>0.00290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649" calcext:value-type="float">
            <text:p>0.002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701" calcext:value-type="float">
            <text:p>0.0027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753" calcext:value-type="float">
            <text:p>0.0027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3353" calcext:value-type="float">
            <text:p>0.00335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2513" calcext:value-type="float">
            <text:p>0.0025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257" calcext:value-type="float">
            <text:p>0.00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2679" calcext:value-type="float">
            <text:p>0.0026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0032" calcext:value-type="float">
            <text:p>0.0100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83" calcext:value-type="float">
            <text:p>0.004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848" calcext:value-type="float">
            <text:p>0.00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905" calcext:value-type="float">
            <text:p>0.004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254" calcext:value-type="float">
            <text:p>0.0042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292" calcext:value-type="float">
            <text:p>0.004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351" calcext:value-type="float">
            <text:p>0.004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74" calcext:value-type="float">
            <text:p>0.0045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018" calcext:value-type="float">
            <text:p>0.0030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2717" calcext:value-type="float">
            <text:p>0.00271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Inline floa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2754" calcext:value-type="float">
            <text:p>0.00275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/>
          <table:table-cell office:value-type="string" calcext:value-type="string">
            <text:p>pi1</text:p>
          </table:table-cell>
          <table:table-cell office:value-type="float" office:value="0.006209" calcext:value-type="float">
            <text:p>0.006209</text:p>
          </table:table-cell>
          <table:table-cell office:value-type="float" office:value="0.008314" calcext:value-type="float">
            <text:p>0.008314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0.011528" calcext:value-type="float">
            <text:p>0.011528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0.016279" calcext:value-type="float">
            <text:p>0.016279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038595" calcext:value-type="float">
            <text:p>0.038595</text:p>
          </table:table-cell>
          <table:table-cell office:value-type="float" office:value="0.043437" calcext:value-type="float">
            <text:p>0.043437</text:p>
          </table:table-cell>
          <table:table-cell office:value-type="float" office:value="0.047916" calcext:value-type="float">
            <text:p>0.047916</text:p>
          </table:table-cell>
          <table:table-cell office:value-type="float" office:value="0.052428" calcext:value-type="float">
            <text:p>0.052428</text:p>
          </table:table-cell>
          <table:table-cell office:value-type="float" office:value="0.056623" calcext:value-type="float">
            <text:p>0.056623</text:p>
          </table:table-cell>
          <table:table-cell office:value-type="float" office:value="0.089863" calcext:value-type="float">
            <text:p>0.089863</text:p>
          </table:table-cell>
          <table:table-cell office:value-type="float" office:value="0.09469" calcext:value-type="float">
            <text:p>0.09469</text:p>
          </table:table-cell>
          <table:table-cell office:value-type="float" office:value="0.101911" calcext:value-type="float">
            <text:p>0.101911</text:p>
          </table:table-cell>
          <table:table-cell office:value-type="float" office:value="0.109103" calcext:value-type="float">
            <text:p>0.109103</text:p>
          </table:table-cell>
          <table:table-cell office:value-type="float" office:value="0.115419" calcext:value-type="float">
            <text:p>0.115419</text:p>
          </table:table-cell>
          <table:table-cell office:value-type="float" office:value="0.134602" calcext:value-type="float">
            <text:p>0.134602</text:p>
          </table:table-cell>
          <table:table-cell office:value-type="float" office:value="0.170062" calcext:value-type="float">
            <text:p>0.170062</text:p>
          </table:table-cell>
          <table:table-cell office:value-type="float" office:value="0.177448" calcext:value-type="float">
            <text:p>0.177448</text:p>
          </table:table-cell>
          <table:table-cell office:value-type="float" office:value="0.186684" calcext:value-type="float">
            <text:p>0.186684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/>
          <table:table-cell office:value-type="string" calcext:value-type="string">
            <text:p>pi2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office:value-type="float" office:value="0.069002" calcext:value-type="float">
            <text:p>0.069002</text:p>
          </table:table-cell>
          <table:table-cell office:value-type="float" office:value="0.070138" calcext:value-type="float">
            <text:p>0.070138</text:p>
          </table:table-cell>
          <table:table-cell office:value-type="float" office:value="0.113362" calcext:value-type="float">
            <text:p>0.113362</text:p>
          </table:table-cell>
          <table:table-cell office:value-type="float" office:value="0.121933" calcext:value-type="float">
            <text:p>0.121933</text:p>
          </table:table-cell>
          <table:table-cell office:value-type="float" office:value="0.130795" calcext:value-type="float">
            <text:p>0.130795</text:p>
          </table:table-cell>
          <table:table-cell office:value-type="float" office:value="0.139617" calcext:value-type="float">
            <text:p>0.139617</text:p>
          </table:table-cell>
          <table:table-cell office:value-type="float" office:value="0.148483" calcext:value-type="float">
            <text:p>0.148483</text:p>
          </table:table-cell>
          <table:table-cell office:value-type="float" office:value="0.157388" calcext:value-type="float">
            <text:p>0.157388</text:p>
          </table:table-cell>
          <table:table-cell office:value-type="float" office:value="0.221621" calcext:value-type="float">
            <text:p>0.221621</text:p>
          </table:table-cell>
          <table:table-cell office:value-type="float" office:value="0.234097" calcext:value-type="float">
            <text:p>0.234097</text:p>
          </table:table-cell>
          <table:table-cell office:value-type="float" office:value="0.243718" calcext:value-type="float">
            <text:p>0.243718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056" calcext:value-type="float">
            <text:p>0.01005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3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0.008835" calcext:value-type="float">
            <text:p>0.008835</text:p>
          </table:table-cell>
          <table:table-cell office:value-type="float" office:value="0.012222" calcext:value-type="float">
            <text:p>0.012222</text:p>
          </table:table-cell>
          <table:table-cell office:value-type="float" office:value="0.034048" calcext:value-type="float">
            <text:p>0.034048</text:p>
          </table:table-cell>
          <table:table-cell office:value-type="float" office:value="0.03827" calcext:value-type="float">
            <text:p>0.03827</text:p>
          </table:table-cell>
          <table:table-cell office:value-type="float" office:value="0.043657" calcext:value-type="float">
            <text:p>0.043657</text:p>
          </table:table-cell>
          <table:table-cell office:value-type="float" office:value="0.060283" calcext:value-type="float">
            <text:p>0.060283</text:p>
          </table:table-cell>
          <table:table-cell office:value-type="float" office:value="0.066079" calcext:value-type="float">
            <text:p>0.066079</text:p>
          </table:table-cell>
          <table:table-cell office:value-type="float" office:value="0.057862" calcext:value-type="float">
            <text:p>0.057862</text:p>
          </table:table-cell>
          <table:table-cell office:value-type="float" office:value="0.114961" calcext:value-type="float">
            <text:p>0.114961</text:p>
          </table:table-cell>
          <table:table-cell office:value-type="float" office:value="0.124308" calcext:value-type="float">
            <text:p>0.124308</text:p>
          </table:table-cell>
          <table:table-cell office:value-type="float" office:value="0.133582" calcext:value-type="float">
            <text:p>0.133582</text:p>
          </table:table-cell>
          <table:table-cell office:value-type="float" office:value="0.142299" calcext:value-type="float">
            <text:p>0.142299</text:p>
          </table:table-cell>
          <table:table-cell office:value-type="float" office:value="0.151706" calcext:value-type="float">
            <text:p>0.151706</text:p>
          </table:table-cell>
          <table:table-cell office:value-type="float" office:value="0.160021" calcext:value-type="float">
            <text:p>0.160021</text:p>
          </table:table-cell>
          <table:table-cell office:value-type="float" office:value="0.224211" calcext:value-type="float">
            <text:p>0.224211</text:p>
          </table:table-cell>
          <table:table-cell office:value-type="float" office:value="0.236045" calcext:value-type="float">
            <text:p>0.236045</text:p>
          </table:table-cell>
          <table:table-cell office:value-type="float" office:value="0.247366" calcext:value-type="float">
            <text:p>0.247366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665" calcext:value-type="float">
            <text:p>0.0066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</text:p>
          </table:table-cell>
          <table:table-cell office:value-type="float" office:value="0.003499" calcext:value-type="float">
            <text:p>0.003499</text:p>
          </table:table-cell>
          <table:table-cell/>
          <table:table-cell office:value-type="float" office:value="0.00368" calcext:value-type="float">
            <text:p>0.00368</text:p>
          </table:table-cell>
          <table:table-cell/>
          <table:table-cell office:value-type="float" office:value="0.004912" calcext:value-type="float">
            <text:p>0.004912</text:p>
          </table:table-cell>
          <table:table-cell/>
          <table:table-cell office:value-type="float" office:value="0.006071" calcext:value-type="float">
            <text:p>0.006071</text:p>
          </table:table-cell>
          <table:table-cell/>
          <table:table-cell office:value-type="float" office:value="0.008499" calcext:value-type="float">
            <text:p>0.008499</text:p>
          </table:table-cell>
          <table:table-cell/>
          <table:table-cell office:value-type="float" office:value="0.009589" calcext:value-type="float">
            <text:p>0.009589</text:p>
          </table:table-cell>
          <table:table-cell/>
          <table:table-cell office:value-type="float" office:value="0.013167" calcext:value-type="float">
            <text:p>0.013167</text:p>
          </table:table-cell>
          <table:table-cell/>
          <table:table-cell office:value-type="float" office:value="0.017471" calcext:value-type="float">
            <text:p>0.017471</text:p>
          </table:table-cell>
          <table:table-cell/>
          <table:table-cell office:value-type="float" office:value="0.019331" calcext:value-type="float">
            <text:p>0.019331</text:p>
          </table:table-cell>
          <table:table-cell/>
          <table:table-cell office:value-type="float" office:value="0.021194" calcext:value-type="float">
            <text:p>0.021194</text:p>
          </table:table-cell>
          <table:table-cell/>
          <table:table-cell office:value-type="float" office:value="0.026998" calcext:value-type="float">
            <text:p>0.026998</text:p>
          </table:table-cell>
          <table:table-cell/>
          <table:table-cell office:value-type="float" office:value="0.029371" calcext:value-type="float">
            <text:p>0.029371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02" calcext:value-type="float">
            <text:p>0.0067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19717" calcext:value-type="float">
            <text:p>0.01971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8902" calcext:value-type="float">
            <text:p>0.008902</text:p>
          </table:table-cell>
          <table:table-cell office:value-type="string" calcext:value-type="string">
            <text:p><text:s/></text:p>
          </table:table-cell>
          <table:table-cell/>
          <table:table-cell>
            <draw:frame draw:z-index="2" draw:style-name="gr1" draw:text-style-name="P1" svg:width="9.8051in" svg:height="4.6224in" svg:x="0.2429in" svg:y="0.0319in">
              <draw:object draw:notify-on-update-of-ranges="Timing.J406:Timing.AF406 Timing.I407:Timing.I407 Timing.J407:Timing.AF407 Timing.I408:Timing.I408 Timing.J408:Timing.AF408 Timing.I409:Timing.I409 Timing.J409:Timing.AF409 Timing.I410:Timing.I410 Timing.J410:Timing.AF410 Timing.T526:Timing.T52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5896" calcext:value-type="float">
            <text:p>0.0058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419" calcext:value-type="float">
            <text:p>0.006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6182" calcext:value-type="float">
            <text:p>0.0061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349" calcext:value-type="float">
            <text:p>0.003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0172" calcext:value-type="float">
            <text:p>0.04017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2949" calcext:value-type="float">
            <text:p>0.0129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01" calcext:value-type="float">
            <text:p>0.00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53" calcext:value-type="float">
            <text:p>0.008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354" calcext:value-type="float">
            <text:p>0.03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1441" calcext:value-type="float">
            <text:p>0.0114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146" calcext:value-type="float">
            <text:p>0.007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8183" calcext:value-type="float">
            <text:p>0.00818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4782" calcext:value-type="float">
            <text:p>0.0047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64" calcext:value-type="float">
            <text:p>0.00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146" calcext:value-type="float">
            <text:p>0.003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374" calcext:value-type="float">
            <text:p>0.0637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2403" calcext:value-type="float">
            <text:p>0.0224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6224" calcext:value-type="float">
            <text:p>0.0162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036" calcext:value-type="float">
            <text:p>0.0100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56133" calcext:value-type="float">
            <text:p>0.0561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19728" calcext:value-type="float">
            <text:p>0.0197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4278" calcext:value-type="float">
            <text:p>0.014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835" calcext:value-type="float">
            <text:p>0.0088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0524" calcext:value-type="float">
            <text:p>0.0105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033" calcext:value-type="float">
            <text:p>0.0040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3509" calcext:value-type="float">
            <text:p>0.00350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v3d sin/cos, inline floa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6785" calcext:value-type="float">
            <text:p>0.136785</text:p>
          </table:table-cell>
          <table:table-cell office:value-type="string" calcext:value-type="string">
            <text:p>inline compl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office:value-type="float" office:value="784" calcext:value-type="float">
            <text:p>784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855" calcext:value-type="float">
            <text:p>0.03785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lib functions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603" calcext:value-type="float">
            <text:p>0.02660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hardware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5821" calcext:value-type="float">
            <text:p>0.005821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0.010335" calcext:value-type="float">
            <text:p>0.010335</text:p>
          </table:table-cell>
          <table:table-cell office:value-type="float" office:value="0.014909" calcext:value-type="float">
            <text:p>0.014909</text:p>
          </table:table-cell>
          <table:table-cell office:value-type="float" office:value="0.019662" calcext:value-type="float">
            <text:p>0.019662</text:p>
          </table:table-cell>
          <table:table-cell office:value-type="float" office:value="0.01878" calcext:value-type="float">
            <text:p>0.01878</text:p>
          </table:table-cell>
          <table:table-cell office:value-type="float" office:value="0.025099" calcext:value-type="float">
            <text:p>0.025099</text:p>
          </table:table-cell>
          <table:table-cell office:value-type="float" office:value="0.027739" calcext:value-type="float">
            <text:p>0.027739</text:p>
          </table:table-cell>
          <table:table-cell office:value-type="float" office:value="0.035538" calcext:value-type="float">
            <text:p>0.035538</text:p>
          </table:table-cell>
          <table:table-cell office:value-type="float" office:value="0.039354" calcext:value-type="float">
            <text:p>0.0393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835" calcext:value-type="float">
            <text:p>0.01483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matrix mult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4515" calcext:value-type="float">
            <text:p>0.004515</text:p>
          </table:table-cell>
          <table:table-cell office:value-type="float" office:value="0.004516" calcext:value-type="float">
            <text:p>0.004516</text:p>
          </table:table-cell>
          <table:table-cell office:value-type="float" office:value="0.006605" calcext:value-type="float">
            <text:p>0.00660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10236" calcext:value-type="float">
            <text:p>0.1102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0796" calcext:value-type="float">
            <text:p>0.0307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1873" calcext:value-type="float">
            <text:p>0.0218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2222" calcext:value-type="float">
            <text:p>0.012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3305" calcext:value-type="float">
            <text:p>0.0133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5545" calcext:value-type="float">
            <text:p>0.005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19" calcext:value-type="float">
            <text:p>0.00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4621" calcext:value-type="float">
            <text:p>0.004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3967" calcext:value-type="float">
            <text:p>0.239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3001" calcext:value-type="float">
            <text:p>0.073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8672" calcext:value-type="float">
            <text:p>0.0386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8755" calcext:value-type="float">
            <text:p>0.0387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10463" calcext:value-type="float">
            <text:p>0.2104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4895" calcext:value-type="float">
            <text:p>0.0648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3984" calcext:value-type="float">
            <text:p>0.0339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048" calcext:value-type="float">
            <text:p>0.0340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17296" calcext:value-type="float">
            <text:p>0.01729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6223" calcext:value-type="float">
            <text:p>0.0062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4698" calcext:value-type="float">
            <text:p>0.0046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4977" calcext:value-type="float">
            <text:p>0.004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16654" calcext:value-type="float">
            <text:p>0.31665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2877" calcext:value-type="float">
            <text:p>0.0828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134" calcext:value-type="float">
            <text:p>0.044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724" calcext:value-type="float">
            <text:p>0.0437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78846" calcext:value-type="float">
            <text:p>0.2788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72854" calcext:value-type="float">
            <text:p>0.072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788" calcext:value-type="float">
            <text:p>0.0387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27" calcext:value-type="float">
            <text:p>0.0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7764" calcext:value-type="float">
            <text:p>0.0077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196" calcext:value-type="float">
            <text:p>0.0061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5453" calcext:value-type="float">
            <text:p>0.005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0475" calcext:value-type="float">
            <text:p>0.404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6203" calcext:value-type="float">
            <text:p>0.1462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90379" calcext:value-type="float">
            <text:p>0.0903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2726" calcext:value-type="float">
            <text:p>0.0627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714" calcext:value-type="float">
            <text:p>0.3557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02759" calcext:value-type="float">
            <text:p>0.1027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4255" calcext:value-type="float">
            <text:p>0.0642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657" calcext:value-type="float">
            <text:p>0.0436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35022" calcext:value-type="float">
            <text:p>0.03502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2235" calcext:value-type="float">
            <text:p>0.012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09253" calcext:value-type="float">
            <text:p>0.0092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7625" calcext:value-type="float">
            <text:p>0.0076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2769" calcext:value-type="float">
            <text:p>0.53276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36685" calcext:value-type="float">
            <text:p>0.1366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4945" calcext:value-type="float">
            <text:p>0.0849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138" calcext:value-type="float">
            <text:p>0.0581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42006" calcext:value-type="float">
            <text:p>0.44200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13596" calcext:value-type="float">
            <text:p>0.1135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7648" calcext:value-type="float">
            <text:p>0.087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60283" calcext:value-type="float">
            <text:p>0.0602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538447" calcext:value-type="float">
            <text:p>0.53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79967" calcext:value-type="float">
            <text:p>0.1799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7149" calcext:value-type="float">
            <text:p>0.0971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6079" calcext:value-type="float">
            <text:p>0.0660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644986" calcext:value-type="float">
            <text:p>0.64498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63342" calcext:value-type="float">
            <text:p>0.1633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5658" calcext:value-type="float">
            <text:p>0.0856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7862" calcext:value-type="float">
            <text:p>0.0578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852865" calcext:value-type="float">
            <text:p>0.85286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883" calcext:value-type="float">
            <text:p>0.257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2493" calcext:value-type="float">
            <text:p>0.1524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4961" calcext:value-type="float">
            <text:p>0.1149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993009" calcext:value-type="float">
            <text:p>0.99300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8939" calcext:value-type="float">
            <text:p>0.2789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5028" calcext:value-type="float">
            <text:p>0.165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4308" calcext:value-type="float">
            <text:p>0.1243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055576" calcext:value-type="float">
            <text:p>1.0555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802" calcext:value-type="float">
            <text:p>0.3418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695" calcext:value-type="float">
            <text:p>0.17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3582" calcext:value-type="float">
            <text:p>0.13358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257204" calcext:value-type="float">
            <text:p>1.2572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1453" calcext:value-type="float">
            <text:p>0.361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8827" calcext:value-type="float">
            <text:p>0.188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42299" calcext:value-type="float">
            <text:p>0.1422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385933" calcext:value-type="float">
            <text:p>1.3859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7066" calcext:value-type="float">
            <text:p>0.4370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973" calcext:value-type="float">
            <text:p>0.249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51706" calcext:value-type="float">
            <text:p>0.15170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600839" calcext:value-type="float">
            <text:p>1.600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60104" calcext:value-type="float">
            <text:p>0.4601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63312" calcext:value-type="float">
            <text:p>0.2633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60021" calcext:value-type="float">
            <text:p>0.16002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772664" calcext:value-type="float">
            <text:p>1.77266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9292" calcext:value-type="float">
            <text:p>0.539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9461" calcext:value-type="float">
            <text:p>0.279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4211" calcext:value-type="float">
            <text:p>0.2242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088963" calcext:value-type="float">
            <text:p>2.0889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969" calcext:value-type="float">
            <text:p>0.569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93772" calcext:value-type="float">
            <text:p>0.2937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6045" calcext:value-type="float">
            <text:p>0.23604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308371" calcext:value-type="float">
            <text:p>2.308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9177" calcext:value-type="float">
            <text:p>0.6591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8131" calcext:value-type="float">
            <text:p>0.3681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7366" calcext:value-type="float">
            <text:p>0.247366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724" calcext:value-type="float">
            <text:p>0.0037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28" calcext:value-type="float">
            <text:p>0.0034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1" calcext:value-type="float">
            <text:p>0.0038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08" calcext:value-type="float">
            <text:p>0.0037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557" calcext:value-type="float">
            <text:p>0.003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902" calcext:value-type="float">
            <text:p>0.00490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399" calcext:value-type="float">
            <text:p>0.00639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15" calcext:value-type="float">
            <text:p>0.0041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592" calcext:value-type="float">
            <text:p>0.0055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68" calcext:value-type="float">
            <text:p>0.00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47" calcext:value-type="float">
            <text:p>0.00734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315" calcext:value-type="float">
            <text:p>0.0043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" calcext:value-type="float">
            <text:p>0.0143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028" calcext:value-type="float">
            <text:p>0.006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849" calcext:value-type="float">
            <text:p>0.010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912" calcext:value-type="float">
            <text:p>0.0049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886" calcext:value-type="float">
            <text:p>0.01088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609" calcext:value-type="float">
            <text:p>0.004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5361" calcext:value-type="float">
            <text:p>0.02536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729" calcext:value-type="float">
            <text:p>0.006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795" calcext:value-type="float">
            <text:p>0.02079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071" calcext:value-type="float">
            <text:p>0.006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36" calcext:value-type="float">
            <text:p>0.01903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737" calcext:value-type="float">
            <text:p>0.006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1317" calcext:value-type="float">
            <text:p>0.04131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9991" calcext:value-type="float">
            <text:p>0.0099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3952" calcext:value-type="float">
            <text:p>0.03395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8499" calcext:value-type="float">
            <text:p>0.0084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0354" calcext:value-type="float">
            <text:p>0.060354</text:p>
          </table:table-cell>
          <table:table-cell office:value-type="string" calcext:value-type="string">
            <text:p>inline complex</text:p>
          </table:table-cell>
          <table:table-cell/>
          <table:table-cell office:value-type="string" calcext:value-type="string">
            <text:p>Matrix mult: ERROR: v3d regAlloc(): register allocation failed for target instruction 120: LI ACC2 &lt;- 6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1345" calcext:value-type="float">
            <text:p>0.0113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49351" calcext:value-type="float">
            <text:p>0.0493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09589" calcext:value-type="float">
            <text:p>0.00958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67822" calcext:value-type="float">
            <text:p>0.067822</text:p>
          </table:table-cell>
          <table:table-cell office:value-type="string" calcext:value-type="string">
            <text:p>inline float</text:p>
          </table:table-cell>
          <table:table-cell/>
          <table:table-cell office:value-type="string" calcext:value-type="string">
            <text:p>Matrix mult, inline complex: ERROR: v3d regAlloc(): register allocation failed for target instruction 64: S[TMU0_S] &lt;- or(A70, A70)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3167" calcext:value-type="float">
            <text:p>0.01316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089707" calcext:value-type="float">
            <text:p>0.08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7471" calcext:value-type="float">
            <text:p>0.017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14267" calcext:value-type="float">
            <text:p>0.11426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19331" calcext:value-type="float">
            <text:p>0.0193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42293" calcext:value-type="float">
            <text:p>0.14229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1194" calcext:value-type="float">
            <text:p>0.021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173555" calcext:value-type="float">
            <text:p>0.1735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26998" calcext:value-type="float">
            <text:p>0.02699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08061" calcext:value-type="float">
            <text:p>0.20806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29371" calcext:value-type="float">
            <text:p>0.029371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8492" calcext:value-type="float">
            <text:p>0.00849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501" calcext:value-type="float">
            <text:p>0.0055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5447" calcext:value-type="float">
            <text:p>0.005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5854" calcext:value-type="float">
            <text:p>0.005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7241" calcext:value-type="float">
            <text:p>0.0072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6649" calcext:value-type="float">
            <text:p>0.006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956" calcext:value-type="float">
            <text:p>0.0069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7025" calcext:value-type="float">
            <text:p>0.0070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6272" calcext:value-type="float">
            <text:p>0.0062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977" calcext:value-type="float">
            <text:p>0.005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179" calcext:value-type="float">
            <text:p>0.0061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6209" calcext:value-type="float">
            <text:p>0.006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6557" calcext:value-type="float">
            <text:p>0.0065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6225" calcext:value-type="float">
            <text:p>0.0062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329" calcext:value-type="float">
            <text:p>0.0063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5528" calcext:value-type="float">
            <text:p>0.015528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8757" calcext:value-type="float">
            <text:p>0.0087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875" calcext:value-type="float">
            <text:p>0.0088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9347" calcext:value-type="float">
            <text:p>0.0093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3816" calcext:value-type="float">
            <text:p>0.0138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7666" calcext:value-type="float">
            <text:p>0.0076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014" calcext:value-type="float">
            <text:p>0.0080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8314" calcext:value-type="float">
            <text:p>0.0083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065" calcext:value-type="float">
            <text:p>0.0090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6857" calcext:value-type="float">
            <text:p>0.0068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723" calcext:value-type="float">
            <text:p>0.006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31" calcext:value-type="float">
            <text:p>0.006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30771" calcext:value-type="float">
            <text:p>0.03077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539" calcext:value-type="float">
            <text:p>0.015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1218" calcext:value-type="float">
            <text:p>0.011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1426" calcext:value-type="float">
            <text:p>0.0114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883" calcext:value-type="float">
            <text:p>0.02788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3471" calcext:value-type="float">
            <text:p>0.013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0039" calcext:value-type="float">
            <text:p>0.0100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0069" calcext:value-type="float">
            <text:p>0.0100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11377" calcext:value-type="float">
            <text:p>0.0113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778" calcext:value-type="float">
            <text:p>0.007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364" calcext:value-type="float">
            <text:p>0.007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711" calcext:value-type="float">
            <text:p>0.0077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52636" calcext:value-type="float">
            <text:p>0.05263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8686" calcext:value-type="float">
            <text:p>0.0186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2674" calcext:value-type="float">
            <text:p>0.0126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308" calcext:value-type="float">
            <text:p>0.01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658" calcext:value-type="float">
            <text:p>0.046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6894" calcext:value-type="float">
            <text:p>0.0168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1157" calcext:value-type="float">
            <text:p>0.011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1528" calcext:value-type="float">
            <text:p>0.0115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4" calcext:value-type="float">
            <text:p>0.0143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9157" calcext:value-type="float">
            <text:p>0.009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8281" calcext:value-type="float">
            <text:p>0.008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032" calcext:value-type="float">
            <text:p>0.0080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81519" calcext:value-type="float">
            <text:p>0.0815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30215" calcext:value-type="float">
            <text:p>0.0302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275" calcext:value-type="float">
            <text:p>0.02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5343" calcext:value-type="float">
            <text:p>0.0153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2507" calcext:value-type="float">
            <text:p>0.0725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6402" calcext:value-type="float">
            <text:p>0.026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3592" calcext:value-type="float">
            <text:p>0.01359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7114" calcext:value-type="float">
            <text:p>0.0171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9281" calcext:value-type="float">
            <text:p>0.009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883" calcext:value-type="float">
            <text:p>0.00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8537" calcext:value-type="float">
            <text:p>0.0085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42762" calcext:value-type="float">
            <text:p>0.14276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2148" calcext:value-type="float">
            <text:p>0.0421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25129" calcext:value-type="float">
            <text:p>0.0251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20596" calcext:value-type="float">
            <text:p>0.1205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5232" calcext:value-type="float">
            <text:p>0.0352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5988" calcext:value-type="float">
            <text:p>0.0259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6279" calcext:value-type="float">
            <text:p>0.01627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503" calcext:value-type="float">
            <text:p>0.02050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1099" calcext:value-type="float">
            <text:p>0.01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898" calcext:value-type="float">
            <text:p>0.009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9337" calcext:value-type="float">
            <text:p>0.0093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2455" calcext:value-type="float">
            <text:p>0.22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0668" calcext:value-type="float">
            <text:p>0.0706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9363" calcext:value-type="float">
            <text:p>0.0393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9456" calcext:value-type="float">
            <text:p>0.0394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197851" calcext:value-type="float">
            <text:p>0.1978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2952" calcext:value-type="float">
            <text:p>0.0629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4545" calcext:value-type="float">
            <text:p>0.034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83" calcext:value-type="float">
            <text:p>0.03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4334" calcext:value-type="float">
            <text:p>0.02433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12334" calcext:value-type="float">
            <text:p>0.0123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10045" calcext:value-type="float">
            <text:p>0.01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10306" calcext:value-type="float">
            <text:p>0.0103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05493" calcext:value-type="float">
            <text:p>0.30549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5235" calcext:value-type="float">
            <text:p>0.085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824" calcext:value-type="float">
            <text:p>0.044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813" calcext:value-type="float">
            <text:p>0.0438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5937" calcext:value-type="float">
            <text:p>0.2593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69844" calcext:value-type="float">
            <text:p>0.0698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998" calcext:value-type="float">
            <text:p>0.038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595" calcext:value-type="float">
            <text:p>0.0385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0063" calcext:value-type="float">
            <text:p>0.0300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13301" calcext:value-type="float">
            <text:p>0.0133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567" calcext:value-type="float">
            <text:p>0.011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11167" calcext:value-type="float">
            <text:p>0.011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75243" calcext:value-type="float">
            <text:p>0.37524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1093" calcext:value-type="float">
            <text:p>0.110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0737" calcext:value-type="float">
            <text:p>0.070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9734" calcext:value-type="float">
            <text:p>0.0497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2974" calcext:value-type="float">
            <text:p>0.3297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96954" calcext:value-type="float">
            <text:p>0.0969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2236" calcext:value-type="float">
            <text:p>0.0622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437" calcext:value-type="float">
            <text:p>0.04343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6227" calcext:value-type="float">
            <text:p>0.04622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8475" calcext:value-type="float">
            <text:p>0.0184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4848" calcext:value-type="float">
            <text:p>0.01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13397" calcext:value-type="float">
            <text:p>0.0133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92119" calcext:value-type="float">
            <text:p>0.4921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28575" calcext:value-type="float">
            <text:p>0.1285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1444" calcext:value-type="float">
            <text:p>0.0814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7056" calcext:value-type="float">
            <text:p>0.0570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09371" calcext:value-type="float">
            <text:p>0.409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06692" calcext:value-type="float">
            <text:p>0.1066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68335" calcext:value-type="float">
            <text:p>0.068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47916" calcext:value-type="float">
            <text:p>0.0479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497839" calcext:value-type="float">
            <text:p>0.497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40439" calcext:value-type="float">
            <text:p>0.1404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75136" calcext:value-type="float">
            <text:p>0.0751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52428" calcext:value-type="float">
            <text:p>0.05242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593163" calcext:value-type="float">
            <text:p>0.5931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51986" calcext:value-type="float">
            <text:p>0.1519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218" calcext:value-type="float">
            <text:p>0.08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6623" calcext:value-type="float">
            <text:p>0.05662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705273" calcext:value-type="float">
            <text:p>0.7052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19404" calcext:value-type="float">
            <text:p>0.194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16878" calcext:value-type="float">
            <text:p>0.116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089863" calcext:value-type="float">
            <text:p>0.08986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829632" calcext:value-type="float">
            <text:p>0.82963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08304" calcext:value-type="float">
            <text:p>0.208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24803" calcext:value-type="float">
            <text:p>0.1248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09469" calcext:value-type="float">
            <text:p>0.094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950782" calcext:value-type="float">
            <text:p>0.9507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254178" calcext:value-type="float">
            <text:p>0.2541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3476" calcext:value-type="float">
            <text:p>0.134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01911" calcext:value-type="float">
            <text:p>0.1019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077296" calcext:value-type="float">
            <text:p>1.0772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27048" calcext:value-type="float">
            <text:p>0.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43402" calcext:value-type="float">
            <text:p>0.143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09103" calcext:value-type="float">
            <text:p>0.10910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226588" calcext:value-type="float">
            <text:p>1.22658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324094" calcext:value-type="float">
            <text:p>0.324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187576" calcext:value-type="float">
            <text:p>0.187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15419" calcext:value-type="float">
            <text:p>0.11541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36979" calcext:value-type="float">
            <text:p>1.369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341783" calcext:value-type="float">
            <text:p>0.3417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198805" calcext:value-type="float">
            <text:p>0.198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34602" calcext:value-type="float">
            <text:p>0.13460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535814" calcext:value-type="float">
            <text:p>1.5358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405094" calcext:value-type="float">
            <text:p>0.405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09522" calcext:value-type="float">
            <text:p>0.2095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170062" calcext:value-type="float">
            <text:p>0.1700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1.733476" calcext:value-type="float">
            <text:p>1.7334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422278" calcext:value-type="float">
            <text:p>0.422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19723" calcext:value-type="float">
            <text:p>0.219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177448" calcext:value-type="float">
            <text:p>0.1774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1.888368" calcext:value-type="float">
            <text:p>1.88836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487111" calcext:value-type="float">
            <text:p>0.487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277563" calcext:value-type="float">
            <text:p>0.2775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186684" calcext:value-type="float">
            <text:p>0.186684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hardware sin/cos, before fix combineImmediates()</text:p>
          </table:table-cell>
          <table:table-cell table:number-columns-repeated="1023"/>
        </table:table-row>
        <table:table-row table:style-name="ro1" table:visibility="collapse">
          <table:table-cell/>
          <table:table-cell office:value-type="string" calcext:value-type="string">
            <text:p>2a1afbf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6923" calcext:value-type="float">
            <text:p>0.169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397" calcext:value-type="float">
            <text:p>0.0033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26" calcext:value-type="float">
            <text:p>0.00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7955" calcext:value-type="float">
            <text:p>0.17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65" calcext:value-type="float">
            <text:p>0.00386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84" calcext:value-type="float">
            <text:p>0.0037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42904" calcext:value-type="float">
            <text:p>0.1429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453" calcext:value-type="float">
            <text:p>0.00345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33" calcext:value-type="float">
            <text:p>0.00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48475" calcext:value-type="float">
            <text:p>0.44847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777" calcext:value-type="float">
            <text:p>0.0047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1" calcext:value-type="float">
            <text:p>0.00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08397" calcext:value-type="float">
            <text:p>0.80839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864" calcext:value-type="float">
            <text:p>0.00986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881" calcext:value-type="float">
            <text:p>0.0048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538913" calcext:value-type="float">
            <text:p>0.5389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8646" calcext:value-type="float">
            <text:p>0.0086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84" calcext:value-type="float">
            <text:p>0.0041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915302" calcext:value-type="float">
            <text:p>0.915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65" calcext:value-type="float">
            <text:p>0.0073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15" calcext:value-type="float">
            <text:p>0.004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892363" calcext:value-type="float">
            <text:p>1.89236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22609" calcext:value-type="float">
            <text:p>0.02260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7578" calcext:value-type="float">
            <text:p>0.0075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051611" calcext:value-type="float">
            <text:p>1.0516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9707" calcext:value-type="float">
            <text:p>0.01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592049" calcext:value-type="float">
            <text:p>1.5920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929" calcext:value-type="float">
            <text:p>0.010929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516" calcext:value-type="float">
            <text:p>0.0045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488528" calcext:value-type="float">
            <text:p>3.48852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41814" calcext:value-type="float">
            <text:p>0.04181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382" calcext:value-type="float">
            <text:p>0.0093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657937" calcext:value-type="float">
            <text:p>1.65793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36425" calcext:value-type="float">
            <text:p>0.03642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8243" calcext:value-type="float">
            <text:p>0.0082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.525322" calcext:value-type="float">
            <text:p>2.5253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24" calcext:value-type="float">
            <text:p>0.0190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605" calcext:value-type="float">
            <text:p>0.0066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21409" calcext:value-type="float">
            <text:p>5.6214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69579" calcext:value-type="float">
            <text:p>0.06957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7013" calcext:value-type="float">
            <text:p>0.0170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.543255" calcext:value-type="float">
            <text:p>2.54325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61282" calcext:value-type="float">
            <text:p>0.0612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6111" calcext:value-type="float">
            <text:p>0.016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3.753905" calcext:value-type="float">
            <text:p>3.75390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8.622221" calcext:value-type="float">
            <text:p>8.62222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110916" calcext:value-type="float">
            <text:p>0.11091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9812" calcext:value-type="float">
            <text:p>0.0198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3.615705" calcext:value-type="float">
            <text:p>3.61570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90005" calcext:value-type="float">
            <text:p>0.09000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7206" calcext:value-type="float">
            <text:p>0.0172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5.335776" calcext:value-type="float">
            <text:p>5.33577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2.468999" calcext:value-type="float">
            <text:p>12.4689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4.921598" calcext:value-type="float">
            <text:p>4.92159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125327" calcext:value-type="float">
            <text:p>0.12532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24154" calcext:value-type="float">
            <text:p>0.024154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7.297044" calcext:value-type="float">
            <text:p>7.29704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7.372218" calcext:value-type="float">
            <text:p>17.37221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6.503704" calcext:value-type="float">
            <text:p>6.5037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166728" calcext:value-type="float">
            <text:p>0.16672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25001" calcext:value-type="float">
            <text:p>0.025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9.653728" calcext:value-type="float">
            <text:p>9.65372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23.280038" calcext:value-type="float">
            <text:p>23.2800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8.38951" calcext:value-type="float">
            <text:p>8.38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214055" calcext:value-type="float">
            <text:p>0.2140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33893" calcext:value-type="float">
            <text:p>0.033893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2.485017" calcext:value-type="float">
            <text:p>12.4850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30.502626" calcext:value-type="float">
            <text:p>30.5026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0.581951" calcext:value-type="float">
            <text:p>10.581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267898" calcext:value-type="float">
            <text:p>0.26789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38656" calcext:value-type="float">
            <text:p>0.038656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5.786796" calcext:value-type="float">
            <text:p>15.7867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8.979947" calcext:value-type="float">
            <text:p>38.9799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126435" calcext:value-type="float">
            <text:p>13.126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32773" calcext:value-type="float">
            <text:p>0.327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48728" calcext:value-type="float">
            <text:p>0.048728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9.632117" calcext:value-type="float">
            <text:p>19.6321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9.210608" calcext:value-type="float">
            <text:p>49.21060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046404" calcext:value-type="float">
            <text:p>16.0464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393616" calcext:value-type="float">
            <text:p>0.3936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53801" calcext:value-type="float">
            <text:p>0.053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4.128931" calcext:value-type="float">
            <text:p>24.1289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0.819853" calcext:value-type="float">
            <text:p>60.81985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9.150559" calcext:value-type="float">
            <text:p>19.1505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hardware sin/cos, after fix combineImmediates()</text:p>
          </table:table-cell>
          <table:table-cell table:number-columns-repeated="1023"/>
        </table:table-row>
        <table:table-row table:style-name="ro1">
          <table:table-cell office:value-type="float" office:value="20210411" calcext:value-type="float">
            <text:p>20210411</text:p>
          </table:table-cell>
          <table:table-cell office:value-type="string" calcext:value-type="string">
            <text:p>b9f7607</text:p>
          </table:table-cell>
          <table:table-cell table:style-name="Default"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33693" calcext:value-type="float">
            <text:p>0.23369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263" calcext:value-type="float">
            <text:p>0.0032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134" calcext:value-type="float">
            <text:p>0.003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30445" calcext:value-type="float">
            <text:p>0.23044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419" calcext:value-type="float">
            <text:p>0.0044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693" calcext:value-type="float">
            <text:p>0.003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87842" calcext:value-type="float">
            <text:p>0.1878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383" calcext:value-type="float">
            <text:p>0.0033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632458" calcext:value-type="float">
            <text:p>0.6324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62" calcext:value-type="float">
            <text:p>0.00456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1.069293" calcext:value-type="float">
            <text:p>1.0692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7029" calcext:value-type="float">
            <text:p>0.00702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226" calcext:value-type="float">
            <text:p>0.0042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72622" calcext:value-type="float">
            <text:p>0.7262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297" calcext:value-type="float">
            <text:p>0.00629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722" calcext:value-type="float">
            <text:p>0.0037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08654" calcext:value-type="float">
            <text:p>1.30865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6828" calcext:value-type="float">
            <text:p>0.00682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534454" calcext:value-type="float">
            <text:p>2.53445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7567" calcext:value-type="float">
            <text:p>0.0175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713" calcext:value-type="float">
            <text:p>0.0067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419073" calcext:value-type="float">
            <text:p>1.4190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5213" calcext:value-type="float">
            <text:p>0.01521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5821" calcext:value-type="float">
            <text:p>0.0058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284412" calcext:value-type="float">
            <text:p>2.28441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09293" calcext:value-type="float">
            <text:p>0.00929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262" calcext:value-type="float">
            <text:p>0.0042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641444" calcext:value-type="float">
            <text:p>4.64144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31501" calcext:value-type="float">
            <text:p>0.0315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7824" calcext:value-type="float">
            <text:p>0.007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440048" calcext:value-type="float">
            <text:p>2.44004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7051" calcext:value-type="float">
            <text:p>0.0270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805" calcext:value-type="float">
            <text:p>0.006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600694" calcext:value-type="float">
            <text:p>3.60069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2819" calcext:value-type="float">
            <text:p>0.012819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5121" calcext:value-type="float">
            <text:p>0.0051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.595735" calcext:value-type="float">
            <text:p>7.595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51777" calcext:value-type="float">
            <text:p>0.05177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807" calcext:value-type="float">
            <text:p>0.0118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795593" calcext:value-type="float">
            <text:p>3.79559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4434" calcext:value-type="float">
            <text:p>0.04443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0335" calcext:value-type="float">
            <text:p>0.010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275904" calcext:value-type="float">
            <text:p>5.2759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1.544667" calcext:value-type="float">
            <text:p>11.54466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76455" calcext:value-type="float">
            <text:p>0.076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5567" calcext:value-type="float">
            <text:p>0.015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71639" calcext:value-type="float">
            <text:p>5.47163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5779" calcext:value-type="float">
            <text:p>0.0657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4909" calcext:value-type="float">
            <text:p>0.014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7.380059" calcext:value-type="float">
            <text:p>7.38005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6.491252" calcext:value-type="float">
            <text:p>16.49125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7.491412" calcext:value-type="float">
            <text:p>7.49141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9051" calcext:value-type="float">
            <text:p>0.090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9662" calcext:value-type="float">
            <text:p>0.0196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.917256" calcext:value-type="float">
            <text:p>9.9172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2.628417" calcext:value-type="float">
            <text:p>22.6284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.891461" calcext:value-type="float">
            <text:p>9.89146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119858" calcext:value-type="float">
            <text:p>0.1198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878" calcext:value-type="float">
            <text:p>0.01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.960022" calcext:value-type="float">
            <text:p>12.960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29.972836" calcext:value-type="float">
            <text:p>29.9728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.724494" calcext:value-type="float">
            <text:p>12.72449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53304" calcext:value-type="float">
            <text:p>0.1533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25099" calcext:value-type="float">
            <text:p>0.025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.518452" calcext:value-type="float">
            <text:p>16.5184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38.783405" calcext:value-type="float">
            <text:p>38.78340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.010569" calcext:value-type="float">
            <text:p>16.0105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91492" calcext:value-type="float">
            <text:p>0.1914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7739" calcext:value-type="float">
            <text:p>0.027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0.622666" calcext:value-type="float">
            <text:p>20.6226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49.004652" calcext:value-type="float">
            <text:p>49.00465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9.742452" calcext:value-type="float">
            <text:p>19.7424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233613" calcext:value-type="float">
            <text:p>0.23361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35538" calcext:value-type="float">
            <text:p>0.0355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25.360197" calcext:value-type="float">
            <text:p>25.36019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61.10497" calcext:value-type="float">
            <text:p>61.1049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23.888499" calcext:value-type="float">
            <text:p>23.88849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80455" calcext:value-type="float">
            <text:p>0.2804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39354" calcext:value-type="float">
            <text:p>0.0393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8" office:value-type="string" calcext:value-type="string">
            <text:p>DFT compile times</text:p>
          </table:table-cell>
          <table:table-cell table:number-columns-repeated="1023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08134" calcext:value-type="float">
            <text:p>0.108134</text:p>
          </table:table-cell>
          <table:table-cell office:value-type="string" calcext:value-type="string">
            <text:p>compile matrix mult</text:p>
          </table:table-cell>
          <table:table-cell table:number-columns-repeated="2"/>
          <table:table-cell office:value-type="string" calcext:value-type="string">
            <text:p>Inline floa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93857" calcext:value-type="float">
            <text:p>0.093857</text:p>
          </table:table-cell>
          <table:table-cell office:value-type="string" calcext:value-type="string">
            <text:p>compile inline compl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office:value-type="float" office:value="753" calcext:value-type="float">
            <text:p>753</text:p>
          </table:table-cell>
          <table:table-cell office:value-type="float" office:value="784" calcext:value-type="float">
            <text:p>784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71671" calcext:value-type="float">
            <text:p>0.071671</text:p>
          </table:table-cell>
          <table:table-cell office:value-type="string" calcext:value-type="string">
            <text:p>compile inline float</text:p>
          </table:table-cell>
          <table:table-cell/>
          <table:table-cell office:value-type="string" calcext:value-type="string">
            <text:p>pi4</text:p>
          </table:table-cell>
          <table:table-cell office:value-type="float" office:value="0.071671" calcext:value-type="float">
            <text:p>0.071671</text:p>
          </table:table-cell>
          <table:table-cell/>
          <table:table-cell office:value-type="float" office:value="0.251943" calcext:value-type="float">
            <text:p>0.251943</text:p>
          </table:table-cell>
          <table:table-cell/>
          <table:table-cell office:value-type="float" office:value="0.562059" calcext:value-type="float">
            <text:p>0.562059</text:p>
          </table:table-cell>
          <table:table-cell/>
          <table:table-cell office:value-type="float" office:value="1.023402" calcext:value-type="float">
            <text:p>1.023402</text:p>
          </table:table-cell>
          <table:table-cell/>
          <table:table-cell office:value-type="float" office:value="1.652271" calcext:value-type="float">
            <text:p>1.652271</text:p>
          </table:table-cell>
          <table:table-cell/>
          <table:table-cell office:value-type="float" office:value="2.500869" calcext:value-type="float">
            <text:p>2.500869</text:p>
          </table:table-cell>
          <table:table-cell/>
          <table:table-cell office:value-type="float" office:value="3.748443" calcext:value-type="float">
            <text:p>3.748443</text:p>
          </table:table-cell>
          <table:table-cell/>
          <table:table-cell office:value-type="float" office:value="5.309578" calcext:value-type="float">
            <text:p>5.309578</text:p>
          </table:table-cell>
          <table:table-cell/>
          <table:table-cell office:value-type="float" office:value="7.351509" calcext:value-type="float">
            <text:p>7.351509</text:p>
          </table:table-cell>
          <table:table-cell/>
          <table:table-cell office:value-type="float" office:value="9.894971" calcext:value-type="float">
            <text:p>9.894971</text:p>
          </table:table-cell>
          <table:table-cell/>
          <table:table-cell office:value-type="float" office:value="13.086277" calcext:value-type="float">
            <text:p>13.086277</text:p>
          </table:table-cell>
          <table:table-cell/>
          <table:table-cell office:value-type="float" office:value="16.850435" calcext:value-type="float">
            <text:p>16.850435</text:p>
          </table:table-cell>
          <table:table-cell/>
          <table:table-cell office:value-type="float" office:value="21.465481" calcext:value-type="float">
            <text:p>21.465481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345686" calcext:value-type="float">
            <text:p>0.345686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pi3</text:p>
          </table:table-cell>
          <table:table-cell office:value-type="float" office:value="0.452014" calcext:value-type="float">
            <text:p>0.452014</text:p>
          </table:table-cell>
          <table:table-cell office:value-type="float" office:value="1.524951" calcext:value-type="float">
            <text:p>1.524951</text:p>
          </table:table-cell>
          <table:table-cell office:value-type="float" office:value="3.056426" calcext:value-type="float">
            <text:p>3.056426</text:p>
          </table:table-cell>
          <table:table-cell office:value-type="float" office:value="5.204508" calcext:value-type="float">
            <text:p>5.204508</text:p>
          </table:table-cell>
          <table:table-cell office:value-type="float" office:value="8.006829" calcext:value-type="float">
            <text:p>8.006829</text:p>
          </table:table-cell>
          <table:table-cell office:value-type="float" office:value="11.719279" calcext:value-type="float">
            <text:p>11.719279</text:p>
          </table:table-cell>
          <table:table-cell office:value-type="float" office:value="16.237323" calcext:value-type="float">
            <text:p>16.237323</text:p>
          </table:table-cell>
          <table:table-cell office:value-type="float" office:value="21.837356" calcext:value-type="float">
            <text:p>21.837356</text:p>
          </table:table-cell>
          <table:table-cell office:value-type="float" office:value="28.609456" calcext:value-type="float">
            <text:p>28.609456</text:p>
          </table:table-cell>
          <table:table-cell office:value-type="float" office:value="36.66401" calcext:value-type="float">
            <text:p>36.66401</text:p>
          </table:table-cell>
          <table:table-cell office:value-type="float" office:value="46.134142" calcext:value-type="float">
            <text:p>46.134142</text:p>
          </table:table-cell>
          <table:table-cell office:value-type="float" office:value="56.594752" calcext:value-type="float">
            <text:p>56.594752</text:p>
          </table:table-cell>
          <table:table-cell office:value-type="float" office:value="69.179324" calcext:value-type="float">
            <text:p>69.179324</text:p>
          </table:table-cell>
          <table:table-cell office:value-type="float" office:value="83.576478" calcext:value-type="float">
            <text:p>83.576478</text:p>
          </table:table-cell>
          <table:table-cell office:value-type="float" office:value="99.942624" calcext:value-type="float">
            <text:p>99.942624</text:p>
          </table:table-cell>
          <table:table-cell office:value-type="float" office:value="118.398273" calcext:value-type="float">
            <text:p>118.398273</text:p>
          </table:table-cell>
          <table:table-cell office:value-type="float" office:value="139.108634" calcext:value-type="float">
            <text:p>139.108634</text:p>
          </table:table-cell>
          <table:table-cell office:value-type="float" office:value="162.249476" calcext:value-type="float">
            <text:p>162.249476</text:p>
          </table:table-cell>
          <table:table-cell office:value-type="float" office:value="187.951824" calcext:value-type="float">
            <text:p>187.951824</text:p>
          </table:table-cell>
          <table:table-cell office:value-type="float" office:value="216.437811" calcext:value-type="float">
            <text:p>216.437811</text:p>
          </table:table-cell>
          <table:table-cell office:value-type="float" office:value="247.852676" calcext:value-type="float">
            <text:p>247.852676</text:p>
          </table:table-cell>
          <table:table-cell office:value-type="float" office:value="282.01021" calcext:value-type="float">
            <text:p>282.01021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8047" calcext:value-type="float">
            <text:p>0.48047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string" calcext:value-type="string">
            <text:p>pi3 std::set</text:p>
          </table:table-cell>
          <table:table-cell office:value-type="float" office:value="0.548715" calcext:value-type="float">
            <text:p>0.548715</text:p>
          </table:table-cell>
          <table:table-cell office:value-type="float" office:value="1.567364" calcext:value-type="float">
            <text:p>1.567364</text:p>
          </table:table-cell>
          <table:table-cell office:value-type="float" office:value="2.777147" calcext:value-type="float">
            <text:p>2.777147</text:p>
          </table:table-cell>
          <table:table-cell office:value-type="float" office:value="4.236371" calcext:value-type="float">
            <text:p>4.236371</text:p>
          </table:table-cell>
          <table:table-cell/>
          <table:table-cell office:value-type="float" office:value="7.92113" calcext:value-type="float">
            <text:p>7.92113</text:p>
          </table:table-cell>
          <table:table-cell office:value-type="float" office:value="10.181178" calcext:value-type="float">
            <text:p>10.181178</text:p>
          </table:table-cell>
          <table:table-cell office:value-type="float" office:value="12.783973" calcext:value-type="float">
            <text:p>12.783973</text:p>
          </table:table-cell>
          <table:table-cell office:value-type="float" office:value="15.696467" calcext:value-type="float">
            <text:p>15.696467</text:p>
          </table:table-cell>
          <table:table-cell office:value-type="float" office:value="18.885156" calcext:value-type="float">
            <text:p>18.885156</text:p>
          </table:table-cell>
          <table:table-cell table:number-columns-repeated="2" office:value-type="float" office:value="22.539911" calcext:value-type="float">
            <text:p>22.539911</text:p>
          </table:table-cell>
          <table:table-cell office:value-type="float" office:value="30.976053" calcext:value-type="float">
            <text:p>30.976053</text:p>
          </table:table-cell>
          <table:table-cell office:value-type="float" office:value="35.749879" calcext:value-type="float">
            <text:p>35.749879</text:p>
          </table:table-cell>
          <table:table-cell office:value-type="float" office:value="40.951506" calcext:value-type="float">
            <text:p>40.951506</text:p>
          </table:table-cell>
          <table:table-cell office:value-type="float" office:value="46.634502" calcext:value-type="float">
            <text:p>46.634502</text:p>
          </table:table-cell>
          <table:table-cell office:value-type="float" office:value="52.886342" calcext:value-type="float">
            <text:p>52.886342</text:p>
          </table:table-cell>
          <table:table-cell office:value-type="float" office:value="59.292052" calcext:value-type="float">
            <text:p>59.292052</text:p>
          </table:table-cell>
          <table:table-cell office:value-type="float" office:value="66.613522" calcext:value-type="float">
            <text:p>66.613522</text:p>
          </table:table-cell>
          <table:table-cell office:value-type="float" office:value="74.265161" calcext:value-type="float">
            <text:p>74.265161</text:p>
          </table:table-cell>
          <table:table-cell office:value-type="float" office:value="82.522381" calcext:value-type="float">
            <text:p>82.522381</text:p>
          </table:table-cell>
          <table:table-cell office:value-type="float" office:value="90.893683" calcext:value-type="float">
            <text:p>90.893683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251943" calcext:value-type="float">
            <text:p>0.251943</text:p>
          </table:table-cell>
          <table:table-cell office:value-type="string" calcext:value-type="string">
            <text:p>compile inline float</text:p>
          </table:table-cell>
          <table:table-cell/>
          <table:table-cell office:value-type="string" calcext:value-type="string">
            <text:p>pi3 vector&lt;bool&gt;</text:p>
          </table:table-cell>
          <table:table-cell office:value-type="float" office:value="3.542172" calcext:value-type="float">
            <text:p>3.542172</text:p>
          </table:table-cell>
          <table:table-cell office:value-type="float" office:value="15.492613" calcext:value-type="float">
            <text:p>15.492613</text:p>
          </table:table-cell>
          <table:table-cell office:value-type="float" office:value="36.689946" calcext:value-type="float">
            <text:p>36.689946</text:p>
          </table:table-cell>
          <table:table-cell office:value-type="float" office:value="67.681207" calcext:value-type="float">
            <text:p>67.681207</text:p>
          </table:table-cell>
          <table:table-cell office:value-type="float" office:value="109.390974" calcext:value-type="float">
            <text:p>109.390974</text:p>
          </table:table-cell>
          <table:table-cell office:value-type="float" office:value="162.608564" calcext:value-type="float">
            <text:p>162.608564</text:p>
          </table:table-cell>
          <table:table-cell office:value-type="float" office:value="228.15349" calcext:value-type="float">
            <text:p>228.15349</text:p>
          </table:table-cell>
          <table:table-cell office:value-type="float" office:value="306.705142" calcext:value-type="float">
            <text:p>306.705142</text:p>
          </table:table-cell>
          <table:table-cell office:value-type="float" office:value="399.127678" calcext:value-type="float">
            <text:p>399.127678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860496" calcext:value-type="float">
            <text:p>0.8604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59903" calcext:value-type="float">
            <text:p>1.359903</text:p>
          </table:table-cell>
          <table:table-cell office:value-type="string" calcext:value-type="string">
            <text:p>compile inline complex</text:p>
          </table:table-cell>
          <table:table-cell table:number-columns-repeated="2"/>
          <table:table-cell>
            <draw:frame draw:z-index="3" draw:style-name="gr1" draw:text-style-name="P1" svg:width="7.774in" svg:height="4.3921in" svg:x="0.3059in" svg:y="0.1465in">
              <draw:object draw:notify-on-update-of-ranges="Timing.J928:Timing.AE928 Timing.I929:Timing.I929 Timing.J929:Timing.AE929 Timing.I930:Timing.I930 Timing.J930:Timing.AE930 Timing.I931:Timing.I931 Timing.J931:Timing.AE93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562059" calcext:value-type="float">
            <text:p>0.5620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790762" calcext:value-type="float">
            <text:p>1.79076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027426" calcext:value-type="float">
            <text:p>3.0274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023402" calcext:value-type="float">
            <text:p>1.0234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263643" calcext:value-type="float">
            <text:p>3.2636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62536" calcext:value-type="float">
            <text:p>5.6625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.652271" calcext:value-type="float">
            <text:p>1.6522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06821" calcext:value-type="float">
            <text:p>5.406821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Starts failing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9.736214" calcext:value-type="float">
            <text:p>9.73621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.500869" calcext:value-type="float">
            <text:p>2.5008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8.667704" calcext:value-type="float">
            <text:p>8.6677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5.647603" calcext:value-type="float">
            <text:p>15.647603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string" calcext:value-type="string">
            <text:p>Starts failing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.748443" calcext:value-type="float">
            <text:p>3.74844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985531" calcext:value-type="float">
            <text:p>12.9855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3.937595" calcext:value-type="float">
            <text:p>23.93759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5.309578" calcext:value-type="float">
            <text:p>5.3095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8.881884" calcext:value-type="float">
            <text:p>18.88188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35.309483" calcext:value-type="float">
            <text:p>35.30948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7.351509" calcext:value-type="float">
            <text:p>7.35150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6.450355" calcext:value-type="float">
            <text:p>26.4503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50.017798" calcext:value-type="float">
            <text:p>50.0177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9.894971" calcext:value-type="float">
            <text:p>9.8949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6.184723" calcext:value-type="float">
            <text:p>36.1847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69.241789" calcext:value-type="float">
            <text:p>69.24178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086277" calcext:value-type="float">
            <text:p>13.08627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8.388291" calcext:value-type="float">
            <text:p>48.38829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92.834711" calcext:value-type="float">
            <text:p>92.8347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850435" calcext:value-type="float">
            <text:p>16.850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3.087558" calcext:value-type="float">
            <text:p>63.0875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23.380086" calcext:value-type="float">
            <text:p>123.3800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1.465481" calcext:value-type="float">
            <text:p>21.4654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56243" calcext:value-type="float">
            <text:p>0.2562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03181" calcext:value-type="float">
            <text:p>0.60318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452014" calcext:value-type="float">
            <text:p>0.45201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00864" calcext:value-type="float">
            <text:p>0.50086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424599" calcext:value-type="float">
            <text:p>2.4245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24951" calcext:value-type="float">
            <text:p>1.524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85607" calcext:value-type="float">
            <text:p>0.88560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5.577731" calcext:value-type="float">
            <text:p>5.5777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.056426" calcext:value-type="float">
            <text:p>3.05642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443855" calcext:value-type="float">
            <text:p>1.4438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0.533942" calcext:value-type="float">
            <text:p>10.53394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5.204508" calcext:value-type="float">
            <text:p>5.20450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211022" calcext:value-type="float">
            <text:p>2.211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7.728735" calcext:value-type="float">
            <text:p>17.728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8.006829" calcext:value-type="float">
            <text:p>8.00682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3.230349" calcext:value-type="float">
            <text:p>3.2303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7.672593" calcext:value-type="float">
            <text:p>27.6725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1.719279" calcext:value-type="float">
            <text:p>11.7192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563536" calcext:value-type="float">
            <text:p>4.56353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0.94717" calcext:value-type="float">
            <text:p>40.947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6.237323" calcext:value-type="float">
            <text:p>16.23732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6.255031" calcext:value-type="float">
            <text:p>6.2550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58.07439" calcext:value-type="float">
            <text:p>58.0743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1.837356" calcext:value-type="float">
            <text:p>21.8373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8.371566" calcext:value-type="float">
            <text:p>8.3715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9.65955" calcext:value-type="float">
            <text:p>79.65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8.609456" calcext:value-type="float">
            <text:p>28.6094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.973577" calcext:value-type="float">
            <text:p>10.97357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6.464446" calcext:value-type="float">
            <text:p>106.46444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6.66401" calcext:value-type="float">
            <text:p>36.6640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4.093756" calcext:value-type="float">
            <text:p>14.0937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38.920557" calcext:value-type="float">
            <text:p>138.9205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134142" calcext:value-type="float">
            <text:p>46.134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.870417" calcext:value-type="float">
            <text:p>17.8704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7.339287" calcext:value-type="float">
            <text:p>177.33928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6.594752" calcext:value-type="float">
            <text:p>56.5947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.157695" calcext:value-type="float">
            <text:p>22.1576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2.538513" calcext:value-type="float">
            <text:p>222.5385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9.179324" calcext:value-type="float">
            <text:p>69.1793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.375681" calcext:value-type="float">
            <text:p>27.37568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6.495961" calcext:value-type="float">
            <text:p>276.4959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83.576478" calcext:value-type="float">
            <text:p>83.5764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.452267" calcext:value-type="float">
            <text:p>33.4522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9.358913" calcext:value-type="float">
            <text:p>339.3589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9.942624" calcext:value-type="float">
            <text:p>99.9426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0.473809" calcext:value-type="float">
            <text:p>40.47380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11.869138" calcext:value-type="float">
            <text:p>411.8691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18.398273" calcext:value-type="float">
            <text:p>118.3982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8.540414" calcext:value-type="float">
            <text:p>48.5404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94.878709" calcext:value-type="float">
            <text:p>494.8787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39.108634" calcext:value-type="float">
            <text:p>139.10863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7.742025" calcext:value-type="float">
            <text:p>57.7420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89.414643" calcext:value-type="float">
            <text:p>589.414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62.249476" calcext:value-type="float">
            <text:p>162.24947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8.187903" calcext:value-type="float">
            <text:p>68.18790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96.302972" calcext:value-type="float">
            <text:p>696.30297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87.951824" calcext:value-type="float">
            <text:p>187.9518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9.979221" calcext:value-type="float">
            <text:p>79.9792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816.610247" calcext:value-type="float">
            <text:p>816.6102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16.437811" calcext:value-type="float">
            <text:p>216.4378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4.021441" calcext:value-type="float">
            <text:p>94.021441</text:p>
          </table:table-cell>
          <table:table-cell table:style-name="Default" office:value-type="string" calcext:value-type="string">
            <text:p>compile matrix mul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56.073152" calcext:value-type="float">
            <text:p>956.073152</text:p>
          </table:table-cell>
          <table:table-cell table:style-name="Default" office:value-type="string" calcext:value-type="string">
            <text:p>compile inline complex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47.852676" calcext:value-type="float">
            <text:p>247.852676</text:p>
          </table:table-cell>
          <table:table-cell table:style-name="Default" office:value-type="string" calcext:value-type="string">
            <text:p>compile inline floa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08.054925" calcext:value-type="float">
            <text:p>108.054925</text:p>
          </table:table-cell>
          <table:table-cell table:style-name="Default" office:value-type="string" calcext:value-type="string">
            <text:p>compile matrix mul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101.697933" calcext:value-type="float">
            <text:p>1101.69793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82.01021" calcext:value-type="float">
            <text:p>282.0102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office:value-type="float" office:value="20210406" calcext:value-type="float">
            <text:p>20210406</text:p>
          </table:table-cell>
          <table:table-cell office:value-type="string" calcext:value-type="string">
            <text:p>std::set</text:p>
          </table:table-cell>
          <table:table-cell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319104" calcext:value-type="float">
            <text:p>0.3191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79357" calcext:value-type="float">
            <text:p>0.6793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548715" calcext:value-type="float">
            <text:p>0.54871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40302" calcext:value-type="float">
            <text:p>0.540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12517" calcext:value-type="float">
            <text:p>2.125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67364" calcext:value-type="float">
            <text:p>1.5673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37021" calcext:value-type="float">
            <text:p>0.8370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4.094732" calcext:value-type="float">
            <text:p>4.09473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2.777147" calcext:value-type="float">
            <text:p>2.77714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204169" calcext:value-type="float">
            <text:p>1.20416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.602298" calcext:value-type="float">
            <text:p>6.6022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4.236371" calcext:value-type="float">
            <text:p>4.2363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.202637" calcext:value-type="float">
            <text:p>2.202637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Oops 144 missing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3.68643" calcext:value-type="float">
            <text:p>13.68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7.92113" calcext:value-type="float">
            <text:p>7.921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848525" calcext:value-type="float">
            <text:p>2.8485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8.313237" calcext:value-type="float">
            <text:p>18.31323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0.181178" calcext:value-type="float">
            <text:p>10.1811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.601052" calcext:value-type="float">
            <text:p>3.6010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3.831011" calcext:value-type="float">
            <text:p>23.8310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12.783973" calcext:value-type="float">
            <text:p>12.7839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4.473627" calcext:value-type="float">
            <text:p>4.47362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0.321248" calcext:value-type="float">
            <text:p>30.3212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5.696467" calcext:value-type="float">
            <text:p>15.69646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5.459325" calcext:value-type="float">
            <text:p>5.4593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7.896558" calcext:value-type="float">
            <text:p>37.89655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8.885156" calcext:value-type="float">
            <text:p>18.8851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6.555757" calcext:value-type="float">
            <text:p>6.55575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294455" calcext:value-type="float">
            <text:p>46.294455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string" calcext:value-type="string">
            <text:p>compile fail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2.539911" calcext:value-type="float">
            <text:p>22.539911</text:p>
          </table:table-cell>
          <table:table-cell office:value-type="string" calcext:value-type="string">
            <text:p>compile inline float</text:p>
          </table:table-cell>
          <table:table-cell/>
          <table:table-cell office:value-type="string" calcext:value-type="string">
            <text:p>compile fail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7.827474" calcext:value-type="float">
            <text:p>7.82747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5.983386" calcext:value-type="float">
            <text:p>55.9833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26.522679" calcext:value-type="float">
            <text:p>26.5226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9.289152" calcext:value-type="float">
            <text:p>9.2891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7.235856" calcext:value-type="float">
            <text:p>67.23585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0.976053" calcext:value-type="float">
            <text:p>30.97605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10.883658" calcext:value-type="float">
            <text:p>10.8836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79.390131" calcext:value-type="float">
            <text:p>79.3901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35.749879" calcext:value-type="float">
            <text:p>35.7498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616968" calcext:value-type="float">
            <text:p>12.61696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2.831588" calcext:value-type="float">
            <text:p>92.83158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40.951506" calcext:value-type="float">
            <text:p>40.95150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4.526467" calcext:value-type="float">
            <text:p>14.5264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07.745848" calcext:value-type="float">
            <text:p>107.7458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6.634502" calcext:value-type="float">
            <text:p>46.6345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6.631304" calcext:value-type="float">
            <text:p>16.6313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4.018736" calcext:value-type="float">
            <text:p>124.0187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52.886342" calcext:value-type="float">
            <text:p>52.8863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8.936714" calcext:value-type="float">
            <text:p>18.9367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42.047819" calcext:value-type="float">
            <text:p>142.04781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9.292052" calcext:value-type="float">
            <text:p>59.2920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1.434494" calcext:value-type="float">
            <text:p>21.43449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2.561551" calcext:value-type="float">
            <text:p>162.56155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6.613522" calcext:value-type="float">
            <text:p>66.61352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4.158234" calcext:value-type="float">
            <text:p>24.15823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184.204209" calcext:value-type="float">
            <text:p>184.2042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4.265161" calcext:value-type="float">
            <text:p>74.26516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7.071504" calcext:value-type="float">
            <text:p>27.0715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07.592861" calcext:value-type="float">
            <text:p>207.5928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82.522381" calcext:value-type="float">
            <text:p>82.5223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30.26495" calcext:value-type="float">
            <text:p>30.264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33.445901" calcext:value-type="float">
            <text:p>233.44590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90.893683" calcext:value-type="float">
            <text:p>90.89368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visibility="collapse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vector&lt;bool&gt;</text:p>
          </table:table-cell>
          <table:table-cell table:style-name="ce14" office:value-type="string" calcext:value-type="string">
            <text:p>BAD!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3.542172" calcext:value-type="float">
            <text:p>3.54217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5.492613" calcext:value-type="float">
            <text:p>15.4926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6.689946" calcext:value-type="float">
            <text:p>36.689946</text:p>
          </table:table-cell>
          <table:table-cell table:style-name="Default" office:value-type="string" calcext:value-type="string">
            <text:p>compile inline float</text:p>
          </table:table-cell>
          <table:table-cell table:style-name="Default"/>
          <table:table-cell table:number-columns-repeated="1016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7.681207" calcext:value-type="float">
            <text:p>67.68120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09.390974" calcext:value-type="float">
            <text:p>109.39097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62.608564" calcext:value-type="float">
            <text:p>162.6085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28.15349" calcext:value-type="float">
            <text:p>228.1534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06.705142" calcext:value-type="float">
            <text:p>306.705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99.127678" calcext:value-type="float">
            <text:p>399.1276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915" calcext:value-type="float">
            <text:p>0.35591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Block Mult– in unit test, 10 iterations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503" calcext:value-type="float">
            <text:p>20210503</text:p>
          </table:table-cell>
          <table:table-cell table:style-name="Default" office:value-type="string" calcext:value-type="string">
            <text:p>e169efd</text:p>
          </table:table-cell>
          <table:table-cell table:style-name="Default" office:value-type="string" calcext:value-type="string">
            <text:p>silke</text:p>
          </table:table-cell>
          <table:table-cell table:style-name="Default" office:value-type="string" calcext:value-type="string">
            <text:p>pi4-64 <text:s text:c="4"/></text:p>
          </table:table-cell>
          <table:table-cell office:value-type="string" calcext:value-type="string">
            <text:p>-n=0 -d=32</text:p>
          </table:table-cell>
          <table:table-cell office:value-type="float" office:value="0.158161" calcext:value-type="float">
            <text:p>0.158161</text:p>
          </table:table-cell>
          <table:table-cell table:style-name="Default" office:value-type="string" calcext:value-type="string">
            <text:p>compile Full mult</text:p>
          </table:table-cell>
          <table:table-cell table:style-name="ce24" office:value-type="string" calcext:value-type="string">
            <text:p>Commi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  <table:table-cell office:value-type="float" office:value="320" calcext:value-type="float">
            <text:p>320</text:p>
          </table:table-cell>
          <table:table-cell office:value-type="float" office:value="352" calcext:value-type="float">
            <text:p>352</text:p>
          </table:table-cell>
          <table:table-cell office:value-type="float" office:value="384" calcext:value-type="float">
            <text:p>384</text:p>
          </table:table-cell>
          <table:table-cell office:value-type="float" office:value="416" calcext:value-type="float">
            <text:p>416</text:p>
          </table:table-cell>
          <table:table-cell office:value-type="float" office:value="448" calcext:value-type="float">
            <text:p>448</text:p>
          </table:table-cell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office:value-type="float" office:value="544" calcext:value-type="float">
            <text:p>544</text:p>
          </table:table-cell>
          <table:table-cell office:value-type="float" office:value="576" calcext:value-type="float">
            <text:p>576</text:p>
          </table:table-cell>
          <table:table-cell office:value-type="float" office:value="608" calcext:value-type="float">
            <text:p>608</text:p>
          </table:table-cell>
          <table:table-cell office:value-type="float" office:value="640" calcext:value-type="float">
            <text:p>640</text:p>
          </table:table-cell>
          <table:table-cell office:value-type="float" office:value="672" calcext:value-type="float">
            <text:p>672</text:p>
          </table:table-cell>
          <table:table-cell office:value-type="float" office:value="704" calcext:value-type="float">
            <text:p>704</text:p>
          </table:table-cell>
          <table:table-cell office:value-type="float" office:value="736" calcext:value-type="float">
            <text:p>736</text:p>
          </table:table-cell>
          <table:table-cell office:value-type="float" office:value="768" calcext:value-type="float">
            <text:p>768</text:p>
          </table:table-cell>
          <table:table-cell office:value-type="float" office:value="800" calcext:value-type="float">
            <text:p>800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office:value-type="float" office:value="1024" calcext:value-type="float">
            <text:p>1024</text:p>
          </table:table-cell>
          <table:table-cell office:value-type="float" office:value="1056" calcext:value-type="float">
            <text:p>1056</text:p>
          </table:table-cell>
          <table:table-cell office:value-type="float" office:value="1088" calcext:value-type="float">
            <text:p>1088</text:p>
          </table:table-cell>
          <table:table-cell office:value-type="float" office:value="1120" calcext:value-type="float">
            <text:p>1120</text:p>
          </table:table-cell>
          <table:table-cell office:value-type="float" office:value="1152" calcext:value-type="float">
            <text:p>1152</text:p>
          </table:table-cell>
          <table:table-cell office:value-type="float" office:value="1184" calcext:value-type="float">
            <text:p>1184</text:p>
          </table:table-cell>
          <table:table-cell office:value-type="float" office:value="1216" calcext:value-type="float">
            <text:p>1216</text:p>
          </table:table-cell>
          <table:table-cell office:value-type="float" office:value="1248" calcext:value-type="float">
            <text:p>1248</text:p>
          </table:table-cell>
          <table:table-cell office:value-type="float" office:value="1280" calcext:value-type="float">
            <text:p>1280</text:p>
          </table:table-cell>
          <table:table-cell office:value-type="float" office:value="1312" calcext:value-type="float">
            <text:p>1312</text:p>
          </table:table-cell>
          <table:table-cell office:value-type="float" office:value="1344" calcext:value-type="float">
            <text:p>1344</text:p>
          </table:table-cell>
          <table:table-cell office:value-type="float" office:value="1376" calcext:value-type="float">
            <text:p>1376</text:p>
          </table:table-cell>
          <table:table-cell office:value-type="float" office:value="1408" calcext:value-type="float">
            <text:p>1408</text:p>
          </table:table-cell>
          <table:table-cell office:value-type="float" office:value="1440" calcext:value-type="float">
            <text:p>1440</text:p>
          </table:table-cell>
          <table:table-cell office:value-type="float" office:value="1472" calcext:value-type="float">
            <text:p>1472</text:p>
          </table:table-cell>
          <table:table-cell office:value-type="float" office:value="1504" calcext:value-type="float">
            <text:p>1504</text:p>
          </table:table-cell>
          <table:table-cell table:number-columns-repeated="968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32</text:p>
          </table:table-cell>
          <table:table-cell office:value-type="float" office:value="0.008195" calcext:value-type="float">
            <text:p>0.008195</text:p>
          </table:table-cell>
          <table:table-cell table:style-name="Default" office:value-type="string" calcext:value-type="string">
            <text:p>Full mult</text:p>
          </table:table-cell>
          <table:table-cell table:style-name="Default" office:value-type="string" calcext:value-type="string">
            <text:p>e169efd</text:p>
          </table:table-cell>
          <table:table-cell office:value-type="string" calcext:value-type="string">
            <text:p>P3 full -n=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51555" calcext:value-type="float">
            <text:p>0.051555</text:p>
          </table:table-cell>
          <table:table-cell office:value-type="float" office:value="0.149366" calcext:value-type="float">
            <text:p>0.149366</text:p>
          </table:table-cell>
          <table:table-cell office:value-type="float" office:value="0.295973" calcext:value-type="float">
            <text:p>0.295973</text:p>
          </table:table-cell>
          <table:table-cell office:value-type="float" office:value="0.510172" calcext:value-type="float">
            <text:p>0.510172</text:p>
          </table:table-cell>
          <table:table-cell office:value-type="float" office:value="0.847281" calcext:value-type="float">
            <text:p>0.847281</text:p>
          </table:table-cell>
          <table:table-cell office:value-type="float" office:value="1.257056" calcext:value-type="float">
            <text:p>1.257056</text:p>
          </table:table-cell>
          <table:table-cell office:value-type="float" office:value="1.897499" calcext:value-type="float">
            <text:p>1.897499</text:p>
          </table:table-cell>
          <table:table-cell office:value-type="float" office:value="2.419644" calcext:value-type="float">
            <text:p>2.419644</text:p>
          </table:table-cell>
          <table:table-cell office:value-type="float" office:value="3.549483" calcext:value-type="float">
            <text:p>3.549483</text:p>
          </table:table-cell>
          <table:table-cell office:value-type="float" office:value="4.652257" calcext:value-type="float">
            <text:p>4.652257</text:p>
          </table:table-cell>
          <table:table-cell office:value-type="float" office:value="6.023474" calcext:value-type="float">
            <text:p>6.023474</text:p>
          </table:table-cell>
          <table:table-cell office:value-type="float" office:value="7.43767" calcext:value-type="float">
            <text:p>7.43767</text:p>
          </table:table-cell>
          <table:table-cell office:value-type="float" office:value="8.91678" calcext:value-type="float">
            <text:p>8.91678</text:p>
          </table:table-cell>
          <table:table-cell office:value-type="float" office:value="10.798172" calcext:value-type="float">
            <text:p>10.798172</text:p>
          </table:table-cell>
          <table:table-cell office:value-type="float" office:value="13.133143" calcext:value-type="float">
            <text:p>13.133143</text:p>
          </table:table-cell>
          <table:table-cell office:value-type="float" office:value="15.184273" calcext:value-type="float">
            <text:p>15.184273</text:p>
          </table:table-cell>
          <table:table-cell office:value-type="float" office:value="17.453051" calcext:value-type="float">
            <text:p>17.453051</text:p>
          </table:table-cell>
          <table:table-cell office:value-type="float" office:value="20.335482" calcext:value-type="float">
            <text:p>20.335482</text:p>
          </table:table-cell>
          <table:table-cell office:value-type="float" office:value="23.861704" calcext:value-type="float">
            <text:p>23.861704</text:p>
          </table:table-cell>
          <table:table-cell office:value-type="float" office:value="24.089616" calcext:value-type="float">
            <text:p>24.089616</text:p>
          </table:table-cell>
          <table:table-cell office:value-type="float" office:value="26.899864" calcext:value-type="float">
            <text:p>26.899864</text:p>
          </table:table-cell>
          <table:table-cell office:value-type="float" office:value="30.480137" calcext:value-type="float">
            <text:p>30.480137</text:p>
          </table:table-cell>
          <table:table-cell office:value-type="float" office:value="34.290126" calcext:value-type="float">
            <text:p>34.290126</text:p>
          </table:table-cell>
          <table:table-cell office:value-type="float" office:value="38.34086" calcext:value-type="float">
            <text:p>38.34086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32</text:p>
          </table:table-cell>
          <table:table-cell office:value-type="float" office:value="0.002218" calcext:value-type="float">
            <text:p>0.002218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3 full -n=4</text:p>
          </table:table-cell>
          <table:table-cell office:value-type="float" office:value="0.005818" calcext:value-type="float">
            <text:p>0.005818</text:p>
          </table:table-cell>
          <table:table-cell office:value-type="float" office:value="0.019993" calcext:value-type="float">
            <text:p>0.019993</text:p>
          </table:table-cell>
          <table:table-cell office:value-type="float" office:value="0.059048" calcext:value-type="float">
            <text:p>0.059048</text:p>
          </table:table-cell>
          <table:table-cell office:value-type="float" office:value="0.113209" calcext:value-type="float">
            <text:p>0.113209</text:p>
          </table:table-cell>
          <table:table-cell office:value-type="float" office:value="0.262411" calcext:value-type="float">
            <text:p>0.262411</text:p>
          </table:table-cell>
          <table:table-cell office:value-type="float" office:value="0.446527" calcext:value-type="float">
            <text:p>0.446527</text:p>
          </table:table-cell>
          <table:table-cell office:value-type="float" office:value="0.628131" calcext:value-type="float">
            <text:p>0.628131</text:p>
          </table:table-cell>
          <table:table-cell office:value-type="float" office:value="0.934243" calcext:value-type="float">
            <text:p>0.934243</text:p>
          </table:table-cell>
          <table:table-cell office:value-type="float" office:value="1.31319" calcext:value-type="float">
            <text:p>1.31319</text:p>
          </table:table-cell>
          <table:table-cell office:value-type="float" office:value="1.733" calcext:value-type="float">
            <text:p>1.733</text:p>
          </table:table-cell>
          <table:table-cell office:value-type="float" office:value="2.138285" calcext:value-type="float">
            <text:p>2.138285</text:p>
          </table:table-cell>
          <table:table-cell office:value-type="float" office:value="2.837682" calcext:value-type="float">
            <text:p>2.837682</text:p>
          </table:table-cell>
          <table:table-cell office:value-type="float" office:value="3.566144" calcext:value-type="float">
            <text:p>3.566144</text:p>
          </table:table-cell>
          <table:table-cell office:value-type="float" office:value="4.284831" calcext:value-type="float">
            <text:p>4.284831</text:p>
          </table:table-cell>
          <table:table-cell office:value-type="float" office:value="4.89005" calcext:value-type="float">
            <text:p>4.89005</text:p>
          </table:table-cell>
          <table:table-cell office:value-type="float" office:value="5.992877" calcext:value-type="float">
            <text:p>5.992877</text:p>
          </table:table-cell>
          <table:table-cell office:value-type="float" office:value="6.8648" calcext:value-type="float">
            <text:p>6.8648</text:p>
          </table:table-cell>
          <table:table-cell office:value-type="float" office:value="8.848187" calcext:value-type="float">
            <text:p>8.848187</text:p>
          </table:table-cell>
          <table:table-cell office:value-type="float" office:value="9.134333" calcext:value-type="float">
            <text:p>9.134333</text:p>
          </table:table-cell>
          <table:table-cell office:value-type="float" office:value="11.169195" calcext:value-type="float">
            <text:p>11.169195</text:p>
          </table:table-cell>
          <table:table-cell office:value-type="float" office:value="11.684691" calcext:value-type="float">
            <text:p>11.684691</text:p>
          </table:table-cell>
          <table:table-cell office:value-type="float" office:value="12.746624" calcext:value-type="float">
            <text:p>12.746624</text:p>
          </table:table-cell>
          <table:table-cell office:value-type="float" office:value="14.38107" calcext:value-type="float">
            <text:p>14.38107</text:p>
          </table:table-cell>
          <table:table-cell office:value-type="float" office:value="16.172447" calcext:value-type="float">
            <text:p>16.172447</text:p>
          </table:table-cell>
          <table:table-cell office:value-type="float" office:value="18.105789" calcext:value-type="float">
            <text:p>18.105789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32</text:p>
          </table:table-cell>
          <table:table-cell office:value-type="float" office:value="0.233765" calcext:value-type="float">
            <text:p>0.233765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office:value-type="string" calcext:value-type="string">
            <text:p>Pi3 full -n=8</text:p>
          </table:table-cell>
          <table:table-cell office:value-type="float" office:value="0.004658" calcext:value-type="float">
            <text:p>0.004658</text:p>
          </table:table-cell>
          <table:table-cell office:value-type="float" office:value="0.013555" calcext:value-type="float">
            <text:p>0.013555</text:p>
          </table:table-cell>
          <table:table-cell office:value-type="float" office:value="0.032204" calcext:value-type="float">
            <text:p>0.032204</text:p>
          </table:table-cell>
          <table:table-cell office:value-type="float" office:value="0.061115" calcext:value-type="float">
            <text:p>0.061115</text:p>
          </table:table-cell>
          <table:table-cell office:value-type="float" office:value="0.159876" calcext:value-type="float">
            <text:p>0.159876</text:p>
          </table:table-cell>
          <table:table-cell office:value-type="float" office:value="0.255905" calcext:value-type="float">
            <text:p>0.255905</text:p>
          </table:table-cell>
          <table:table-cell office:value-type="float" office:value="0.389945" calcext:value-type="float">
            <text:p>0.389945</text:p>
          </table:table-cell>
          <table:table-cell office:value-type="float" office:value="0.523071" calcext:value-type="float">
            <text:p>0.523071</text:p>
          </table:table-cell>
          <table:table-cell office:value-type="float" office:value="0.749189" calcext:value-type="float">
            <text:p>0.749189</text:p>
          </table:table-cell>
          <table:table-cell office:value-type="float" office:value="1.009492" calcext:value-type="float">
            <text:p>1.009492</text:p>
          </table:table-cell>
          <table:table-cell office:value-type="float" office:value="1.260941" calcext:value-type="float">
            <text:p>1.260941</text:p>
          </table:table-cell>
          <table:table-cell office:value-type="float" office:value="1.621595" calcext:value-type="float">
            <text:p>1.621595</text:p>
          </table:table-cell>
          <table:table-cell office:value-type="float" office:value="2.030462" calcext:value-type="float">
            <text:p>2.030462</text:p>
          </table:table-cell>
          <table:table-cell office:value-type="float" office:value="2.506006" calcext:value-type="float">
            <text:p>2.506006</text:p>
          </table:table-cell>
          <table:table-cell office:value-type="float" office:value="2.727857" calcext:value-type="float">
            <text:p>2.727857</text:p>
          </table:table-cell>
          <table:table-cell office:value-type="float" office:value="3.405782" calcext:value-type="float">
            <text:p>3.405782</text:p>
          </table:table-cell>
          <table:table-cell office:value-type="float" office:value="3.814954" calcext:value-type="float">
            <text:p>3.814954</text:p>
          </table:table-cell>
          <table:table-cell office:value-type="float" office:value="4.252371" calcext:value-type="float">
            <text:p>4.252371</text:p>
          </table:table-cell>
          <table:table-cell office:value-type="float" office:value="4.960841" calcext:value-type="float">
            <text:p>4.960841</text:p>
          </table:table-cell>
          <table:table-cell office:value-type="float" office:value="5.909477" calcext:value-type="float">
            <text:p>5.909477</text:p>
          </table:table-cell>
          <table:table-cell office:value-type="float" office:value="6.149574" calcext:value-type="float">
            <text:p>6.149574</text:p>
          </table:table-cell>
          <table:table-cell office:value-type="float" office:value="6.840235" calcext:value-type="float">
            <text:p>6.840235</text:p>
          </table:table-cell>
          <table:table-cell office:value-type="float" office:value="8.632327" calcext:value-type="float">
            <text:p>8.632327</text:p>
          </table:table-cell>
          <table:table-cell office:value-type="float" office:value="9.171333" calcext:value-type="float">
            <text:p>9.171333</text:p>
          </table:table-cell>
          <table:table-cell office:value-type="float" office:value="9.976311" calcext:value-type="float">
            <text:p>9.976311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32</text:p>
          </table:table-cell>
          <table:table-cell office:value-type="float" office:value="0.014208" calcext:value-type="float">
            <text:p>0.014208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office:value-type="string" calcext:value-type="string">
            <text:p>Pi3 full -n=12</text:p>
          </table:table-cell>
          <table:table-cell office:value-type="float" office:value="0.004392" calcext:value-type="float">
            <text:p>0.004392</text:p>
          </table:table-cell>
          <table:table-cell office:value-type="float" office:value="0.011697" calcext:value-type="float">
            <text:p>0.011697</text:p>
          </table:table-cell>
          <table:table-cell office:value-type="float" office:value="0.026693" calcext:value-type="float">
            <text:p>0.026693</text:p>
          </table:table-cell>
          <table:table-cell office:value-type="float" office:value="0.049156" calcext:value-type="float">
            <text:p>0.049156</text:p>
          </table:table-cell>
          <table:table-cell office:value-type="float" office:value="0.133648" calcext:value-type="float">
            <text:p>0.133648</text:p>
          </table:table-cell>
          <table:table-cell office:value-type="float" office:value="0.214019" calcext:value-type="float">
            <text:p>0.214019</text:p>
          </table:table-cell>
          <table:table-cell office:value-type="float" office:value="0.300714" calcext:value-type="float">
            <text:p>0.300714</text:p>
          </table:table-cell>
          <table:table-cell office:value-type="float" office:value="0.429994" calcext:value-type="float">
            <text:p>0.429994</text:p>
          </table:table-cell>
          <table:table-cell office:value-type="float" office:value="0.569155" calcext:value-type="float">
            <text:p>0.569155</text:p>
          </table:table-cell>
          <table:table-cell office:value-type="float" office:value="0.746288" calcext:value-type="float">
            <text:p>0.746288</text:p>
          </table:table-cell>
          <table:table-cell office:value-type="float" office:value="0.912538" calcext:value-type="float">
            <text:p>0.912538</text:p>
          </table:table-cell>
          <table:table-cell office:value-type="float" office:value="1.234952" calcext:value-type="float">
            <text:p>1.234952</text:p>
          </table:table-cell>
          <table:table-cell office:value-type="float" office:value="1.514788" calcext:value-type="float">
            <text:p>1.514788</text:p>
          </table:table-cell>
          <table:table-cell office:value-type="float" office:value="1.880915" calcext:value-type="float">
            <text:p>1.880915</text:p>
          </table:table-cell>
          <table:table-cell office:value-type="float" office:value="1.884774" calcext:value-type="float">
            <text:p>1.884774</text:p>
          </table:table-cell>
          <table:table-cell office:value-type="float" office:value="2.152213" calcext:value-type="float">
            <text:p>2.152213</text:p>
          </table:table-cell>
          <table:table-cell office:value-type="float" office:value="2.613264" calcext:value-type="float">
            <text:p>2.613264</text:p>
          </table:table-cell>
          <table:table-cell office:value-type="float" office:value="3.033747" calcext:value-type="float">
            <text:p>3.033747</text:p>
          </table:table-cell>
          <table:table-cell office:value-type="float" office:value="3.526375" calcext:value-type="float">
            <text:p>3.526375</text:p>
          </table:table-cell>
          <table:table-cell office:value-type="float" office:value="3.987187" calcext:value-type="float">
            <text:p>3.987187</text:p>
          </table:table-cell>
          <table:table-cell office:value-type="float" office:value="4.257734" calcext:value-type="float">
            <text:p>4.257734</text:p>
          </table:table-cell>
          <table:table-cell office:value-type="float" office:value="4.885092" calcext:value-type="float">
            <text:p>4.885092</text:p>
          </table:table-cell>
          <table:table-cell office:value-type="float" office:value="5.689846" calcext:value-type="float">
            <text:p>5.689846</text:p>
          </table:table-cell>
          <table:table-cell office:value-type="float" office:value="6.469028" calcext:value-type="float">
            <text:p>6.469028</text:p>
          </table:table-cell>
          <table:table-cell office:value-type="float" office:value="7.03932" calcext:value-type="float">
            <text:p>7.03932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32</text:p>
          </table:table-cell>
          <table:table-cell office:value-type="float" office:value="0.00299" calcext:value-type="float">
            <text:p>0.00299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3 block -n=1</text:p>
          </table:table-cell>
          <table:table-cell office:value-type="float" office:value="0.023492" calcext:value-type="float">
            <text:p>0.023492</text:p>
          </table:table-cell>
          <table:table-cell office:value-type="float" office:value="0.090416" calcext:value-type="float">
            <text:p>0.090416</text:p>
          </table:table-cell>
          <table:table-cell office:value-type="float" office:value="0.23245" calcext:value-type="float">
            <text:p>0.23245</text:p>
          </table:table-cell>
          <table:table-cell office:value-type="float" office:value="0.432476" calcext:value-type="float">
            <text:p>0.432476</text:p>
          </table:table-cell>
          <table:table-cell office:value-type="float" office:value="0.811154" calcext:value-type="float">
            <text:p>0.811154</text:p>
          </table:table-cell>
          <table:table-cell office:value-type="float" office:value="0.847281" calcext:value-type="float">
            <text:p>0.847281</text:p>
          </table:table-cell>
          <table:table-cell office:value-type="float" office:value="1.822423" calcext:value-type="float">
            <text:p>1.822423</text:p>
          </table:table-cell>
          <table:table-cell office:value-type="float" office:value="2.653614" calcext:value-type="float">
            <text:p>2.653614</text:p>
          </table:table-cell>
          <table:table-cell office:value-type="float" office:value="3.51391" calcext:value-type="float">
            <text:p>3.51391</text:p>
          </table:table-cell>
          <table:table-cell office:value-type="float" office:value="4.766537" calcext:value-type="float">
            <text:p>4.766537</text:p>
          </table:table-cell>
          <table:table-cell office:value-type="float" office:value="5.941849" calcext:value-type="float">
            <text:p>5.941849</text:p>
          </table:table-cell>
          <table:table-cell office:value-type="float" office:value="7.56293" calcext:value-type="float">
            <text:p>7.56293</text:p>
          </table:table-cell>
          <table:table-cell office:value-type="float" office:value="9.405276" calcext:value-type="float">
            <text:p>9.405276</text:p>
          </table:table-cell>
          <table:table-cell office:value-type="float" office:value="11.213092" calcext:value-type="float">
            <text:p>11.213092</text:p>
          </table:table-cell>
          <table:table-cell office:value-type="float" office:value="13.573387" calcext:value-type="float">
            <text:p>13.573387</text:p>
          </table:table-cell>
          <table:table-cell office:value-type="float" office:value="15.77623" calcext:value-type="float">
            <text:p>15.77623</text:p>
          </table:table-cell>
          <table:table-cell office:value-type="float" office:value="18.750967" calcext:value-type="float">
            <text:p>18.750967</text:p>
          </table:table-cell>
          <table:table-cell office:value-type="float" office:value="21.427746" calcext:value-type="float">
            <text:p>21.427746</text:p>
          </table:table-cell>
          <table:table-cell office:value-type="float" office:value="23.842691" calcext:value-type="float">
            <text:p>23.842691</text:p>
          </table:table-cell>
          <table:table-cell office:value-type="float" office:value="27.837709" calcext:value-type="float">
            <text:p>27.837709</text:p>
          </table:table-cell>
          <table:table-cell office:value-type="float" office:value="30.810301" calcext:value-type="float">
            <text:p>30.810301</text:p>
          </table:table-cell>
          <table:table-cell office:value-type="float" office:value="34.939077" calcext:value-type="float">
            <text:p>34.939077</text:p>
          </table:table-cell>
          <table:table-cell office:value-type="float" office:value="39.012501" calcext:value-type="float">
            <text:p>39.012501</text:p>
          </table:table-cell>
          <table:table-cell office:value-type="float" office:value="43.784555" calcext:value-type="float">
            <text:p>43.784555</text:p>
          </table:table-cell>
          <table:table-cell office:value-type="float" office:value="48.447356" calcext:value-type="float">
            <text:p>48.447356</text:p>
          </table:table-cell>
          <table:table-cell office:value-type="float" office:value="53.973023" calcext:value-type="float">
            <text:p>53.973023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64</text:p>
          </table:table-cell>
          <table:table-cell office:value-type="float" office:value="0.174235" calcext:value-type="float">
            <text:p>0.174235</text:p>
          </table:table-cell>
          <table:table-cell table:style-name="Default" office:value-type="string" calcext:value-type="string">
            <text:p>compile Full mult</text:p>
          </table:table-cell>
          <table:table-cell table:style-name="Default"/>
          <table:table-cell office:value-type="string" calcext:value-type="string">
            <text:p>Pi3 block -n=4</text:p>
          </table:table-cell>
          <table:table-cell office:value-type="float" office:value="0.009959" calcext:value-type="float">
            <text:p>0.009959</text:p>
          </table:table-cell>
          <table:table-cell office:value-type="float" office:value="0.032003" calcext:value-type="float">
            <text:p>0.032003</text:p>
          </table:table-cell>
          <table:table-cell office:value-type="float" office:value="0.074096" calcext:value-type="float">
            <text:p>0.074096</text:p>
          </table:table-cell>
          <table:table-cell office:value-type="float" office:value="0.148374" calcext:value-type="float">
            <text:p>0.148374</text:p>
          </table:table-cell>
          <table:table-cell office:value-type="float" office:value="0.353562" calcext:value-type="float">
            <text:p>0.353562</text:p>
          </table:table-cell>
          <table:table-cell office:value-type="float" office:value="0.446527" calcext:value-type="float">
            <text:p>0.446527</text:p>
          </table:table-cell>
          <table:table-cell office:value-type="float" office:value="0.809925" calcext:value-type="float">
            <text:p>0.809925</text:p>
          </table:table-cell>
          <table:table-cell office:value-type="float" office:value="1.11799" calcext:value-type="float">
            <text:p>1.11799</text:p>
          </table:table-cell>
          <table:table-cell office:value-type="float" office:value="1.453733" calcext:value-type="float">
            <text:p>1.453733</text:p>
          </table:table-cell>
          <table:table-cell office:value-type="float" office:value="1.992679" calcext:value-type="float">
            <text:p>1.992679</text:p>
          </table:table-cell>
          <table:table-cell office:value-type="float" office:value="2.480137" calcext:value-type="float">
            <text:p>2.480137</text:p>
          </table:table-cell>
          <table:table-cell office:value-type="float" office:value="3.249081" calcext:value-type="float">
            <text:p>3.249081</text:p>
          </table:table-cell>
          <table:table-cell office:value-type="float" office:value="3.889204" calcext:value-type="float">
            <text:p>3.889204</text:p>
          </table:table-cell>
          <table:table-cell office:value-type="float" office:value="4.880118" calcext:value-type="float">
            <text:p>4.880118</text:p>
          </table:table-cell>
          <table:table-cell office:value-type="float" office:value="5.152932" calcext:value-type="float">
            <text:p>5.152932</text:p>
          </table:table-cell>
          <table:table-cell office:value-type="float" office:value="6.492736" calcext:value-type="float">
            <text:p>6.492736</text:p>
          </table:table-cell>
          <table:table-cell office:value-type="float" office:value="7.587917" calcext:value-type="float">
            <text:p>7.587917</text:p>
          </table:table-cell>
          <table:table-cell office:value-type="float" office:value="9.138817" calcext:value-type="float">
            <text:p>9.138817</text:p>
          </table:table-cell>
          <table:table-cell office:value-type="float" office:value="10.127571" calcext:value-type="float">
            <text:p>10.127571</text:p>
          </table:table-cell>
          <table:table-cell office:value-type="float" office:value="11.445454" calcext:value-type="float">
            <text:p>11.445454</text:p>
          </table:table-cell>
          <table:table-cell office:value-type="float" office:value="11.985164" calcext:value-type="float">
            <text:p>11.985164</text:p>
          </table:table-cell>
          <table:table-cell office:value-type="float" office:value="13.621269" calcext:value-type="float">
            <text:p>13.621269</text:p>
          </table:table-cell>
          <table:table-cell office:value-type="float" office:value="17.288281" calcext:value-type="float">
            <text:p>17.288281</text:p>
          </table:table-cell>
          <table:table-cell office:value-type="float" office:value="19.293726" calcext:value-type="float">
            <text:p>19.293726</text:p>
          </table:table-cell>
          <table:table-cell office:value-type="float" office:value="21.526641" calcext:value-type="float">
            <text:p>21.526641</text:p>
          </table:table-cell>
          <table:table-cell office:value-type="float" office:value="23.492025" calcext:value-type="float">
            <text:p>23.492025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64</text:p>
          </table:table-cell>
          <table:table-cell office:value-type="float" office:value="0.031683" calcext:value-type="float">
            <text:p>0.031683</text:p>
          </table:table-cell>
          <table:table-cell table:style-name="Default" office:value-type="string" calcext:value-type="string">
            <text:p>Full mult</text:p>
          </table:table-cell>
          <table:table-cell table:style-name="Default"/>
          <table:table-cell office:value-type="string" calcext:value-type="string">
            <text:p>Pi3 block -n=8</text:p>
          </table:table-cell>
          <table:table-cell office:value-type="float" office:value="0.007889" calcext:value-type="float">
            <text:p>0.007889</text:p>
          </table:table-cell>
          <table:table-cell office:value-type="float" office:value="0.020391" calcext:value-type="float">
            <text:p>0.020391</text:p>
          </table:table-cell>
          <table:table-cell office:value-type="float" office:value="0.043102" calcext:value-type="float">
            <text:p>0.043102</text:p>
          </table:table-cell>
          <table:table-cell office:value-type="float" office:value="0.080194" calcext:value-type="float">
            <text:p>0.080194</text:p>
          </table:table-cell>
          <table:table-cell office:value-type="float" office:value="0.186041" calcext:value-type="float">
            <text:p>0.186041</text:p>
          </table:table-cell>
          <table:table-cell office:value-type="float" office:value="0.255905" calcext:value-type="float">
            <text:p>0.255905</text:p>
          </table:table-cell>
          <table:table-cell office:value-type="float" office:value="0.395829" calcext:value-type="float">
            <text:p>0.395829</text:p>
          </table:table-cell>
          <table:table-cell office:value-type="float" office:value="0.540941" calcext:value-type="float">
            <text:p>0.540941</text:p>
          </table:table-cell>
          <table:table-cell office:value-type="float" office:value="0.680672" calcext:value-type="float">
            <text:p>0.680672</text:p>
          </table:table-cell>
          <table:table-cell office:value-type="float" office:value="0.96096" calcext:value-type="float">
            <text:p>0.96096</text:p>
          </table:table-cell>
          <table:table-cell office:value-type="float" office:value="1.392117" calcext:value-type="float">
            <text:p>1.392117</text:p>
          </table:table-cell>
          <table:table-cell office:value-type="float" office:value="1.611516" calcext:value-type="float">
            <text:p>1.611516</text:p>
          </table:table-cell>
          <table:table-cell office:value-type="float" office:value="2.072468" calcext:value-type="float">
            <text:p>2.072468</text:p>
          </table:table-cell>
          <table:table-cell office:value-type="float" office:value="2.485468" calcext:value-type="float">
            <text:p>2.485468</text:p>
          </table:table-cell>
          <table:table-cell office:value-type="float" office:value="2.878172" calcext:value-type="float">
            <text:p>2.878172</text:p>
          </table:table-cell>
          <table:table-cell office:value-type="float" office:value="3.009091" calcext:value-type="float">
            <text:p>3.009091</text:p>
          </table:table-cell>
          <table:table-cell office:value-type="float" office:value="3.766742" calcext:value-type="float">
            <text:p>3.766742</text:p>
          </table:table-cell>
          <table:table-cell office:value-type="float" office:value="4.303339" calcext:value-type="float">
            <text:p>4.303339</text:p>
          </table:table-cell>
          <table:table-cell office:value-type="float" office:value="4.709142" calcext:value-type="float">
            <text:p>4.709142</text:p>
          </table:table-cell>
          <table:table-cell office:value-type="float" office:value="5.685758" calcext:value-type="float">
            <text:p>5.685758</text:p>
          </table:table-cell>
          <table:table-cell office:value-type="float" office:value="6.322344" calcext:value-type="float">
            <text:p>6.322344</text:p>
          </table:table-cell>
          <table:table-cell office:value-type="float" office:value="6.859812" calcext:value-type="float">
            <text:p>6.859812</text:p>
          </table:table-cell>
          <table:table-cell office:value-type="float" office:value="7.854706" calcext:value-type="float">
            <text:p>7.854706</text:p>
          </table:table-cell>
          <table:table-cell office:value-type="float" office:value="9.133705" calcext:value-type="float">
            <text:p>9.133705</text:p>
          </table:table-cell>
          <table:table-cell office:value-type="float" office:value="9.779765" calcext:value-type="float">
            <text:p>9.779765</text:p>
          </table:table-cell>
          <table:table-cell office:value-type="float" office:value="10.549616" calcext:value-type="float">
            <text:p>10.549616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64</text:p>
          </table:table-cell>
          <table:table-cell office:value-type="float" office:value="0.006218" calcext:value-type="float">
            <text:p>0.006218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3 block -n=12</text:p>
          </table:table-cell>
          <table:table-cell office:value-type="float" office:value="0.007405" calcext:value-type="float">
            <text:p>0.007405</text:p>
          </table:table-cell>
          <table:table-cell office:value-type="float" office:value="0.017818" calcext:value-type="float">
            <text:p>0.017818</text:p>
          </table:table-cell>
          <table:table-cell office:value-type="float" office:value="0.033953" calcext:value-type="float">
            <text:p>0.033953</text:p>
          </table:table-cell>
          <table:table-cell office:value-type="float" office:value="0.061906" calcext:value-type="float">
            <text:p>0.061906</text:p>
          </table:table-cell>
          <table:table-cell office:value-type="float" office:value="0.152001" calcext:value-type="float">
            <text:p>0.152001</text:p>
          </table:table-cell>
          <table:table-cell office:value-type="float" office:value="0.214019" calcext:value-type="float">
            <text:p>0.214019</text:p>
          </table:table-cell>
          <table:table-cell office:value-type="float" office:value="0.310008" calcext:value-type="float">
            <text:p>0.310008</text:p>
          </table:table-cell>
          <table:table-cell office:value-type="float" office:value="0.451143" calcext:value-type="float">
            <text:p>0.451143</text:p>
          </table:table-cell>
          <table:table-cell office:value-type="float" office:value="0.43534" calcext:value-type="float">
            <text:p>0.43534</text:p>
          </table:table-cell>
          <table:table-cell office:value-type="float" office:value="0.806895" calcext:value-type="float">
            <text:p>0.806895</text:p>
          </table:table-cell>
          <table:table-cell office:value-type="float" office:value="1.011592" calcext:value-type="float">
            <text:p>1.011592</text:p>
          </table:table-cell>
          <table:table-cell office:value-type="float" office:value="1.241624" calcext:value-type="float">
            <text:p>1.241624</text:p>
          </table:table-cell>
          <table:table-cell office:value-type="float" office:value="1.510554" calcext:value-type="float">
            <text:p>1.510554</text:p>
          </table:table-cell>
          <table:table-cell office:value-type="float" office:value="1.819359" calcext:value-type="float">
            <text:p>1.819359</text:p>
          </table:table-cell>
          <table:table-cell office:value-type="float" office:value="1.681095" calcext:value-type="float">
            <text:p>1.681095</text:p>
          </table:table-cell>
          <table:table-cell office:value-type="float" office:value="2.131472" calcext:value-type="float">
            <text:p>2.131472</text:p>
          </table:table-cell>
          <table:table-cell office:value-type="float" office:value="2.514422" calcext:value-type="float">
            <text:p>2.514422</text:p>
          </table:table-cell>
          <table:table-cell office:value-type="float" office:value="2.836226" calcext:value-type="float">
            <text:p>2.836226</text:p>
          </table:table-cell>
          <table:table-cell office:value-type="float" office:value="3.250722" calcext:value-type="float">
            <text:p>3.250722</text:p>
          </table:table-cell>
          <table:table-cell office:value-type="float" office:value="3.74847" calcext:value-type="float">
            <text:p>3.74847</text:p>
          </table:table-cell>
          <table:table-cell office:value-type="float" office:value="4.196757" calcext:value-type="float">
            <text:p>4.196757</text:p>
          </table:table-cell>
          <table:table-cell office:value-type="float" office:value="4.797926" calcext:value-type="float">
            <text:p>4.797926</text:p>
          </table:table-cell>
          <table:table-cell office:value-type="float" office:value="5.46686" calcext:value-type="float">
            <text:p>5.46686</text:p>
          </table:table-cell>
          <table:table-cell office:value-type="float" office:value="6.088581" calcext:value-type="float">
            <text:p>6.088581</text:p>
          </table:table-cell>
          <table:table-cell office:value-type="float" office:value="6.721509" calcext:value-type="float">
            <text:p>6.721509</text:p>
          </table:table-cell>
          <table:table-cell office:value-type="float" office:value="7.880914" calcext:value-type="float">
            <text:p>7.880914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64</text:p>
          </table:table-cell>
          <table:table-cell office:value-type="float" office:value="0.276149" calcext:value-type="float">
            <text:p>0.276149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office:value-type="string" calcext:value-type="string">
            <text:p>Pi4-64 full -n=1</text:p>
          </table:table-cell>
          <table:table-cell office:value-type="float" office:value="0.008195" calcext:value-type="float">
            <text:p>0.008195</text:p>
          </table:table-cell>
          <table:table-cell office:value-type="float" office:value="0.031683" calcext:value-type="float">
            <text:p>0.031683</text:p>
          </table:table-cell>
          <table:table-cell office:value-type="float" office:value="0.07533" calcext:value-type="float">
            <text:p>0.07533</text:p>
          </table:table-cell>
          <table:table-cell office:value-type="float" office:value="0.145685" calcext:value-type="float">
            <text:p>0.145685</text:p>
          </table:table-cell>
          <table:table-cell office:value-type="float" office:value="0.24717" calcext:value-type="float">
            <text:p>0.24717</text:p>
          </table:table-cell>
          <table:table-cell office:value-type="float" office:value="0.384656" calcext:value-type="float">
            <text:p>0.384656</text:p>
          </table:table-cell>
          <table:table-cell office:value-type="float" office:value="0.563212" calcext:value-type="float">
            <text:p>0.563212</text:p>
          </table:table-cell>
          <table:table-cell office:value-type="float" office:value="0.790538" calcext:value-type="float">
            <text:p>0.790538</text:p>
          </table:table-cell>
          <table:table-cell office:value-type="float" office:value="1.205929" calcext:value-type="float">
            <text:p>1.205929</text:p>
          </table:table-cell>
          <table:table-cell office:value-type="float" office:value="1.590564" calcext:value-type="float">
            <text:p>1.590564</text:p>
          </table:table-cell>
          <table:table-cell office:value-type="float" office:value="1.998456" calcext:value-type="float">
            <text:p>1.998456</text:p>
          </table:table-cell>
          <table:table-cell office:value-type="float" office:value="2.543847" calcext:value-type="float">
            <text:p>2.543847</text:p>
          </table:table-cell>
          <table:table-cell office:value-type="float" office:value="3.120268" calcext:value-type="float">
            <text:p>3.120268</text:p>
          </table:table-cell>
          <table:table-cell office:value-type="float" office:value="3.805345" calcext:value-type="float">
            <text:p>3.805345</text:p>
          </table:table-cell>
          <table:table-cell office:value-type="float" office:value="4.615666" calcext:value-type="float">
            <text:p>4.615666</text:p>
          </table:table-cell>
          <table:table-cell office:value-type="float" office:value="5.781734" calcext:value-type="float">
            <text:p>5.781734</text:p>
          </table:table-cell>
          <table:table-cell office:value-type="float" office:value="8.378145" calcext:value-type="float">
            <text:p>8.378145</text:p>
          </table:table-cell>
          <table:table-cell office:value-type="float" office:value="8.818791" calcext:value-type="float">
            <text:p>8.818791</text:p>
          </table:table-cell>
          <table:table-cell office:value-type="float" office:value="10.090119" calcext:value-type="float">
            <text:p>10.090119</text:p>
          </table:table-cell>
          <table:table-cell office:value-type="float" office:value="13.235677" calcext:value-type="float">
            <text:p>13.235677</text:p>
          </table:table-cell>
          <table:table-cell office:value-type="float" office:value="20.601383" calcext:value-type="float">
            <text:p>20.601383</text:p>
          </table:table-cell>
          <table:table-cell office:value-type="float" office:value="20.806862" calcext:value-type="float">
            <text:p>20.806862</text:p>
          </table:table-cell>
          <table:table-cell office:value-type="float" office:value="32.432152" calcext:value-type="float">
            <text:p>32.432152</text:p>
          </table:table-cell>
          <table:table-cell office:value-type="float" office:value="22.410344" calcext:value-type="float">
            <text:p>22.410344</text:p>
          </table:table-cell>
          <table:table-cell office:value-type="float" office:value="24.069571" calcext:value-type="float">
            <text:p>24.069571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64</text:p>
          </table:table-cell>
          <table:table-cell office:value-type="float" office:value="0.055811" calcext:value-type="float">
            <text:p>0.055811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office:value-type="string" calcext:value-type="string">
            <text:p>Pi4-64 full -n=8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.006218" calcext:value-type="float">
            <text:p>0.006218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24556" calcext:value-type="float">
            <text:p>0.024556</text:p>
          </table:table-cell>
          <table:table-cell office:value-type="float" office:value="0.040461" calcext:value-type="float">
            <text:p>0.040461</text:p>
          </table:table-cell>
          <table:table-cell office:value-type="float" office:value="0.061494" calcext:value-type="float">
            <text:p>0.061494</text:p>
          </table:table-cell>
          <table:table-cell office:value-type="float" office:value="0.088609" calcext:value-type="float">
            <text:p>0.088609</text:p>
          </table:table-cell>
          <table:table-cell office:value-type="float" office:value="0.125948" calcext:value-type="float">
            <text:p>0.125948</text:p>
          </table:table-cell>
          <table:table-cell office:value-type="float" office:value="0.184956" calcext:value-type="float">
            <text:p>0.184956</text:p>
          </table:table-cell>
          <table:table-cell office:value-type="float" office:value="0.249402" calcext:value-type="float">
            <text:p>0.249402</text:p>
          </table:table-cell>
          <table:table-cell office:value-type="float" office:value="0.304661" calcext:value-type="float">
            <text:p>0.304661</text:p>
          </table:table-cell>
          <table:table-cell office:value-type="float" office:value="0.399475" calcext:value-type="float">
            <text:p>0.399475</text:p>
          </table:table-cell>
          <table:table-cell office:value-type="float" office:value="0.483913" calcext:value-type="float">
            <text:p>0.483913</text:p>
          </table:table-cell>
          <table:table-cell office:value-type="float" office:value="0.575486" calcext:value-type="float">
            <text:p>0.575486</text:p>
          </table:table-cell>
          <table:table-cell office:value-type="float" office:value="0.659748" calcext:value-type="float">
            <text:p>0.659748</text:p>
          </table:table-cell>
          <table:table-cell office:value-type="float" office:value="1.434297" calcext:value-type="float">
            <text:p>1.434297</text:p>
          </table:table-cell>
          <table:table-cell office:value-type="float" office:value="1.699447" calcext:value-type="float">
            <text:p>1.699447</text:p>
          </table:table-cell>
          <table:table-cell office:value-type="float" office:value="1.140655" calcext:value-type="float">
            <text:p>1.140655</text:p>
          </table:table-cell>
          <table:table-cell office:value-type="float" office:value="2.378088" calcext:value-type="float">
            <text:p>2.378088</text:p>
          </table:table-cell>
          <table:table-cell office:value-type="float" office:value="2.748344" calcext:value-type="float">
            <text:p>2.748344</text:p>
          </table:table-cell>
          <table:table-cell office:value-type="float" office:value="3.033465" calcext:value-type="float">
            <text:p>3.033465</text:p>
          </table:table-cell>
          <table:table-cell office:value-type="float" office:value="3.376304" calcext:value-type="float">
            <text:p>3.376304</text:p>
          </table:table-cell>
          <table:table-cell office:value-type="float" office:value="4.137124" calcext:value-type="float">
            <text:p>4.137124</text:p>
          </table:table-cell>
          <table:table-cell office:value-type="float" office:value="2.61696" calcext:value-type="float">
            <text:p>2.61696</text:p>
          </table:table-cell>
          <table:table-cell office:value-type="float" office:value="2.970874" calcext:value-type="float">
            <text:p>2.970874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64</text:p>
          </table:table-cell>
          <table:table-cell office:value-type="float" office:value="0.009281" calcext:value-type="float">
            <text:p>0.009281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4-64 block -n=1</text:p>
          </table:table-cell>
          <table:table-cell office:value-type="float" office:value="0.014208" calcext:value-type="float">
            <text:p>0.014208</text:p>
          </table:table-cell>
          <table:table-cell office:value-type="float" office:value="0.055811" calcext:value-type="float">
            <text:p>0.055811</text:p>
          </table:table-cell>
          <table:table-cell office:value-type="float" office:value="0.129277" calcext:value-type="float">
            <text:p>0.129277</text:p>
          </table:table-cell>
          <table:table-cell office:value-type="float" office:value="0.239092" calcext:value-type="float">
            <text:p>0.239092</text:p>
          </table:table-cell>
          <table:table-cell office:value-type="float" office:value="0.388923" calcext:value-type="float">
            <text:p>0.388923</text:p>
          </table:table-cell>
          <table:table-cell office:value-type="float" office:value="0.583035" calcext:value-type="float">
            <text:p>0.583035</text:p>
          </table:table-cell>
          <table:table-cell office:value-type="float" office:value="0.832769" calcext:value-type="float">
            <text:p>0.832769</text:p>
          </table:table-cell>
          <table:table-cell office:value-type="float" office:value="1.146657" calcext:value-type="float">
            <text:p>1.146657</text:p>
          </table:table-cell>
          <table:table-cell office:value-type="float" office:value="1.510728" calcext:value-type="float">
            <text:p>1.510728</text:p>
          </table:table-cell>
          <table:table-cell office:value-type="float" office:value="1.952475" calcext:value-type="float">
            <text:p>1.952475</text:p>
          </table:table-cell>
          <table:table-cell office:value-type="float" office:value="2.913386" calcext:value-type="float">
            <text:p>2.913386</text:p>
          </table:table-cell>
          <table:table-cell office:value-type="float" office:value="6.452958" calcext:value-type="float">
            <text:p>6.452958</text:p>
          </table:table-cell>
          <table:table-cell office:value-type="float" office:value="5.735005" calcext:value-type="float">
            <text:p>5.735005</text:p>
          </table:table-cell>
          <table:table-cell office:value-type="float" office:value="8.630354" calcext:value-type="float">
            <text:p>8.630354</text:p>
          </table:table-cell>
          <table:table-cell office:value-type="float" office:value="7.770251" calcext:value-type="float">
            <text:p>7.770251</text:p>
          </table:table-cell>
          <table:table-cell office:value-type="float" office:value="9.957042" calcext:value-type="float">
            <text:p>9.957042</text:p>
          </table:table-cell>
          <table:table-cell office:value-type="float" office:value="13.020107" calcext:value-type="float">
            <text:p>13.020107</text:p>
          </table:table-cell>
          <table:table-cell office:value-type="float" office:value="13.820134" calcext:value-type="float">
            <text:p>13.820134</text:p>
          </table:table-cell>
          <table:table-cell office:value-type="float" office:value="18.405699" calcext:value-type="float">
            <text:p>18.405699</text:p>
          </table:table-cell>
          <table:table-cell office:value-type="float" office:value="20.601383" calcext:value-type="float">
            <text:p>20.601383</text:p>
          </table:table-cell>
          <table:table-cell office:value-type="float" office:value="17.365067" calcext:value-type="float">
            <text:p>17.365067</text:p>
          </table:table-cell>
          <table:table-cell office:value-type="float" office:value="27.595544" calcext:value-type="float">
            <text:p>27.595544</text:p>
          </table:table-cell>
          <table:table-cell office:value-type="float" office:value="22.410344" calcext:value-type="float">
            <text:p>22.410344</text:p>
          </table:table-cell>
          <table:table-cell office:value-type="float" office:value="33.35246" calcext:value-type="float">
            <text:p>33.35246</text:p>
          </table:table-cell>
          <table:table-cell office:value-type="float" office:value="35.146882" calcext:value-type="float">
            <text:p>35.146882</text:p>
          </table:table-cell>
          <table:table-cell office:value-type="float" office:value="39.42689" calcext:value-type="float">
            <text:p>39.42689</text:p>
          </table:table-cell>
          <table:table-cell office:value-type="float" office:value="43.334053" calcext:value-type="float">
            <text:p>43.334053</text:p>
          </table:table-cell>
          <table:table-cell office:value-type="float" office:value="45.185393" calcext:value-type="float">
            <text:p>45.185393</text:p>
          </table:table-cell>
          <table:table-cell office:value-type="float" office:value="49.938726" calcext:value-type="float">
            <text:p>49.938726</text:p>
          </table:table-cell>
          <table:table-cell office:value-type="float" office:value="50.339155" calcext:value-type="float">
            <text:p>50.339155</text:p>
          </table:table-cell>
          <table:table-cell office:value-type="float" office:value="55.670253" calcext:value-type="float">
            <text:p>55.670253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96</text:p>
          </table:table-cell>
          <table:table-cell office:value-type="float" office:value="0.225707" calcext:value-type="float">
            <text:p>0.225707</text:p>
          </table:table-cell>
          <table:table-cell table:style-name="Default" office:value-type="string" calcext:value-type="string">
            <text:p>compile Full mult</text:p>
          </table:table-cell>
          <table:table-cell table:style-name="Default"/>
          <table:table-cell office:value-type="string" calcext:value-type="string">
            <text:p>Pi4-64 block -n=8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09281" calcext:value-type="float">
            <text:p>0.009281</text:p>
          </table:table-cell>
          <table:table-cell office:value-type="float" office:value="0.020125" calcext:value-type="float">
            <text:p>0.020125</text:p>
          </table:table-cell>
          <table:table-cell office:value-type="float" office:value="0.036434" calcext:value-type="float">
            <text:p>0.036434</text:p>
          </table:table-cell>
          <table:table-cell office:value-type="float" office:value="0.058297" calcext:value-type="float">
            <text:p>0.058297</text:p>
          </table:table-cell>
          <table:table-cell office:value-type="float" office:value="0.086988" calcext:value-type="float">
            <text:p>0.086988</text:p>
          </table:table-cell>
          <table:table-cell office:value-type="float" office:value="0.122987" calcext:value-type="float">
            <text:p>0.122987</text:p>
          </table:table-cell>
          <table:table-cell office:value-type="float" office:value="0.173091" calcext:value-type="float">
            <text:p>0.173091</text:p>
          </table:table-cell>
          <table:table-cell office:value-type="float" office:value="0.221307" calcext:value-type="float">
            <text:p>0.221307</text:p>
          </table:table-cell>
          <table:table-cell office:value-type="float" office:value="0.341209" calcext:value-type="float">
            <text:p>0.341209</text:p>
          </table:table-cell>
          <table:table-cell office:value-type="float" office:value="0.418803" calcext:value-type="float">
            <text:p>0.418803</text:p>
          </table:table-cell>
          <table:table-cell office:value-type="float" office:value="0.877601" calcext:value-type="float">
            <text:p>0.877601</text:p>
          </table:table-cell>
          <table:table-cell office:value-type="float" office:value="1.083806" calcext:value-type="float">
            <text:p>1.083806</text:p>
          </table:table-cell>
          <table:table-cell office:value-type="float" office:value="1.291524" calcext:value-type="float">
            <text:p>1.291524</text:p>
          </table:table-cell>
          <table:table-cell office:value-type="float" office:value="1.536153" calcext:value-type="float">
            <text:p>1.536153</text:p>
          </table:table-cell>
          <table:table-cell office:value-type="float" office:value="1.7882" calcext:value-type="float">
            <text:p>1.7882</text:p>
          </table:table-cell>
          <table:table-cell office:value-type="float" office:value="2.16244" calcext:value-type="float">
            <text:p>2.16244</text:p>
          </table:table-cell>
          <table:table-cell office:value-type="float" office:value="2.397848" calcext:value-type="float">
            <text:p>2.397848</text:p>
          </table:table-cell>
          <table:table-cell office:value-type="float" office:value="2.830069" calcext:value-type="float">
            <text:p>2.830069</text:p>
          </table:table-cell>
          <table:table-cell office:value-type="float" office:value="3.033465" calcext:value-type="float">
            <text:p>3.033465</text:p>
          </table:table-cell>
          <table:table-cell office:value-type="float" office:value="3.128687" calcext:value-type="float">
            <text:p>3.128687</text:p>
          </table:table-cell>
          <table:table-cell office:value-type="float" office:value="3.81947" calcext:value-type="float">
            <text:p>3.81947</text:p>
          </table:table-cell>
          <table:table-cell office:value-type="float" office:value="2.61696" calcext:value-type="float">
            <text:p>2.61696</text:p>
          </table:table-cell>
          <table:table-cell office:value-type="float" office:value="4.075937" calcext:value-type="float">
            <text:p>4.075937</text:p>
          </table:table-cell>
          <table:table-cell office:value-type="float" office:value="5.115052" calcext:value-type="float">
            <text:p>5.115052</text:p>
          </table:table-cell>
          <table:table-cell office:value-type="float" office:value="3.77237" calcext:value-type="float">
            <text:p>3.77237</text:p>
          </table:table-cell>
          <table:table-cell office:value-type="float" office:value="5.258296" calcext:value-type="float">
            <text:p>5.258296</text:p>
          </table:table-cell>
          <table:table-cell office:value-type="float" office:value="6.711325" calcext:value-type="float">
            <text:p>6.711325</text:p>
          </table:table-cell>
          <table:table-cell office:value-type="float" office:value="5.198809" calcext:value-type="float">
            <text:p>5.198809</text:p>
          </table:table-cell>
          <table:table-cell office:value-type="float" office:value="5.689355" calcext:value-type="float">
            <text:p>5.689355</text:p>
          </table:table-cell>
          <table:table-cell office:value-type="float" office:value="5.948296" calcext:value-type="float">
            <text:p>5.948296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96</text:p>
          </table:table-cell>
          <table:table-cell office:value-type="float" office:value="0.07533" calcext:value-type="float">
            <text:p>0.07533</text:p>
          </table:table-cell>
          <table:table-cell table:style-name="Default" office:value-type="string" calcext:value-type="string">
            <text:p>Full mult</text:p>
          </table:table-cell>
          <table:table-cell table:style-name="ce18" office:value-type="string" calcext:value-type="string">
            <text:p>9efab2b</text:p>
          </table:table-cell>
          <table:table-cell office:value-type="string" calcext:value-type="string">
            <text:p>V2 Pi4-64 full -n=8</text:p>
          </table:table-cell>
          <table:table-cell office:value-type="float" office:value="0.002435" calcext:value-type="float">
            <text:p>0.002435</text:p>
          </table:table-cell>
          <table:table-cell office:value-type="float" office:value="0.006458" calcext:value-type="float">
            <text:p>0.006458</text:p>
          </table:table-cell>
          <table:table-cell office:value-type="float" office:value="0.013722" calcext:value-type="float">
            <text:p>0.013722</text:p>
          </table:table-cell>
          <table:table-cell office:value-type="float" office:value="0.024876" calcext:value-type="float">
            <text:p>0.024876</text:p>
          </table:table-cell>
          <table:table-cell office:value-type="float" office:value="0.041398" calcext:value-type="float">
            <text:p>0.041398</text:p>
          </table:table-cell>
          <table:table-cell office:value-type="float" office:value="0.061852" calcext:value-type="float">
            <text:p>0.061852</text:p>
          </table:table-cell>
          <table:table-cell office:value-type="float" office:value="0.09072" calcext:value-type="float">
            <text:p>0.09072</text:p>
          </table:table-cell>
          <table:table-cell office:value-type="float" office:value="0.126273" calcext:value-type="float">
            <text:p>0.126273</text:p>
          </table:table-cell>
          <table:table-cell office:value-type="float" office:value="0.184563" calcext:value-type="float">
            <text:p>0.184563</text:p>
          </table:table-cell>
          <table:table-cell office:value-type="float" office:value="0.248973" calcext:value-type="float">
            <text:p>0.248973</text:p>
          </table:table-cell>
          <table:table-cell office:value-type="float" office:value="0.304156" calcext:value-type="float">
            <text:p>0.304156</text:p>
          </table:table-cell>
          <table:table-cell office:value-type="float" office:value="0.395509" calcext:value-type="float">
            <text:p>0.395509</text:p>
          </table:table-cell>
          <table:table-cell office:value-type="float" office:value="0.484564" calcext:value-type="float">
            <text:p>0.484564</text:p>
          </table:table-cell>
          <table:table-cell office:value-type="float" office:value="0.576945" calcext:value-type="float">
            <text:p>0.576945</text:p>
          </table:table-cell>
          <table:table-cell office:value-type="float" office:value="0.660833" calcext:value-type="float">
            <text:p>0.660833</text:p>
          </table:table-cell>
          <table:table-cell office:value-type="float" office:value="0.817202" calcext:value-type="float">
            <text:p>0.817202</text:p>
          </table:table-cell>
          <table:table-cell office:value-type="float" office:value="0.967498" calcext:value-type="float">
            <text:p>0.967498</text:p>
          </table:table-cell>
          <table:table-cell office:value-type="float" office:value="1.135864" calcext:value-type="float">
            <text:p>1.135864</text:p>
          </table:table-cell>
          <table:table-cell office:value-type="float" office:value="1.33694" calcext:value-type="float">
            <text:p>1.33694</text:p>
          </table:table-cell>
          <table:table-cell office:value-type="float" office:value="1.522149" calcext:value-type="float">
            <text:p>1.522149</text:p>
          </table:table-cell>
          <table:table-cell office:value-type="float" office:value="1.757971" calcext:value-type="float">
            <text:p>1.757971</text:p>
          </table:table-cell>
          <table:table-cell office:value-type="float" office:value="2.005699" calcext:value-type="float">
            <text:p>2.005699</text:p>
          </table:table-cell>
          <table:table-cell office:value-type="float" office:value="2.281836" calcext:value-type="float">
            <text:p>2.281836</text:p>
          </table:table-cell>
          <table:table-cell office:value-type="float" office:value="2.579612" calcext:value-type="float">
            <text:p>2.579612</text:p>
          </table:table-cell>
          <table:table-cell office:value-type="float" office:value="2.905764" calcext:value-type="float">
            <text:p>2.905764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96</text:p>
          </table:table-cell>
          <table:table-cell office:value-type="float" office:value="0.01341" calcext:value-type="float">
            <text:p>0.01341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V2 Pi4-64 block -n=8</text:p>
          </table:table-cell>
          <table:table-cell office:value-type="float" office:value="0.003257" calcext:value-type="float">
            <text:p>0.003257</text:p>
          </table:table-cell>
          <table:table-cell office:value-type="float" office:value="0.009515" calcext:value-type="float">
            <text:p>0.009515</text:p>
          </table:table-cell>
          <table:table-cell office:value-type="float" office:value="0.020356" calcext:value-type="float">
            <text:p>0.020356</text:p>
          </table:table-cell>
          <table:table-cell office:value-type="float" office:value="0.036603" calcext:value-type="float">
            <text:p>0.036603</text:p>
          </table:table-cell>
          <table:table-cell office:value-type="float" office:value="0.058338" calcext:value-type="float">
            <text:p>0.058338</text:p>
          </table:table-cell>
          <table:table-cell office:value-type="float" office:value="0.092567" calcext:value-type="float">
            <text:p>0.092567</text:p>
          </table:table-cell>
          <table:table-cell office:value-type="float" office:value="0.122295" calcext:value-type="float">
            <text:p>0.12229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220375" calcext:value-type="float">
            <text:p>0.220375</text:p>
          </table:table-cell>
          <table:table-cell office:value-type="float" office:value="0.288439" calcext:value-type="float">
            <text:p>0.288439</text:p>
          </table:table-cell>
          <table:table-cell office:value-type="float" office:value="0.418655" calcext:value-type="float">
            <text:p>0.418655</text:p>
          </table:table-cell>
          <table:table-cell office:value-type="float" office:value="0.523694" calcext:value-type="float">
            <text:p>0.523694</text:p>
          </table:table-cell>
          <table:table-cell office:value-type="float" office:value="0.631981" calcext:value-type="float">
            <text:p>0.631981</text:p>
          </table:table-cell>
          <table:table-cell office:value-type="float" office:value="0.744844" calcext:value-type="float">
            <text:p>0.744844</text:p>
          </table:table-cell>
          <table:table-cell office:value-type="float" office:value="0.885581" calcext:value-type="float">
            <text:p>0.885581</text:p>
          </table:table-cell>
          <table:table-cell office:value-type="float" office:value="1.044115" calcext:value-type="float">
            <text:p>1.044115</text:p>
          </table:table-cell>
          <table:table-cell office:value-type="float" office:value="1.2618" calcext:value-type="float">
            <text:p>1.2618</text:p>
          </table:table-cell>
          <table:table-cell office:value-type="float" office:value="1.41101" calcext:value-type="float">
            <text:p>1.41101</text:p>
          </table:table-cell>
          <table:table-cell office:value-type="float" office:value="1.65828" calcext:value-type="float">
            <text:p>1.65828</text:p>
          </table:table-cell>
          <table:table-cell office:value-type="float" office:value="1.843521" calcext:value-type="float">
            <text:p>1.843521</text:p>
          </table:table-cell>
          <table:table-cell office:value-type="float" office:value="2.209391" calcext:value-type="float">
            <text:p>2.209391</text:p>
          </table:table-cell>
          <table:table-cell office:value-type="float" office:value="2.380627" calcext:value-type="float">
            <text:p>2.380627</text:p>
          </table:table-cell>
          <table:table-cell office:value-type="float" office:value="2.699806" calcext:value-type="float">
            <text:p>2.699806</text:p>
          </table:table-cell>
          <table:table-cell office:value-type="float" office:value="3.003518" calcext:value-type="float">
            <text:p>3.003518</text:p>
          </table:table-cell>
          <table:table-cell office:value-type="float" office:value="3.430104" calcext:value-type="float">
            <text:p>3.430104</text:p>
          </table:table-cell>
          <table:table-cell office:value-type="float" office:value="3.709641" calcext:value-type="float">
            <text:p>3.709641</text:p>
          </table:table-cell>
          <table:table-cell office:value-type="float" office:value="4.034827" calcext:value-type="float">
            <text:p>4.034827</text:p>
          </table:table-cell>
          <table:table-cell office:value-type="float" office:value="4.420161" calcext:value-type="float">
            <text:p>4.420161</text:p>
          </table:table-cell>
          <table:table-cell office:value-type="float" office:value="5.183529" calcext:value-type="float">
            <text:p>5.183529</text:p>
          </table:table-cell>
          <table:table-cell office:value-type="float" office:value="5.086924" calcext:value-type="float">
            <text:p>5.086924</text:p>
          </table:table-cell>
          <table:table-cell office:value-type="float" office:value="6.116228" calcext:value-type="float">
            <text:p>6.116228</text:p>
          </table:table-cell>
          <table:table-cell office:value-type="float" office:value="6.212815" calcext:value-type="float">
            <text:p>6.212815</text:p>
          </table:table-cell>
          <table:table-cell office:value-type="float" office:value="6.849411" calcext:value-type="float">
            <text:p>6.849411</text:p>
          </table:table-cell>
          <table:table-cell office:value-type="float" office:value="7.450314" calcext:value-type="float">
            <text:p>7.450314</text:p>
          </table:table-cell>
          <table:table-cell office:value-type="float" office:value="8.165679" calcext:value-type="float">
            <text:p>8.165679</text:p>
          </table:table-cell>
          <table:table-cell office:value-type="float" office:value="9.423962" calcext:value-type="float">
            <text:p>9.423962</text:p>
          </table:table-cell>
          <table:table-cell office:value-type="float" office:value="9.840509" calcext:value-type="float">
            <text:p>9.840509</text:p>
          </table:table-cell>
          <table:table-cell office:value-type="float" office:value="11.637999" calcext:value-type="float">
            <text:p>11.637999</text:p>
          </table:table-cell>
          <table:table-cell office:value-type="float" office:value="11.248815" calcext:value-type="float">
            <text:p>11.248815</text:p>
          </table:table-cell>
          <table:table-cell office:value-type="float" office:value="12.936267" calcext:value-type="float">
            <text:p>12.936267</text:p>
          </table:table-cell>
          <table:table-cell office:value-type="float" office:value="13.110754" calcext:value-type="float">
            <text:p>13.110754</text:p>
          </table:table-cell>
          <table:table-cell office:value-type="float" office:value="14.664275" calcext:value-type="float">
            <text:p>14.664275</text:p>
          </table:table-cell>
          <table:table-cell office:value-type="float" office:value="15.758054" calcext:value-type="float">
            <text:p>15.758054</text:p>
          </table:table-cell>
          <table:table-cell office:value-type="float" office:value="17.786911" calcext:value-type="float">
            <text:p>17.786911</text:p>
          </table:table-cell>
          <table:table-cell office:value-type="float" office:value="19.000269" calcext:value-type="float">
            <text:p>19.000269</text:p>
          </table:table-cell>
          <table:table-cell office:value-type="float" office:value="19.332735" calcext:value-type="float">
            <text:p>19.332735</text:p>
          </table:table-cell>
          <table:table-cell office:value-type="float" office:value="21.246057" calcext:value-type="float">
            <text:p>21.246057</text:p>
          </table:table-cell>
          <table:table-cell table:number-columns-repeated="968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96</text:p>
          </table:table-cell>
          <table:table-cell office:value-type="float" office:value="0.308183" calcext:value-type="float">
            <text:p>0.308183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office:value-type="string" calcext:value-type="string">
            <text:p>V2 Pi3 full -n=12</text:p>
          </table:table-cell>
          <table:table-cell office:value-type="float" office:value="0.004637" calcext:value-type="float">
            <text:p>0.004637</text:p>
          </table:table-cell>
          <table:table-cell office:value-type="float" office:value="0.012097" calcext:value-type="float">
            <text:p>0.012097</text:p>
          </table:table-cell>
          <table:table-cell office:value-type="float" office:value="0.02631" calcext:value-type="float">
            <text:p>0.02631</text:p>
          </table:table-cell>
          <table:table-cell office:value-type="float" office:value="0.049502" calcext:value-type="float">
            <text:p>0.049502</text:p>
          </table:table-cell>
          <table:table-cell office:value-type="float" office:value="0.088238" calcext:value-type="float">
            <text:p>0.088238</text:p>
          </table:table-cell>
          <table:table-cell office:value-type="float" office:value="0.137754" calcext:value-type="float">
            <text:p>0.137754</text:p>
          </table:table-cell>
          <table:table-cell office:value-type="float" office:value="0.206628" calcext:value-type="float">
            <text:p>0.206628</text:p>
          </table:table-cell>
          <table:table-cell office:value-type="float" office:value="0.283241" calcext:value-type="float">
            <text:p>0.283241</text:p>
          </table:table-cell>
          <table:table-cell office:value-type="float" office:value="0.408109" calcext:value-type="float">
            <text:p>0.408109</text:p>
          </table:table-cell>
          <table:table-cell office:value-type="float" office:value="0.517283" calcext:value-type="float">
            <text:p>0.517283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823707" calcext:value-type="float">
            <text:p>0.823707</text:p>
          </table:table-cell>
          <table:table-cell office:value-type="float" office:value="1.127821" calcext:value-type="float">
            <text:p>1.127821</text:p>
          </table:table-cell>
          <table:table-cell office:value-type="float" office:value="1.537752" calcext:value-type="float">
            <text:p>1.537752</text:p>
          </table:table-cell>
          <table:table-cell office:value-type="float" office:value="1.736303" calcext:value-type="float">
            <text:p>1.736303</text:p>
          </table:table-cell>
          <table:table-cell office:value-type="float" office:value="2.131585" calcext:value-type="float">
            <text:p>2.131585</text:p>
          </table:table-cell>
          <table:table-cell office:value-type="float" office:value="2.567958" calcext:value-type="float">
            <text:p>2.567958</text:p>
          </table:table-cell>
          <table:table-cell office:value-type="float" office:value="2.936966" calcext:value-type="float">
            <text:p>2.936966</text:p>
          </table:table-cell>
          <table:table-cell office:value-type="float" office:value="3.508749" calcext:value-type="float">
            <text:p>3.508749</text:p>
          </table:table-cell>
          <table:table-cell office:value-type="float" office:value="4.172168" calcext:value-type="float">
            <text:p>4.172168</text:p>
          </table:table-cell>
          <table:table-cell office:value-type="float" office:value="4.508596" calcext:value-type="float">
            <text:p>4.508596</text:p>
          </table:table-cell>
          <table:table-cell office:value-type="float" office:value="4.938383" calcext:value-type="float">
            <text:p>4.938383</text:p>
          </table:table-cell>
          <table:table-cell office:value-type="float" office:value="5.574033" calcext:value-type="float">
            <text:p>5.574033</text:p>
          </table:table-cell>
          <table:table-cell office:value-type="float" office:value="6.099662" calcext:value-type="float">
            <text:p>6.099662</text:p>
          </table:table-cell>
          <table:table-cell office:value-type="float" office:value="7.003264" calcext:value-type="float">
            <text:p>7.003264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96</text:p>
          </table:table-cell>
          <table:table-cell office:value-type="float" office:value="0.129277" calcext:value-type="float">
            <text:p>0.129277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office:value-type="string" calcext:value-type="string">
            <text:p>V2 Pi3 block -n=12</text:p>
          </table:table-cell>
          <table:table-cell office:value-type="float" office:value="0.007762" calcext:value-type="float">
            <text:p>0.007762</text:p>
          </table:table-cell>
          <table:table-cell office:value-type="float" office:value="0.017694" calcext:value-type="float">
            <text:p>0.017694</text:p>
          </table:table-cell>
          <table:table-cell office:value-type="float" office:value="0.034134" calcext:value-type="float">
            <text:p>0.034134</text:p>
          </table:table-cell>
          <table:table-cell office:value-type="float" office:value="0.062882" calcext:value-type="float">
            <text:p>0.062882</text:p>
          </table:table-cell>
          <table:table-cell office:value-type="float" office:value="0.103208" calcext:value-type="float">
            <text:p>0.103208</text:p>
          </table:table-cell>
          <table:table-cell office:value-type="float" office:value="0.150604" calcext:value-type="float">
            <text:p>0.150604</text:p>
          </table:table-cell>
          <table:table-cell office:value-type="float" office:value="0.217609" calcext:value-type="float">
            <text:p>0.217609</text:p>
          </table:table-cell>
          <table:table-cell office:value-type="float" office:value="0.302475" calcext:value-type="float">
            <text:p>0.302475</text:p>
          </table:table-cell>
          <table:table-cell office:value-type="float" office:value="0.425915" calcext:value-type="float">
            <text:p>0.425915</text:p>
          </table:table-cell>
          <table:table-cell office:value-type="float" office:value="0.578733" calcext:value-type="float">
            <text:p>0.578733</text:p>
          </table:table-cell>
          <table:table-cell office:value-type="float" office:value="0.770201" calcext:value-type="float">
            <text:p>0.770201</text:p>
          </table:table-cell>
          <table:table-cell office:value-type="float" office:value="0.950773" calcext:value-type="float">
            <text:p>0.950773</text:p>
          </table:table-cell>
          <table:table-cell office:value-type="float" office:value="1.200045" calcext:value-type="float">
            <text:p>1.200045</text:p>
          </table:table-cell>
          <table:table-cell office:value-type="float" office:value="1.482526" calcext:value-type="float">
            <text:p>1.482526</text:p>
          </table:table-cell>
          <table:table-cell office:value-type="float" office:value="1.948926" calcext:value-type="float">
            <text:p>1.948926</text:p>
          </table:table-cell>
          <table:table-cell office:value-type="float" office:value="2.159858" calcext:value-type="float">
            <text:p>2.159858</text:p>
          </table:table-cell>
          <table:table-cell office:value-type="float" office:value="2.503458" calcext:value-type="float">
            <text:p>2.503458</text:p>
          </table:table-cell>
          <table:table-cell office:value-type="float" office:value="3.042771" calcext:value-type="float">
            <text:p>3.042771</text:p>
          </table:table-cell>
          <table:table-cell office:value-type="float" office:value="3.473809" calcext:value-type="float">
            <text:p>3.473809</text:p>
          </table:table-cell>
          <table:table-cell office:value-type="float" office:value="4.102834" calcext:value-type="float">
            <text:p>4.102834</text:p>
          </table:table-cell>
          <table:table-cell office:value-type="float" office:value="4.596321" calcext:value-type="float">
            <text:p>4.596321</text:p>
          </table:table-cell>
          <table:table-cell office:value-type="float" office:value="5.094881" calcext:value-type="float">
            <text:p>5.094881</text:p>
          </table:table-cell>
          <table:table-cell office:value-type="float" office:value="5.851021" calcext:value-type="float">
            <text:p>5.851021</text:p>
          </table:table-cell>
          <table:table-cell office:value-type="float" office:value="6.219203" calcext:value-type="float">
            <text:p>6.219203</text:p>
          </table:table-cell>
          <table:table-cell office:value-type="float" office:value="7.424513" calcext:value-type="float">
            <text:p>7.424513</text:p>
          </table:table-cell>
          <table:table-cell office:value-type="float" office:value="8.147472" calcext:value-type="float">
            <text:p>8.147472</text:p>
          </table:table-cell>
          <table:table-cell office:value-type="float" office:value="8.746738" calcext:value-type="float">
            <text:p>8.746738</text:p>
          </table:table-cell>
          <table:table-cell office:value-type="float" office:value="9.871992" calcext:value-type="float">
            <text:p>9.871992</text:p>
          </table:table-cell>
          <table:table-cell office:value-type="float" office:value="10.869934" calcext:value-type="float">
            <text:p>10.869934</text:p>
          </table:table-cell>
          <table:table-cell office:value-type="float" office:value="11.895821" calcext:value-type="float">
            <text:p>11.895821</text:p>
          </table:table-cell>
          <table:table-cell office:value-type="float" office:value="12.70857" calcext:value-type="float">
            <text:p>12.70857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96</text:p>
          </table:table-cell>
          <table:table-cell office:value-type="float" office:value="0.020125" calcext:value-type="float">
            <text:p>0.020125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128</text:p>
          </table:table-cell>
          <table:table-cell office:value-type="float" office:value="0.286054" calcext:value-type="float">
            <text:p>0.286054</text:p>
          </table:table-cell>
          <table:table-cell table:style-name="Default" office:value-type="string" calcext:value-type="string">
            <text:p>compile Full mult</text:p>
          </table:table-cell>
          <table:table-cell table:style-name="Default"/>
          <table:table-cell>
            <draw:frame draw:z-index="7" draw:style-name="gr1" draw:text-style-name="P1" svg:width="10.2283in" svg:height="5.6787in" svg:x="1.1618in" svg:y="0.1752in">
              <draw:object draw:notify-on-update-of-ranges="Timing.J1110:Timing.BD1110 Timing.I1122:Timing.I1122 Timing.J1122:Timing.BD1122 Timing.I1124:Timing.I1124 Timing.J1124:Timing.BD1124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128</text:p>
          </table:table-cell>
          <table:table-cell office:value-type="float" office:value="0.145685" calcext:value-type="float">
            <text:p>0.145685</text:p>
          </table:table-cell>
          <table:table-cell table:style-name="Default" office:value-type="string" calcext:value-type="string">
            <text:p>Full mult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128</text:p>
          </table:table-cell>
          <table:table-cell office:value-type="float" office:value="0.024556" calcext:value-type="float">
            <text:p>0.024556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128</text:p>
          </table:table-cell>
          <table:table-cell office:value-type="float" office:value="0.34898" calcext:value-type="float">
            <text:p>0.34898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128</text:p>
          </table:table-cell>
          <table:table-cell office:value-type="float" office:value="0.239092" calcext:value-type="float">
            <text:p>0.239092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 -d=128</text:p>
          </table:table-cell>
          <table:table-cell office:value-type="float" office:value="0.036434" calcext:value-type="float">
            <text:p>0.0364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60</text:p>
          </table:table-cell>
          <table:table-cell office:value-type="float" office:value="0.354952" calcext:value-type="float">
            <text:p>0.35495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60</text:p>
          </table:table-cell>
          <table:table-cell office:value-type="float" office:value="0.24717" calcext:value-type="float">
            <text:p>0.2471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60</text:p>
          </table:table-cell>
          <table:table-cell office:value-type="float" office:value="0.040461" calcext:value-type="float">
            <text:p>0.040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60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60</text:p>
          </table:table-cell>
          <table:table-cell office:value-type="float" office:value="0.388923" calcext:value-type="float">
            <text:p>0.3889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60</text:p>
          </table:table-cell>
          <table:table-cell office:value-type="float" office:value="0.058297" calcext:value-type="float">
            <text:p>0.0582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92</text:p>
          </table:table-cell>
          <table:table-cell office:value-type="float" office:value="0.440215" calcext:value-type="float">
            <text:p>0.44021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92</text:p>
          </table:table-cell>
          <table:table-cell office:value-type="float" office:value="0.384656" calcext:value-type="float">
            <text:p>0.3846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92</text:p>
          </table:table-cell>
          <table:table-cell office:value-type="float" office:value="0.061494" calcext:value-type="float">
            <text:p>0.0614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92</text:p>
          </table:table-cell>
          <table:table-cell office:value-type="float" office:value="0.46524" calcext:value-type="float">
            <text:p>0.4652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92</text:p>
          </table:table-cell>
          <table:table-cell office:value-type="float" office:value="0.583035" calcext:value-type="float">
            <text:p>0.58303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92</text:p>
          </table:table-cell>
          <table:table-cell office:value-type="float" office:value="0.086988" calcext:value-type="float">
            <text:p>0.0869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24</text:p>
          </table:table-cell>
          <table:table-cell office:value-type="float" office:value="0.53739" calcext:value-type="float">
            <text:p>0.5373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24</text:p>
          </table:table-cell>
          <table:table-cell office:value-type="float" office:value="0.563212" calcext:value-type="float">
            <text:p>0.56321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24</text:p>
          </table:table-cell>
          <table:table-cell office:value-type="float" office:value="0.088609" calcext:value-type="float">
            <text:p>0.088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24</text:p>
          </table:table-cell>
          <table:table-cell office:value-type="float" office:value="0.528411" calcext:value-type="float">
            <text:p>0.52841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24</text:p>
          </table:table-cell>
          <table:table-cell office:value-type="float" office:value="0.832769" calcext:value-type="float">
            <text:p>0.83276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24</text:p>
          </table:table-cell>
          <table:table-cell office:value-type="float" office:value="0.122987" calcext:value-type="float">
            <text:p>0.1229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56</text:p>
          </table:table-cell>
          <table:table-cell office:value-type="float" office:value="0.646516" calcext:value-type="float">
            <text:p>0.64651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56</text:p>
          </table:table-cell>
          <table:table-cell office:value-type="float" office:value="0.790538" calcext:value-type="float">
            <text:p>0.79053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56</text:p>
          </table:table-cell>
          <table:table-cell office:value-type="float" office:value="0.125948" calcext:value-type="float">
            <text:p>0.1259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56</text:p>
          </table:table-cell>
          <table:table-cell office:value-type="float" office:value="0.604013" calcext:value-type="float">
            <text:p>0.60401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56</text:p>
          </table:table-cell>
          <table:table-cell office:value-type="float" office:value="1.146657" calcext:value-type="float">
            <text:p>1.14665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56</text:p>
          </table:table-cell>
          <table:table-cell office:value-type="float" office:value="0.173091" calcext:value-type="float">
            <text:p>0.1730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88</text:p>
          </table:table-cell>
          <table:table-cell office:value-type="float" office:value="0.7685" calcext:value-type="float">
            <text:p>0.768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88</text:p>
          </table:table-cell>
          <table:table-cell office:value-type="float" office:value="1.205929" calcext:value-type="float">
            <text:p>1.20592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88</text:p>
          </table:table-cell>
          <table:table-cell office:value-type="float" office:value="0.184956" calcext:value-type="float">
            <text:p>0.1849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88</text:p>
          </table:table-cell>
          <table:table-cell office:value-type="float" office:value="0.655003" calcext:value-type="float">
            <text:p>0.65500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88</text:p>
          </table:table-cell>
          <table:table-cell office:value-type="float" office:value="1.510728" calcext:value-type="float">
            <text:p>1.51072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88</text:p>
          </table:table-cell>
          <table:table-cell office:value-type="float" office:value="0.221307" calcext:value-type="float">
            <text:p>0.2213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20</text:p>
          </table:table-cell>
          <table:table-cell office:value-type="float" office:value="0.937676" calcext:value-type="float">
            <text:p>0.93767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20</text:p>
          </table:table-cell>
          <table:table-cell office:value-type="float" office:value="1.590564" calcext:value-type="float">
            <text:p>1.5905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20</text:p>
          </table:table-cell>
          <table:table-cell office:value-type="float" office:value="0.249402" calcext:value-type="float">
            <text:p>0.249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20</text:p>
          </table:table-cell>
          <table:table-cell office:value-type="float" office:value="0.733604" calcext:value-type="float">
            <text:p>0.73360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20</text:p>
          </table:table-cell>
          <table:table-cell office:value-type="float" office:value="1.952475" calcext:value-type="float">
            <text:p>1.95247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20</text:p>
          </table:table-cell>
          <table:table-cell office:value-type="float" office:value="0.341209" calcext:value-type="float">
            <text:p>0.341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52</text:p>
          </table:table-cell>
          <table:table-cell office:value-type="float" office:value="1.072705" calcext:value-type="float">
            <text:p>1.072705</text:p>
          </table:table-cell>
          <table:table-cell office:value-type="string" calcext:value-type="string">
            <text:p>compile Full mult</text:p>
          </table:table-cell>
          <table:table-cell table:number-columns-repeated="2"/>
          <table:table-cell>
            <draw:frame draw:z-index="8" draw:style-name="gr1" draw:text-style-name="P1" svg:width="8.4248in" svg:height="4.3925in" svg:x="0.0276in" svg:y="0.0291in">
              <draw:object draw:notify-on-update-of-ranges="Timing.J1110:Timing.AA1110 Timing.I1119:Timing.I1119 Timing.J1119:Timing.AA1119 Timing.I1120:Timing.I1120 Timing.J1120:Timing.AA1120 Timing.I1121:Timing.I1121 Timing.J1121:Timing.AA1121 Timing.I1122:Timing.I1122 Timing.J1122:Timing.AA1122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-n=1 -d=352</text:p>
          </table:table-cell>
          <table:table-cell office:value-type="float" office:value="1.998456" calcext:value-type="float">
            <text:p>1.9984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52</text:p>
          </table:table-cell>
          <table:table-cell office:value-type="float" office:value="0.304661" calcext:value-type="float">
            <text:p>0.3046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52</text:p>
          </table:table-cell>
          <table:table-cell office:value-type="float" office:value="0.856549" calcext:value-type="float">
            <text:p>0.85654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52</text:p>
          </table:table-cell>
          <table:table-cell office:value-type="float" office:value="2.913386" calcext:value-type="float">
            <text:p>2.91338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52</text:p>
          </table:table-cell>
          <table:table-cell office:value-type="float" office:value="0.418803" calcext:value-type="float">
            <text:p>0.4188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84</text:p>
          </table:table-cell>
          <table:table-cell office:value-type="float" office:value="1.26347" calcext:value-type="float">
            <text:p>1.2634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84</text:p>
          </table:table-cell>
          <table:table-cell office:value-type="float" office:value="2.543847" calcext:value-type="float">
            <text:p>2.54384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84</text:p>
          </table:table-cell>
          <table:table-cell office:value-type="float" office:value="0.399475" calcext:value-type="float">
            <text:p>0.3994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84</text:p>
          </table:table-cell>
          <table:table-cell office:value-type="float" office:value="0.904445" calcext:value-type="float">
            <text:p>0.90444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84</text:p>
          </table:table-cell>
          <table:table-cell office:value-type="float" office:value="6.452958" calcext:value-type="float">
            <text:p>6.45295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84</text:p>
          </table:table-cell>
          <table:table-cell office:value-type="float" office:value="0.877601" calcext:value-type="float">
            <text:p>0.8776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16</text:p>
          </table:table-cell>
          <table:table-cell office:value-type="float" office:value="1.404286" calcext:value-type="float">
            <text:p>1.40428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16</text:p>
          </table:table-cell>
          <table:table-cell office:value-type="float" office:value="3.120268" calcext:value-type="float">
            <text:p>3.12026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16</text:p>
          </table:table-cell>
          <table:table-cell office:value-type="float" office:value="0.483913" calcext:value-type="float">
            <text:p>0.4839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16</text:p>
          </table:table-cell>
          <table:table-cell office:value-type="float" office:value="1.00197" calcext:value-type="float">
            <text:p>1.0019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16</text:p>
          </table:table-cell>
          <table:table-cell office:value-type="float" office:value="5.735005" calcext:value-type="float">
            <text:p>5.73500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16</text:p>
          </table:table-cell>
          <table:table-cell office:value-type="float" office:value="1.083806" calcext:value-type="float">
            <text:p>1.0838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48</text:p>
          </table:table-cell>
          <table:table-cell office:value-type="float" office:value="1.598928" calcext:value-type="float">
            <text:p>1.59892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48</text:p>
          </table:table-cell>
          <table:table-cell office:value-type="float" office:value="3.805345" calcext:value-type="float">
            <text:p>3.80534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48</text:p>
          </table:table-cell>
          <table:table-cell office:value-type="float" office:value="0.575486" calcext:value-type="float">
            <text:p>0.5754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48</text:p>
          </table:table-cell>
          <table:table-cell office:value-type="float" office:value="1.104497" calcext:value-type="float">
            <text:p>1.10449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48</text:p>
          </table:table-cell>
          <table:table-cell office:value-type="float" office:value="8.630354" calcext:value-type="float">
            <text:p>8.63035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48</text:p>
          </table:table-cell>
          <table:table-cell office:value-type="float" office:value="1.291524" calcext:value-type="float">
            <text:p>1.2915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80</text:p>
          </table:table-cell>
          <table:table-cell office:value-type="float" office:value="1.805677" calcext:value-type="float">
            <text:p>1.80567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80</text:p>
          </table:table-cell>
          <table:table-cell office:value-type="float" office:value="4.615666" calcext:value-type="float">
            <text:p>4.61566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80</text:p>
          </table:table-cell>
          <table:table-cell office:value-type="float" office:value="0.659748" calcext:value-type="float">
            <text:p>0.6597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80</text:p>
          </table:table-cell>
          <table:table-cell office:value-type="float" office:value="1.26525" calcext:value-type="float">
            <text:p>1.2652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80</text:p>
          </table:table-cell>
          <table:table-cell office:value-type="float" office:value="7.770251" calcext:value-type="float">
            <text:p>7.77025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80</text:p>
          </table:table-cell>
          <table:table-cell office:value-type="float" office:value="1.536153" calcext:value-type="float">
            <text:p>1.5361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12</text:p>
          </table:table-cell>
          <table:table-cell office:value-type="float" office:value="2.037635" calcext:value-type="float">
            <text:p>2.03763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12</text:p>
          </table:table-cell>
          <table:table-cell office:value-type="float" office:value="5.781734" calcext:value-type="float">
            <text:p>5.78173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12</text:p>
          </table:table-cell>
          <table:table-cell office:value-type="float" office:value="1.434297" calcext:value-type="float">
            <text:p>1.4342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12</text:p>
          </table:table-cell>
          <table:table-cell office:value-type="float" office:value="1.386155" calcext:value-type="float">
            <text:p>1.38615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12</text:p>
          </table:table-cell>
          <table:table-cell office:value-type="float" office:value="9.957042" calcext:value-type="float">
            <text:p>9.95704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12</text:p>
          </table:table-cell>
          <table:table-cell office:value-type="float" office:value="1.7882" calcext:value-type="float">
            <text:p>1.78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44</text:p>
          </table:table-cell>
          <table:table-cell office:value-type="float" office:value="2.242372" calcext:value-type="float">
            <text:p>2.24237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44</text:p>
          </table:table-cell>
          <table:table-cell office:value-type="float" office:value="8.378145" calcext:value-type="float">
            <text:p>8.37814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44</text:p>
          </table:table-cell>
          <table:table-cell office:value-type="float" office:value="1.699447" calcext:value-type="float">
            <text:p>1.699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44</text:p>
          </table:table-cell>
          <table:table-cell office:value-type="float" office:value="1.475445" calcext:value-type="float">
            <text:p>1.47544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44</text:p>
          </table:table-cell>
          <table:table-cell office:value-type="float" office:value="13.020107" calcext:value-type="float">
            <text:p>13.02010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44</text:p>
          </table:table-cell>
          <table:table-cell office:value-type="float" office:value="2.16244" calcext:value-type="float">
            <text:p>2.162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76</text:p>
          </table:table-cell>
          <table:table-cell office:value-type="float" office:value="2.504222" calcext:value-type="float">
            <text:p>2.50422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76</text:p>
          </table:table-cell>
          <table:table-cell office:value-type="float" office:value="8.818791" calcext:value-type="float">
            <text:p>8.81879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76</text:p>
          </table:table-cell>
          <table:table-cell office:value-type="float" office:value="1.140655" calcext:value-type="float">
            <text:p>1.1406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76</text:p>
          </table:table-cell>
          <table:table-cell office:value-type="float" office:value="1.586585" calcext:value-type="float">
            <text:p>1.58658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76</text:p>
          </table:table-cell>
          <table:table-cell office:value-type="float" office:value="13.820134" calcext:value-type="float">
            <text:p>13.82013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76</text:p>
          </table:table-cell>
          <table:table-cell office:value-type="float" office:value="2.397848" calcext:value-type="float">
            <text:p>2.397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08</text:p>
          </table:table-cell>
          <table:table-cell office:value-type="float" office:value="2.787735" calcext:value-type="float">
            <text:p>2.78773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08</text:p>
          </table:table-cell>
          <table:table-cell office:value-type="float" office:value="10.090119" calcext:value-type="float">
            <text:p>10.09011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08</text:p>
          </table:table-cell>
          <table:table-cell office:value-type="float" office:value="2.378088" calcext:value-type="float">
            <text:p>2.3780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08</text:p>
          </table:table-cell>
          <table:table-cell office:value-type="float" office:value="1.708919" calcext:value-type="float">
            <text:p>1.70891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08</text:p>
          </table:table-cell>
          <table:table-cell office:value-type="float" office:value="18.405699" calcext:value-type="float">
            <text:p>18.40569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08</text:p>
          </table:table-cell>
          <table:table-cell office:value-type="float" office:value="2.830069" calcext:value-type="float">
            <text:p>2.8300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40</text:p>
          </table:table-cell>
          <table:table-cell office:value-type="float" office:value="3.090211" calcext:value-type="float">
            <text:p>3.09021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40</text:p>
          </table:table-cell>
          <table:table-cell office:value-type="float" office:value="13.235677" calcext:value-type="float">
            <text:p>13.23567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40</text:p>
          </table:table-cell>
          <table:table-cell office:value-type="float" office:value="2.748344" calcext:value-type="float">
            <text:p>2.7483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40</text:p>
          </table:table-cell>
          <table:table-cell office:value-type="float" office:value="1.861087" calcext:value-type="float">
            <text:p>1.86108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40</text:p>
          </table:table-cell>
          <table:table-cell office:value-type="float" office:value="20.601383" calcext:value-type="float">
            <text:p>20.60138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40</text:p>
          </table:table-cell>
          <table:table-cell office:value-type="float" office:value="3.033465" calcext:value-type="float">
            <text:p>3.0334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72</text:p>
          </table:table-cell>
          <table:table-cell office:value-type="float" office:value="3.414651" calcext:value-type="float">
            <text:p>3.41465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72</text:p>
          </table:table-cell>
          <table:table-cell office:value-type="float" office:value="17.365067" calcext:value-type="float">
            <text:p>17.36506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72</text:p>
          </table:table-cell>
          <table:table-cell office:value-type="float" office:value="3.128687" calcext:value-type="float">
            <text:p>3.1286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72</text:p>
          </table:table-cell>
          <table:table-cell office:value-type="float" office:value="2.012163" calcext:value-type="float">
            <text:p>2.01216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72</text:p>
          </table:table-cell>
          <table:table-cell office:value-type="float" office:value="24.554743" calcext:value-type="float">
            <text:p>24.55474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72</text:p>
          </table:table-cell>
          <table:table-cell office:value-type="float" office:value="3.432211" calcext:value-type="float">
            <text:p>3.4322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04</text:p>
          </table:table-cell>
          <table:table-cell office:value-type="float" office:value="3.759025" calcext:value-type="float">
            <text:p>3.75902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04</text:p>
          </table:table-cell>
          <table:table-cell office:value-type="float" office:value="20.806862" calcext:value-type="float">
            <text:p>20.80686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04</text:p>
          </table:table-cell>
          <table:table-cell office:value-type="float" office:value="3.376304" calcext:value-type="float">
            <text:p>3.376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04</text:p>
          </table:table-cell>
          <table:table-cell office:value-type="float" office:value="2.159678" calcext:value-type="float">
            <text:p>2.15967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04</text:p>
          </table:table-cell>
          <table:table-cell office:value-type="float" office:value="27.595544" calcext:value-type="float">
            <text:p>27.59554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04</text:p>
          </table:table-cell>
          <table:table-cell office:value-type="float" office:value="3.81947" calcext:value-type="float">
            <text:p>3.819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36</text:p>
          </table:table-cell>
          <table:table-cell office:value-type="float" office:value="4.10339" calcext:value-type="float">
            <text:p>4.1033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36</text:p>
          </table:table-cell>
          <table:table-cell office:value-type="float" office:value="21.357993" calcext:value-type="float">
            <text:p>21.35799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36</text:p>
          </table:table-cell>
          <table:table-cell office:value-type="float" office:value="3.62038" calcext:value-type="float">
            <text:p>3.620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36</text:p>
          </table:table-cell>
          <table:table-cell office:value-type="float" office:value="2.303551" calcext:value-type="float">
            <text:p>2.30355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36</text:p>
          </table:table-cell>
          <table:table-cell office:value-type="float" office:value="32.432152" calcext:value-type="float">
            <text:p>32.43215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36</text:p>
          </table:table-cell>
          <table:table-cell office:value-type="float" office:value="4.137124" calcext:value-type="float">
            <text:p>4.1371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68</text:p>
          </table:table-cell>
          <table:table-cell office:value-type="float" office:value="4.488991" calcext:value-type="float">
            <text:p>4.48899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68</text:p>
          </table:table-cell>
          <table:table-cell office:value-type="float" office:value="22.410344" calcext:value-type="float">
            <text:p>22.41034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68</text:p>
          </table:table-cell>
          <table:table-cell office:value-type="float" office:value="2.61696" calcext:value-type="float">
            <text:p>2.616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68</text:p>
          </table:table-cell>
          <table:table-cell office:value-type="float" office:value="2.420683" calcext:value-type="float">
            <text:p>2.42068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68</text:p>
          </table:table-cell>
          <table:table-cell office:value-type="float" office:value="33.35246" calcext:value-type="float">
            <text:p>33.3524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68</text:p>
          </table:table-cell>
          <table:table-cell office:value-type="float" office:value="4.075937" calcext:value-type="float">
            <text:p>4.0759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00</text:p>
          </table:table-cell>
          <table:table-cell office:value-type="float" office:value="4.89429" calcext:value-type="float">
            <text:p>4.8942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00</text:p>
          </table:table-cell>
          <table:table-cell office:value-type="float" office:value="24.069571" calcext:value-type="float">
            <text:p>24.06957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00</text:p>
          </table:table-cell>
          <table:table-cell office:value-type="float" office:value="2.970874" calcext:value-type="float">
            <text:p>2.9708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00</text:p>
          </table:table-cell>
          <table:table-cell office:value-type="float" office:value="2.622639" calcext:value-type="float">
            <text:p>2.62263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00</text:p>
          </table:table-cell>
          <table:table-cell office:value-type="float" office:value="35.146882" calcext:value-type="float">
            <text:p>35.14688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00</text:p>
          </table:table-cell>
          <table:table-cell office:value-type="float" office:value="5.115052" calcext:value-type="float">
            <text:p>5.1150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32</text:p>
          </table:table-cell>
          <table:table-cell office:value-type="float" office:value="5.329147" calcext:value-type="float">
            <text:p>5.329147</text:p>
          </table:table-cell>
          <table:table-cell office:value-type="string" calcext:value-type="string">
            <text:p>compile Full mult</text:p>
          </table:table-cell>
          <table:table-cell/>
          <table:table-cell office:value-type="string" calcext:value-type="string">
            <text:p>register allocation failed, insufficient capacity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n=0 -d=832</text:p>
          </table:table-cell>
          <table:table-cell office:value-type="float" office:value="2.760312" calcext:value-type="float">
            <text:p>2.76031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32</text:p>
          </table:table-cell>
          <table:table-cell office:value-type="float" office:value="39.42689" calcext:value-type="float">
            <text:p>39.4268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32</text:p>
          </table:table-cell>
          <table:table-cell office:value-type="float" office:value="3.77237" calcext:value-type="float">
            <text:p>3.772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64</text:p>
          </table:table-cell>
          <table:table-cell office:value-type="float" office:value="5.652476" calcext:value-type="float">
            <text:p>5.65247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64</text:p>
          </table:table-cell>
          <table:table-cell office:value-type="float" office:value="2.894434" calcext:value-type="float">
            <text:p>2.89443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64</text:p>
          </table:table-cell>
          <table:table-cell office:value-type="float" office:value="43.334053" calcext:value-type="float">
            <text:p>43.33405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64</text:p>
          </table:table-cell>
          <table:table-cell office:value-type="float" office:value="5.258296" calcext:value-type="float">
            <text:p>5.2582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96</text:p>
          </table:table-cell>
          <table:table-cell office:value-type="float" office:value="6.110036" calcext:value-type="float">
            <text:p>6.11003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96</text:p>
          </table:table-cell>
          <table:table-cell office:value-type="float" office:value="3.081546" calcext:value-type="float">
            <text:p>3.081546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96</text:p>
          </table:table-cell>
          <table:table-cell office:value-type="float" office:value="45.185393" calcext:value-type="float">
            <text:p>45.18539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96</text:p>
          </table:table-cell>
          <table:table-cell office:value-type="float" office:value="6.711325" calcext:value-type="float">
            <text:p>6.7113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28</text:p>
          </table:table-cell>
          <table:table-cell office:value-type="float" office:value="6.625988" calcext:value-type="float">
            <text:p>6.62598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28</text:p>
          </table:table-cell>
          <table:table-cell office:value-type="float" office:value="3.280377" calcext:value-type="float">
            <text:p>3.28037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928</text:p>
          </table:table-cell>
          <table:table-cell office:value-type="float" office:value="49.938726" calcext:value-type="float">
            <text:p>49.93872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928</text:p>
          </table:table-cell>
          <table:table-cell office:value-type="float" office:value="5.198809" calcext:value-type="float">
            <text:p>5.1988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60</text:p>
          </table:table-cell>
          <table:table-cell office:value-type="float" office:value="7.137072" calcext:value-type="float">
            <text:p>7.13707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60</text:p>
          </table:table-cell>
          <table:table-cell office:value-type="float" office:value="3.4723" calcext:value-type="float">
            <text:p>3.472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960</text:p>
          </table:table-cell>
          <table:table-cell office:value-type="float" office:value="50.339155" calcext:value-type="float">
            <text:p>50.33915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960</text:p>
          </table:table-cell>
          <table:table-cell office:value-type="float" office:value="5.689355" calcext:value-type="float">
            <text:p>5.6893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92</text:p>
          </table:table-cell>
          <table:table-cell office:value-type="float" office:value="7.648255" calcext:value-type="float">
            <text:p>7.64825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92</text:p>
          </table:table-cell>
          <table:table-cell office:value-type="float" office:value="3.686372" calcext:value-type="float">
            <text:p>3.68637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992</text:p>
          </table:table-cell>
          <table:table-cell office:value-type="float" office:value="55.670253" calcext:value-type="float">
            <text:p>55.67025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992</text:p>
          </table:table-cell>
          <table:table-cell office:value-type="float" office:value="5.948296" calcext:value-type="float">
            <text:p>5.94829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Hereafter: register allocation failed, insufficient capacit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169efd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</text:p>
          </table:table-cell>
          <table:table-cell office:value-type="float" office:value="0.362351" calcext:value-type="float">
            <text:p>0.36235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</text:p>
          </table:table-cell>
          <table:table-cell office:value-type="float" office:value="0.01278" calcext:value-type="float">
            <text:p>0.0127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</text:p>
          </table:table-cell>
          <table:table-cell office:value-type="float" office:value="0.005818" calcext:value-type="float">
            <text:p>0.0058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4658" calcext:value-type="float">
            <text:p>0.0046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4392" calcext:value-type="float">
            <text:p>0.0043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</text:p>
          </table:table-cell>
          <table:table-cell office:value-type="float" office:value="0.526847" calcext:value-type="float">
            <text:p>0.52684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</text:p>
          </table:table-cell>
          <table:table-cell office:value-type="float" office:value="0.023492" calcext:value-type="float">
            <text:p>0.02349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</text:p>
          </table:table-cell>
          <table:table-cell office:value-type="float" office:value="0.009959" calcext:value-type="float">
            <text:p>0.0099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7889" calcext:value-type="float">
            <text:p>0.0078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7405" calcext:value-type="float">
            <text:p>0.0074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</text:p>
          </table:table-cell>
          <table:table-cell office:value-type="float" office:value="0.392208" calcext:value-type="float">
            <text:p>0.39220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</text:p>
          </table:table-cell>
          <table:table-cell office:value-type="float" office:value="0.051555" calcext:value-type="float">
            <text:p>0.05155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</text:p>
          </table:table-cell>
          <table:table-cell office:value-type="float" office:value="0.019993" calcext:value-type="float">
            <text:p>0.0199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13555" calcext:value-type="float">
            <text:p>0.0135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1697" calcext:value-type="float">
            <text:p>0.0116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</text:p>
          </table:table-cell>
          <table:table-cell office:value-type="float" office:value="0.624118" calcext:value-type="float">
            <text:p>0.62411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</text:p>
          </table:table-cell>
          <table:table-cell office:value-type="float" office:value="0.090416" calcext:value-type="float">
            <text:p>0.09041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</text:p>
          </table:table-cell>
          <table:table-cell office:value-type="float" office:value="0.032003" calcext:value-type="float">
            <text:p>0.0320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20391" calcext:value-type="float">
            <text:p>0.0203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7818" calcext:value-type="float">
            <text:p>0.0178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96</text:p>
          </table:table-cell>
          <table:table-cell office:value-type="float" office:value="0.517915" calcext:value-type="float">
            <text:p>0.51791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96</text:p>
          </table:table-cell>
          <table:table-cell office:value-type="float" office:value="0.149366" calcext:value-type="float">
            <text:p>0.14936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96</text:p>
          </table:table-cell>
          <table:table-cell office:value-type="float" office:value="0.059048" calcext:value-type="float">
            <text:p>0.059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32204" calcext:value-type="float">
            <text:p>0.0322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26693" calcext:value-type="float">
            <text:p>0.026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96</text:p>
          </table:table-cell>
          <table:table-cell office:value-type="float" office:value="0.709844" calcext:value-type="float">
            <text:p>0.70984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96</text:p>
          </table:table-cell>
          <table:table-cell office:value-type="float" office:value="0.23245" calcext:value-type="float">
            <text:p>0.2324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96</text:p>
          </table:table-cell>
          <table:table-cell office:value-type="float" office:value="0.074096" calcext:value-type="float">
            <text:p>0.0740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43102" calcext:value-type="float">
            <text:p>0.0431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33953" calcext:value-type="float">
            <text:p>0.0339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28</text:p>
          </table:table-cell>
          <table:table-cell office:value-type="float" office:value="0.66091" calcext:value-type="float">
            <text:p>0.6609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28</text:p>
          </table:table-cell>
          <table:table-cell office:value-type="float" office:value="0.295973" calcext:value-type="float">
            <text:p>0.2959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28</text:p>
          </table:table-cell>
          <table:table-cell office:value-type="float" office:value="0.113209" calcext:value-type="float">
            <text:p>0.113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61115" calcext:value-type="float">
            <text:p>0.0611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49156" calcext:value-type="float">
            <text:p>0.0491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28</text:p>
          </table:table-cell>
          <table:table-cell office:value-type="float" office:value="0.876079" calcext:value-type="float">
            <text:p>0.87607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28</text:p>
          </table:table-cell>
          <table:table-cell office:value-type="float" office:value="0.432476" calcext:value-type="float">
            <text:p>0.43247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28</text:p>
          </table:table-cell>
          <table:table-cell office:value-type="float" office:value="0.148374" calcext:value-type="float">
            <text:p>0.1483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80194" calcext:value-type="float">
            <text:p>0.080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61906" calcext:value-type="float">
            <text:p>0.0619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0</text:p>
          </table:table-cell>
          <table:table-cell office:value-type="float" office:value="0.821322" calcext:value-type="float">
            <text:p>0.82132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0</text:p>
          </table:table-cell>
          <table:table-cell office:value-type="float" office:value="0.510172" calcext:value-type="float">
            <text:p>0.51017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0</text:p>
          </table:table-cell>
          <table:table-cell office:value-type="float" office:value="0.262411" calcext:value-type="float">
            <text:p>0.2624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159876" calcext:value-type="float">
            <text:p>0.1598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133648" calcext:value-type="float">
            <text:p>0.133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0</text:p>
          </table:table-cell>
          <table:table-cell office:value-type="float" office:value="0.985021" calcext:value-type="float">
            <text:p>0.98502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0</text:p>
          </table:table-cell>
          <table:table-cell office:value-type="float" office:value="0.811154" calcext:value-type="float">
            <text:p>0.81115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0</text:p>
          </table:table-cell>
          <table:table-cell office:value-type="float" office:value="0.353562" calcext:value-type="float">
            <text:p>0.3535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186041" calcext:value-type="float">
            <text:p>0.1860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152001" calcext:value-type="float">
            <text:p>0.152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92</text:p>
          </table:table-cell>
          <table:table-cell office:value-type="float" office:value="1.017243" calcext:value-type="float">
            <text:p>1.017243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92</text:p>
          </table:table-cell>
          <table:table-cell office:value-type="float" office:value="0.847281" calcext:value-type="float">
            <text:p>0.84728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92</text:p>
          </table:table-cell>
          <table:table-cell office:value-type="float" office:value="0.446527" calcext:value-type="float">
            <text:p>0.4465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255905" calcext:value-type="float">
            <text:p>0.255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214019" calcext:value-type="float">
            <text:p>0.2140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92</text:p>
          </table:table-cell>
          <table:table-cell office:value-type="float" office:value="1.10013" calcext:value-type="float">
            <text:p>1.1001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92</text:p>
          </table:table-cell>
          <table:table-cell office:value-type="float" office:value="0.847281" calcext:value-type="float">
            <text:p>0.84728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92</text:p>
          </table:table-cell>
          <table:table-cell office:value-type="float" office:value="0.446527" calcext:value-type="float">
            <text:p>0.4465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255905" calcext:value-type="float">
            <text:p>0.255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214019" calcext:value-type="float">
            <text:p>0.2140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24</text:p>
          </table:table-cell>
          <table:table-cell office:value-type="float" office:value="1.240902" calcext:value-type="float">
            <text:p>1.24090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24</text:p>
          </table:table-cell>
          <table:table-cell office:value-type="float" office:value="1.257056" calcext:value-type="float">
            <text:p>1.2570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24</text:p>
          </table:table-cell>
          <table:table-cell office:value-type="float" office:value="0.628131" calcext:value-type="float">
            <text:p>0.6281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389945" calcext:value-type="float">
            <text:p>0.3899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300714" calcext:value-type="float">
            <text:p>0.3007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24</text:p>
          </table:table-cell>
          <table:table-cell office:value-type="float" office:value="1.260799" calcext:value-type="float">
            <text:p>1.26079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24</text:p>
          </table:table-cell>
          <table:table-cell office:value-type="float" office:value="1.822423" calcext:value-type="float">
            <text:p>1.8224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24</text:p>
          </table:table-cell>
          <table:table-cell office:value-type="float" office:value="0.809925" calcext:value-type="float">
            <text:p>0.8099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395829" calcext:value-type="float">
            <text:p>0.3958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310008" calcext:value-type="float">
            <text:p>0.3100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56</text:p>
          </table:table-cell>
          <table:table-cell office:value-type="float" office:value="1.493736" calcext:value-type="float">
            <text:p>1.49373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56</text:p>
          </table:table-cell>
          <table:table-cell office:value-type="float" office:value="1.897499" calcext:value-type="float">
            <text:p>1.89749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56</text:p>
          </table:table-cell>
          <table:table-cell office:value-type="float" office:value="0.934243" calcext:value-type="float">
            <text:p>0.9342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523071" calcext:value-type="float">
            <text:p>0.523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429994" calcext:value-type="float">
            <text:p>0.4299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56</text:p>
          </table:table-cell>
          <table:table-cell office:value-type="float" office:value="1.46218" calcext:value-type="float">
            <text:p>1.4621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56</text:p>
          </table:table-cell>
          <table:table-cell office:value-type="float" office:value="2.653614" calcext:value-type="float">
            <text:p>2.65361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56</text:p>
          </table:table-cell>
          <table:table-cell office:value-type="float" office:value="1.11799" calcext:value-type="float">
            <text:p>1.117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540941" calcext:value-type="float">
            <text:p>0.5409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451143" calcext:value-type="float">
            <text:p>0.4511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88</text:p>
          </table:table-cell>
          <table:table-cell office:value-type="float" office:value="1.780938" calcext:value-type="float">
            <text:p>1.78093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88</text:p>
          </table:table-cell>
          <table:table-cell office:value-type="float" office:value="2.419644" calcext:value-type="float">
            <text:p>2.41964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88</text:p>
          </table:table-cell>
          <table:table-cell office:value-type="float" office:value="1.31319" calcext:value-type="float">
            <text:p>1.313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749189" calcext:value-type="float">
            <text:p>0.7491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569155" calcext:value-type="float">
            <text:p>0.5691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88</text:p>
          </table:table-cell>
          <table:table-cell office:value-type="float" office:value="1.53697" calcext:value-type="float">
            <text:p>1.5369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88</text:p>
          </table:table-cell>
          <table:table-cell office:value-type="float" office:value="3.51391" calcext:value-type="float">
            <text:p>3.5139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88</text:p>
          </table:table-cell>
          <table:table-cell office:value-type="float" office:value="1.453733" calcext:value-type="float">
            <text:p>1.4537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680672" calcext:value-type="float">
            <text:p>0.6806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43534" calcext:value-type="float">
            <text:p>0.435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0</text:p>
          </table:table-cell>
          <table:table-cell office:value-type="float" office:value="2.090909" calcext:value-type="float">
            <text:p>2.09090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0</text:p>
          </table:table-cell>
          <table:table-cell office:value-type="float" office:value="3.549483" calcext:value-type="float">
            <text:p>3.54948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0</text:p>
          </table:table-cell>
          <table:table-cell office:value-type="float" office:value="1.733" calcext:value-type="float">
            <text:p>1.7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1.009492" calcext:value-type="float">
            <text:p>1.0094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746288" calcext:value-type="float">
            <text:p>0.7462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0</text:p>
          </table:table-cell>
          <table:table-cell office:value-type="float" office:value="1.720625" calcext:value-type="float">
            <text:p>1.72062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0</text:p>
          </table:table-cell>
          <table:table-cell office:value-type="float" office:value="4.766537" calcext:value-type="float">
            <text:p>4.76653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0</text:p>
          </table:table-cell>
          <table:table-cell office:value-type="float" office:value="1.992679" calcext:value-type="float">
            <text:p>1.9926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0.96096" calcext:value-type="float">
            <text:p>0.960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806895" calcext:value-type="float">
            <text:p>0.8068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52</text:p>
          </table:table-cell>
          <table:table-cell office:value-type="float" office:value="2.437857" calcext:value-type="float">
            <text:p>2.43785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52</text:p>
          </table:table-cell>
          <table:table-cell office:value-type="float" office:value="4.652257" calcext:value-type="float">
            <text:p>4.65225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52</text:p>
          </table:table-cell>
          <table:table-cell office:value-type="float" office:value="2.138285" calcext:value-type="float">
            <text:p>2.1382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1.260941" calcext:value-type="float">
            <text:p>1.2609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0.912538" calcext:value-type="float">
            <text:p>0.9125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52</text:p>
          </table:table-cell>
          <table:table-cell office:value-type="float" office:value="1.93662" calcext:value-type="float">
            <text:p>1.9366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52</text:p>
          </table:table-cell>
          <table:table-cell office:value-type="float" office:value="5.941849" calcext:value-type="float">
            <text:p>5.94184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52</text:p>
          </table:table-cell>
          <table:table-cell office:value-type="float" office:value="2.480137" calcext:value-type="float">
            <text:p>2.4801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1.392117" calcext:value-type="float">
            <text:p>1.3921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1.011592" calcext:value-type="float">
            <text:p>1.0115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84</text:p>
          </table:table-cell>
          <table:table-cell office:value-type="float" office:value="2.820298" calcext:value-type="float">
            <text:p>2.82029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84</text:p>
          </table:table-cell>
          <table:table-cell office:value-type="float" office:value="6.023474" calcext:value-type="float">
            <text:p>6.02347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84</text:p>
          </table:table-cell>
          <table:table-cell office:value-type="float" office:value="2.837682" calcext:value-type="float">
            <text:p>2.8376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1.621595" calcext:value-type="float">
            <text:p>1.6215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1.234952" calcext:value-type="float">
            <text:p>1.2349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84</text:p>
          </table:table-cell>
          <table:table-cell office:value-type="float" office:value="2.144511" calcext:value-type="float">
            <text:p>2.14451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84</text:p>
          </table:table-cell>
          <table:table-cell office:value-type="float" office:value="7.56293" calcext:value-type="float">
            <text:p>7.5629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84</text:p>
          </table:table-cell>
          <table:table-cell office:value-type="float" office:value="3.249081" calcext:value-type="float">
            <text:p>3.2490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1.611516" calcext:value-type="float">
            <text:p>1.6115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1.241624" calcext:value-type="float">
            <text:p>1.2416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16</text:p>
          </table:table-cell>
          <table:table-cell office:value-type="float" office:value="3.232339" calcext:value-type="float">
            <text:p>3.23233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16</text:p>
          </table:table-cell>
          <table:table-cell office:value-type="float" office:value="7.43767" calcext:value-type="float">
            <text:p>7.4376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16</text:p>
          </table:table-cell>
          <table:table-cell office:value-type="float" office:value="3.566144" calcext:value-type="float">
            <text:p>3.5661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2.030462" calcext:value-type="float">
            <text:p>2.0304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514788" calcext:value-type="float">
            <text:p>1.5147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16</text:p>
          </table:table-cell>
          <table:table-cell office:value-type="float" office:value="2.359075" calcext:value-type="float">
            <text:p>2.35907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16</text:p>
          </table:table-cell>
          <table:table-cell office:value-type="float" office:value="9.405276" calcext:value-type="float">
            <text:p>9.40527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16</text:p>
          </table:table-cell>
          <table:table-cell office:value-type="float" office:value="3.889204" calcext:value-type="float">
            <text:p>3.8892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2.072468" calcext:value-type="float">
            <text:p>2.0724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510554" calcext:value-type="float">
            <text:p>1.5105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48</text:p>
          </table:table-cell>
          <table:table-cell office:value-type="float" office:value="3.683158" calcext:value-type="float">
            <text:p>3.68315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48</text:p>
          </table:table-cell>
          <table:table-cell office:value-type="float" office:value="8.91678" calcext:value-type="float">
            <text:p>8.9167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48</text:p>
          </table:table-cell>
          <table:table-cell office:value-type="float" office:value="4.284831" calcext:value-type="float">
            <text:p>4.2848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2.506006" calcext:value-type="float">
            <text:p>2.5060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880915" calcext:value-type="float">
            <text:p>1.8809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48</text:p>
          </table:table-cell>
          <table:table-cell office:value-type="float" office:value="2.59098" calcext:value-type="float">
            <text:p>2.5909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48</text:p>
          </table:table-cell>
          <table:table-cell office:value-type="float" office:value="11.213092" calcext:value-type="float">
            <text:p>11.21309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48</text:p>
          </table:table-cell>
          <table:table-cell office:value-type="float" office:value="4.880118" calcext:value-type="float">
            <text:p>4.8801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2.485468" calcext:value-type="float">
            <text:p>2.4854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819359" calcext:value-type="float">
            <text:p>1.8193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0</text:p>
          </table:table-cell>
          <table:table-cell office:value-type="float" office:value="4.150767" calcext:value-type="float">
            <text:p>4.15076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0</text:p>
          </table:table-cell>
          <table:table-cell office:value-type="float" office:value="10.798172" calcext:value-type="float">
            <text:p>10.79817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0</text:p>
          </table:table-cell>
          <table:table-cell office:value-type="float" office:value="4.89005" calcext:value-type="float">
            <text:p>4.890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2.727857" calcext:value-type="float">
            <text:p>2.7278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884774" calcext:value-type="float">
            <text:p>1.8847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0</text:p>
          </table:table-cell>
          <table:table-cell office:value-type="float" office:value="2.84282" calcext:value-type="float">
            <text:p>2.8428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0</text:p>
          </table:table-cell>
          <table:table-cell office:value-type="float" office:value="13.573387" calcext:value-type="float">
            <text:p>13.57338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0</text:p>
          </table:table-cell>
          <table:table-cell office:value-type="float" office:value="5.152932" calcext:value-type="float">
            <text:p>5.152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2.878172" calcext:value-type="float">
            <text:p>2.8781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681095" calcext:value-type="float">
            <text:p>1.6810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12</text:p>
          </table:table-cell>
          <table:table-cell office:value-type="float" office:value="4.676152" calcext:value-type="float">
            <text:p>4.67615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12</text:p>
          </table:table-cell>
          <table:table-cell office:value-type="float" office:value="13.133143" calcext:value-type="float">
            <text:p>13.13314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12</text:p>
          </table:table-cell>
          <table:table-cell office:value-type="float" office:value="5.992877" calcext:value-type="float">
            <text:p>5.9928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3.405782" calcext:value-type="float">
            <text:p>3.4057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52213" calcext:value-type="float">
            <text:p>2.1522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12</text:p>
          </table:table-cell>
          <table:table-cell office:value-type="float" office:value="3.050584" calcext:value-type="float">
            <text:p>3.05058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12</text:p>
          </table:table-cell>
          <table:table-cell office:value-type="float" office:value="15.77623" calcext:value-type="float">
            <text:p>15.776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12</text:p>
          </table:table-cell>
          <table:table-cell office:value-type="float" office:value="6.492736" calcext:value-type="float">
            <text:p>6.4927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3.009091" calcext:value-type="float">
            <text:p>3.0090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31472" calcext:value-type="float">
            <text:p>2.1314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44</text:p>
          </table:table-cell>
          <table:table-cell office:value-type="float" office:value="5.243203" calcext:value-type="float">
            <text:p>5.243203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44</text:p>
          </table:table-cell>
          <table:table-cell office:value-type="float" office:value="15.184273" calcext:value-type="float">
            <text:p>15.1842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44</text:p>
          </table:table-cell>
          <table:table-cell office:value-type="float" office:value="6.8648" calcext:value-type="float">
            <text:p>6.8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3.814954" calcext:value-type="float">
            <text:p>3.8149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613264" calcext:value-type="float">
            <text:p>2.6132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44</text:p>
          </table:table-cell>
          <table:table-cell office:value-type="float" office:value="3.327779" calcext:value-type="float">
            <text:p>3.32777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44</text:p>
          </table:table-cell>
          <table:table-cell office:value-type="float" office:value="18.750967" calcext:value-type="float">
            <text:p>18.75096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44</text:p>
          </table:table-cell>
          <table:table-cell office:value-type="float" office:value="7.587917" calcext:value-type="float">
            <text:p>7.5879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3.766742" calcext:value-type="float">
            <text:p>3.7667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514422" calcext:value-type="float">
            <text:p>2.5144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76</text:p>
          </table:table-cell>
          <table:table-cell office:value-type="float" office:value="5.858444" calcext:value-type="float">
            <text:p>5.858444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76</text:p>
          </table:table-cell>
          <table:table-cell office:value-type="float" office:value="17.453051" calcext:value-type="float">
            <text:p>17.45305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76</text:p>
          </table:table-cell>
          <table:table-cell office:value-type="float" office:value="8.848187" calcext:value-type="float">
            <text:p>8.848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4.252371" calcext:value-type="float">
            <text:p>4.2523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3.033747" calcext:value-type="float">
            <text:p>3.0337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76</text:p>
          </table:table-cell>
          <table:table-cell office:value-type="float" office:value="3.618937" calcext:value-type="float">
            <text:p>3.61893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76</text:p>
          </table:table-cell>
          <table:table-cell office:value-type="float" office:value="21.427746" calcext:value-type="float">
            <text:p>21.42774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76</text:p>
          </table:table-cell>
          <table:table-cell office:value-type="float" office:value="9.138817" calcext:value-type="float">
            <text:p>9.1388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4.303339" calcext:value-type="float">
            <text:p>4.3033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2.836226" calcext:value-type="float">
            <text:p>2.8362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08</text:p>
          </table:table-cell>
          <table:table-cell office:value-type="float" office:value="6.520712" calcext:value-type="float">
            <text:p>6.52071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08</text:p>
          </table:table-cell>
          <table:table-cell office:value-type="float" office:value="20.335482" calcext:value-type="float">
            <text:p>20.33548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08</text:p>
          </table:table-cell>
          <table:table-cell office:value-type="float" office:value="9.134333" calcext:value-type="float">
            <text:p>9.134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4.960841" calcext:value-type="float">
            <text:p>4.9608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526375" calcext:value-type="float">
            <text:p>3.5263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08</text:p>
          </table:table-cell>
          <table:table-cell office:value-type="float" office:value="3.926302" calcext:value-type="float">
            <text:p>3.92630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08</text:p>
          </table:table-cell>
          <table:table-cell office:value-type="float" office:value="23.842691" calcext:value-type="float">
            <text:p>23.84269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08</text:p>
          </table:table-cell>
          <table:table-cell office:value-type="float" office:value="10.127571" calcext:value-type="float">
            <text:p>10.1275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4.709142" calcext:value-type="float">
            <text:p>4.7091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250722" calcext:value-type="float">
            <text:p>3.2507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0</text:p>
          </table:table-cell>
          <table:table-cell office:value-type="float" office:value="7.221591" calcext:value-type="float">
            <text:p>7.22159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0</text:p>
          </table:table-cell>
          <table:table-cell office:value-type="float" office:value="23.861704" calcext:value-type="float">
            <text:p>23.86170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0</text:p>
          </table:table-cell>
          <table:table-cell office:value-type="float" office:value="11.169195" calcext:value-type="float">
            <text:p>11.1691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5.909477" calcext:value-type="float">
            <text:p>5.9094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3.987187" calcext:value-type="float">
            <text:p>3.987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0</text:p>
          </table:table-cell>
          <table:table-cell office:value-type="float" office:value="4.343946" calcext:value-type="float">
            <text:p>4.343946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0</text:p>
          </table:table-cell>
          <table:table-cell office:value-type="float" office:value="27.837709" calcext:value-type="float">
            <text:p>27.83770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0</text:p>
          </table:table-cell>
          <table:table-cell office:value-type="float" office:value="11.445454" calcext:value-type="float">
            <text:p>11.4454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5.685758" calcext:value-type="float">
            <text:p>5.6857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3.74847" calcext:value-type="float">
            <text:p>3.748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72</text:p>
          </table:table-cell>
          <table:table-cell office:value-type="float" office:value="8.042629" calcext:value-type="float">
            <text:p>8.04262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72</text:p>
          </table:table-cell>
          <table:table-cell office:value-type="float" office:value="24.089616" calcext:value-type="float">
            <text:p>24.08961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72</text:p>
          </table:table-cell>
          <table:table-cell office:value-type="float" office:value="11.684691" calcext:value-type="float">
            <text:p>11.6846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6.149574" calcext:value-type="float">
            <text:p>6.1495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257734" calcext:value-type="float">
            <text:p>4.2577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72</text:p>
          </table:table-cell>
          <table:table-cell office:value-type="float" office:value="4.703552" calcext:value-type="float">
            <text:p>4.70355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72</text:p>
          </table:table-cell>
          <table:table-cell office:value-type="float" office:value="30.810301" calcext:value-type="float">
            <text:p>30.81030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72</text:p>
          </table:table-cell>
          <table:table-cell office:value-type="float" office:value="11.985164" calcext:value-type="float">
            <text:p>11.9851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6.322344" calcext:value-type="float">
            <text:p>6.3223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196757" calcext:value-type="float">
            <text:p>4.1967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04</text:p>
          </table:table-cell>
          <table:table-cell office:value-type="float" office:value="8.84233" calcext:value-type="float">
            <text:p>8.84233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04</text:p>
          </table:table-cell>
          <table:table-cell office:value-type="float" office:value="26.899864" calcext:value-type="float">
            <text:p>26.8998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04</text:p>
          </table:table-cell>
          <table:table-cell office:value-type="float" office:value="12.746624" calcext:value-type="float">
            <text:p>12.7466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6.840235" calcext:value-type="float">
            <text:p>6.840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4.885092" calcext:value-type="float">
            <text:p>4.8850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04</text:p>
          </table:table-cell>
          <table:table-cell office:value-type="float" office:value="5.045142" calcext:value-type="float">
            <text:p>5.04514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04</text:p>
          </table:table-cell>
          <table:table-cell office:value-type="float" office:value="34.939077" calcext:value-type="float">
            <text:p>34.93907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04</text:p>
          </table:table-cell>
          <table:table-cell office:value-type="float" office:value="13.621269" calcext:value-type="float">
            <text:p>13.6212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6.859812" calcext:value-type="float">
            <text:p>6.8598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4.797926" calcext:value-type="float">
            <text:p>4.7979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36</text:p>
          </table:table-cell>
          <table:table-cell office:value-type="float" office:value="9.64256" calcext:value-type="float">
            <text:p>9.6425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36</text:p>
          </table:table-cell>
          <table:table-cell office:value-type="float" office:value="30.480137" calcext:value-type="float">
            <text:p>30.48013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36</text:p>
          </table:table-cell>
          <table:table-cell office:value-type="float" office:value="14.38107" calcext:value-type="float">
            <text:p>14.381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8.632327" calcext:value-type="float">
            <text:p>8.6323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689846" calcext:value-type="float">
            <text:p>5.6898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36</text:p>
          </table:table-cell>
          <table:table-cell office:value-type="float" office:value="5.409914" calcext:value-type="float">
            <text:p>5.40991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36</text:p>
          </table:table-cell>
          <table:table-cell office:value-type="float" office:value="39.012501" calcext:value-type="float">
            <text:p>39.01250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36</text:p>
          </table:table-cell>
          <table:table-cell office:value-type="float" office:value="17.288281" calcext:value-type="float">
            <text:p>17.288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7.854706" calcext:value-type="float">
            <text:p>7.8547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46686" calcext:value-type="float">
            <text:p>5.466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68</text:p>
          </table:table-cell>
          <table:table-cell office:value-type="float" office:value="10.54581" calcext:value-type="float">
            <text:p>10.5458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68</text:p>
          </table:table-cell>
          <table:table-cell office:value-type="float" office:value="34.290126" calcext:value-type="float">
            <text:p>34.29012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68</text:p>
          </table:table-cell>
          <table:table-cell office:value-type="float" office:value="16.172447" calcext:value-type="float">
            <text:p>16.172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9.171333" calcext:value-type="float">
            <text:p>9.171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469028" calcext:value-type="float">
            <text:p>6.469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68</text:p>
          </table:table-cell>
          <table:table-cell office:value-type="float" office:value="5.793018" calcext:value-type="float">
            <text:p>5.79301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68</text:p>
          </table:table-cell>
          <table:table-cell office:value-type="float" office:value="43.784555" calcext:value-type="float">
            <text:p>43.78455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68</text:p>
          </table:table-cell>
          <table:table-cell office:value-type="float" office:value="19.293726" calcext:value-type="float">
            <text:p>19.2937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9.133705" calcext:value-type="float">
            <text:p>9.1337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088581" calcext:value-type="float">
            <text:p>6.0885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0</text:p>
          </table:table-cell>
          <table:table-cell office:value-type="float" office:value="11.444995" calcext:value-type="float">
            <text:p>11.44499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0</text:p>
          </table:table-cell>
          <table:table-cell office:value-type="float" office:value="38.34086" calcext:value-type="float">
            <text:p>38.3408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0</text:p>
          </table:table-cell>
          <table:table-cell office:value-type="float" office:value="18.105789" calcext:value-type="float">
            <text:p>18.1057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9.976311" calcext:value-type="float">
            <text:p>9.9763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7.03932" calcext:value-type="float">
            <text:p>7.03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0</text:p>
          </table:table-cell>
          <table:table-cell office:value-type="float" office:value="6.159411" calcext:value-type="float">
            <text:p>6.15941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0</text:p>
          </table:table-cell>
          <table:table-cell office:value-type="float" office:value="48.447356" calcext:value-type="float">
            <text:p>48.44735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0</text:p>
          </table:table-cell>
          <table:table-cell office:value-type="float" office:value="21.526641" calcext:value-type="float">
            <text:p>21.5266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9.779765" calcext:value-type="float">
            <text:p>9.7797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6.721509" calcext:value-type="float">
            <text:p>6.7215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32</text:p>
          </table:table-cell>
          <table:table-cell office:value-type="float" office:value="12.402795" calcext:value-type="float">
            <text:p>12.402795</text:p>
          </table:table-cell>
          <table:table-cell office:value-type="string" calcext:value-type="string">
            <text:p>compile Full mult</text:p>
          </table:table-cell>
          <table:table-cell/>
          <table:table-cell office:value-type="string" calcext:value-type="string">
            <text:p>register allocation failed, insufficient capacity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32</text:p>
          </table:table-cell>
          <table:table-cell office:value-type="float" office:value="6.511513" calcext:value-type="float">
            <text:p>6.51151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32</text:p>
          </table:table-cell>
          <table:table-cell office:value-type="float" office:value="53.973023" calcext:value-type="float">
            <text:p>53.9730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32</text:p>
          </table:table-cell>
          <table:table-cell office:value-type="float" office:value="23.492025" calcext:value-type="float">
            <text:p>23.4920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32</text:p>
          </table:table-cell>
          <table:table-cell office:value-type="float" office:value="10.549616" calcext:value-type="float">
            <text:p>10.5496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32</text:p>
          </table:table-cell>
          <table:table-cell office:value-type="float" office:value="7.880914" calcext:value-type="float">
            <text:p>7.88091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After: register allocation failed, insufficient capacity</text:p>
          </table:table-cell>
          <table:table-cell table:number-columns-repeated="1015"/>
        </table:table-row>
        <table:table-row table:style-name="ro1">
          <table:table-cell office:value-type="float" office:value="20210504" calcext:value-type="float">
            <text:p>20210504</text:p>
          </table:table-cell>
          <table:table-cell office:value-type="string" calcext:value-type="string">
            <text:p>9efab2b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2435" calcext:value-type="float">
            <text:p>0.00243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3257" calcext:value-type="float">
            <text:p>0.00325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06458" calcext:value-type="float">
            <text:p>0.00645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09515" calcext:value-type="float">
            <text:p>0.00951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13722" calcext:value-type="float">
            <text:p>0.01372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20356" calcext:value-type="float">
            <text:p>0.02035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24876" calcext:value-type="float">
            <text:p>0.02487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36603" calcext:value-type="float">
            <text:p>0.03660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041398" calcext:value-type="float">
            <text:p>0.04139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058338" calcext:value-type="float">
            <text:p>0.05833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061852" calcext:value-type="float">
            <text:p>0.06185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092567" calcext:value-type="float">
            <text:p>0.09256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09072" calcext:value-type="float">
            <text:p>0.0907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122295" calcext:value-type="float">
            <text:p>0.12229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126273" calcext:value-type="float">
            <text:p>0.1262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171875" calcext:value-type="float">
            <text:p>0.17187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184563" calcext:value-type="float">
            <text:p>0.18456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220375" calcext:value-type="float">
            <text:p>0.22037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0.248973" calcext:value-type="float">
            <text:p>0.2489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0.288439" calcext:value-type="float">
            <text:p>0.28843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0.304156" calcext:value-type="float">
            <text:p>0.3041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0.418655" calcext:value-type="float">
            <text:p>0.41865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0.395509" calcext:value-type="float">
            <text:p>0.39550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0.523694" calcext:value-type="float">
            <text:p>0.52369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0.484564" calcext:value-type="float">
            <text:p>0.4845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0.631981" calcext:value-type="float">
            <text:p>0.63198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0.576945" calcext:value-type="float">
            <text:p>0.57694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0.744844" calcext:value-type="float">
            <text:p>0.74484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0.660833" calcext:value-type="float">
            <text:p>0.66083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0.885581" calcext:value-type="float">
            <text:p>0.88558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0.817202" calcext:value-type="float">
            <text:p>0.81720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1.044115" calcext:value-type="float">
            <text:p>1.04411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0.967498" calcext:value-type="float">
            <text:p>0.96749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1.2618" calcext:value-type="float">
            <text:p>1.261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1.135864" calcext:value-type="float">
            <text:p>1.1358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1.41101" calcext:value-type="float">
            <text:p>1.4110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1.33694" calcext:value-type="float">
            <text:p>1.3369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1.65828" calcext:value-type="float">
            <text:p>1.6582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1.522149" calcext:value-type="float">
            <text:p>1.52214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1.843521" calcext:value-type="float">
            <text:p>1.84352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1.757971" calcext:value-type="float">
            <text:p>1.75797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2.209391" calcext:value-type="float">
            <text:p>2.20939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2.005699" calcext:value-type="float">
            <text:p>2.00569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2.380627" calcext:value-type="float">
            <text:p>2.38062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2.281836" calcext:value-type="float">
            <text:p>2.28183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2.699806" calcext:value-type="float">
            <text:p>2.69980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2.579612" calcext:value-type="float">
            <text:p>2.57961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3.003518" calcext:value-type="float">
            <text:p>3.00351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2.905764" calcext:value-type="float">
            <text:p>2.905764</text:p>
          </table:table-cell>
          <table:table-cell office:value-type="string" calcext:value-type="string">
            <text:p>Full mult</text:p>
          </table:table-cell>
          <table:table-cell table:style-name="Default" office:value-type="string" calcext:value-type="string">
            <text:p><text:s/>After: insufficient capacity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3.430104" calcext:value-type="float">
            <text:p>3.43010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32</text:p>
          </table:table-cell>
          <table:table-cell office:value-type="float" office:value="3.709641" calcext:value-type="float">
            <text:p>3.70964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64</text:p>
          </table:table-cell>
          <table:table-cell office:value-type="float" office:value="4.034827" calcext:value-type="float">
            <text:p>4.03482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96</text:p>
          </table:table-cell>
          <table:table-cell office:value-type="float" office:value="4.420161" calcext:value-type="float">
            <text:p>4.42016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28</text:p>
          </table:table-cell>
          <table:table-cell office:value-type="float" office:value="5.183529" calcext:value-type="float">
            <text:p>5.18352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60</text:p>
          </table:table-cell>
          <table:table-cell office:value-type="float" office:value="5.086924" calcext:value-type="float">
            <text:p>5.08692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92</text:p>
          </table:table-cell>
          <table:table-cell office:value-type="float" office:value="6.116228" calcext:value-type="float">
            <text:p>6.116228</text:p>
          </table:table-cell>
          <table:table-cell office:value-type="string" calcext:value-type="string">
            <text:p>Block mult</text:p>
          </table:table-cell>
          <table:table-cell office:value-type="string" calcext:value-type="string">
            <text:p>After: heap overflow (increase heap size)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4637" calcext:value-type="float">
            <text:p>0.004637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7762" calcext:value-type="float">
            <text:p>0.00776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2097" calcext:value-type="float">
            <text:p>0.012097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7694" calcext:value-type="float">
            <text:p>0.01769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2631" calcext:value-type="float">
            <text:p>0.02631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34134" calcext:value-type="float">
            <text:p>0.03413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49502" calcext:value-type="float">
            <text:p>0.049502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62882" calcext:value-type="float">
            <text:p>0.06288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088238" calcext:value-type="float">
            <text:p>0.08823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103208" calcext:value-type="float">
            <text:p>0.10320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137754" calcext:value-type="float">
            <text:p>0.137754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150604" calcext:value-type="float">
            <text:p>0.15060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206628" calcext:value-type="float">
            <text:p>0.20662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217609" calcext:value-type="float">
            <text:p>0.21760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283241" calcext:value-type="float">
            <text:p>0.283241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302475" calcext:value-type="float">
            <text:p>0.30247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408109" calcext:value-type="float">
            <text:p>0.408109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425915" calcext:value-type="float">
            <text:p>0.42591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517283" calcext:value-type="float">
            <text:p>0.51728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578733" calcext:value-type="float">
            <text:p>0.57873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0.6655" calcext:value-type="float">
            <text:p>0.6655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0.770201" calcext:value-type="float">
            <text:p>0.77020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0.823707" calcext:value-type="float">
            <text:p>0.823707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0.950773" calcext:value-type="float">
            <text:p>0.95077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127821" calcext:value-type="float">
            <text:p>1.127821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200045" calcext:value-type="float">
            <text:p>1.20004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537752" calcext:value-type="float">
            <text:p>1.537752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482526" calcext:value-type="float">
            <text:p>1.482526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736303" calcext:value-type="float">
            <text:p>1.73630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948926" calcext:value-type="float">
            <text:p>1.948926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31585" calcext:value-type="float">
            <text:p>2.131585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59858" calcext:value-type="float">
            <text:p>2.15985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567958" calcext:value-type="float">
            <text:p>2.56795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503458" calcext:value-type="float">
            <text:p>2.50345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2.936966" calcext:value-type="float">
            <text:p>2.936966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3.042771" calcext:value-type="float">
            <text:p>3.04277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508749" calcext:value-type="float">
            <text:p>3.508749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473809" calcext:value-type="float">
            <text:p>3.47380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4.172168" calcext:value-type="float">
            <text:p>4.17216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4.102834" calcext:value-type="float">
            <text:p>4.10283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508596" calcext:value-type="float">
            <text:p>4.508596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596321" calcext:value-type="float">
            <text:p>4.59632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4.938383" calcext:value-type="float">
            <text:p>4.93838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5.094881" calcext:value-type="float">
            <text:p>5.09488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574033" calcext:value-type="float">
            <text:p>5.57403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851021" calcext:value-type="float">
            <text:p>5.85102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099662" calcext:value-type="float">
            <text:p>6.099662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219203" calcext:value-type="float">
            <text:p>6.21920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7.003264" calcext:value-type="float">
            <text:p>7.003264</text:p>
          </table:table-cell>
          <table:table-cell office:value-type="string" calcext:value-type="string">
            <text:p>Mult 1 block </text:p>
          </table:table-cell>
          <table:table-cell office:value-type="string" calcext:value-type="string">
            <text:p>After: register allocation failed, insufficient capacity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7.424513" calcext:value-type="float">
            <text:p>7.42451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32</text:p>
          </table:table-cell>
          <table:table-cell office:value-type="float" office:value="8.147472" calcext:value-type="float">
            <text:p>8.14747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64</text:p>
          </table:table-cell>
          <table:table-cell office:value-type="float" office:value="8.746738" calcext:value-type="float">
            <text:p>8.74673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96</text:p>
          </table:table-cell>
          <table:table-cell office:value-type="float" office:value="9.871992" calcext:value-type="float">
            <text:p>9.87199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28</text:p>
          </table:table-cell>
          <table:table-cell office:value-type="float" office:value="10.869934" calcext:value-type="float">
            <text:p>10.86993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0</text:p>
          </table:table-cell>
          <table:table-cell office:value-type="float" office:value="11.895821" calcext:value-type="float">
            <text:p>11.89582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92</text:p>
          </table:table-cell>
          <table:table-cell office:value-type="float" office:value="12.70857" calcext:value-type="float">
            <text:p>12.70857</text:p>
          </table:table-cell>
          <table:table-cell office:value-type="string" calcext:value-type="string">
            <text:p>Mult 2 blocks</text:p>
          </table:table-cell>
          <table:table-cell office:value-type="string" calcext:value-type="string">
            <text:p>After: heap overflow (increase heap size)</text:p>
          </table:table-cell>
          <table:table-cell table:number-columns-repeated="1016"/>
        </table:table-row>
        <table:table-row table:style-name="ro1">
          <table:table-cell office:value-type="float" office:value="20210505" calcext:value-type="float">
            <text:p>20210505</text:p>
          </table:table-cell>
          <table:table-cell/>
          <table:table-cell office:value-type="string" calcext:value-type="string">
            <text:p>silke</text:p>
          </table:table-cell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92</text:p>
          </table:table-cell>
          <table:table-cell office:value-type="float" office:value="6.108689" calcext:value-type="float">
            <text:p>6.10868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024</text:p>
          </table:table-cell>
          <table:table-cell office:value-type="float" office:value="6.212815" calcext:value-type="float">
            <text:p>6.21281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056</text:p>
          </table:table-cell>
          <table:table-cell office:value-type="float" office:value="6.849411" calcext:value-type="float">
            <text:p>6.84941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088</text:p>
          </table:table-cell>
          <table:table-cell office:value-type="float" office:value="7.450314" calcext:value-type="float">
            <text:p>7.45031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120</text:p>
          </table:table-cell>
          <table:table-cell office:value-type="float" office:value="8.165679" calcext:value-type="float">
            <text:p>8.16567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152</text:p>
          </table:table-cell>
          <table:table-cell office:value-type="float" office:value="9.423962" calcext:value-type="float">
            <text:p>9.42396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184</text:p>
          </table:table-cell>
          <table:table-cell office:value-type="float" office:value="9.840509" calcext:value-type="float">
            <text:p>9.84050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16</text:p>
          </table:table-cell>
          <table:table-cell office:value-type="float" office:value="11.637999" calcext:value-type="float">
            <text:p>11.63799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48</text:p>
          </table:table-cell>
          <table:table-cell office:value-type="float" office:value="11.248815" calcext:value-type="float">
            <text:p>11.24881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80</text:p>
          </table:table-cell>
          <table:table-cell office:value-type="float" office:value="12.936267" calcext:value-type="float">
            <text:p>12.936267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312</text:p>
          </table:table-cell>
          <table:table-cell office:value-type="float" office:value="13.110754" calcext:value-type="float">
            <text:p>13.11075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344</text:p>
          </table:table-cell>
          <table:table-cell office:value-type="float" office:value="14.664275" calcext:value-type="float">
            <text:p>14.66427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376</text:p>
          </table:table-cell>
          <table:table-cell office:value-type="float" office:value="15.758054" calcext:value-type="float">
            <text:p>15.75805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408</text:p>
          </table:table-cell>
          <table:table-cell office:value-type="float" office:value="17.786911" calcext:value-type="float">
            <text:p>17.78691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440</text:p>
          </table:table-cell>
          <table:table-cell office:value-type="float" office:value="19.000269" calcext:value-type="float">
            <text:p>19.00026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472</text:p>
          </table:table-cell>
          <table:table-cell office:value-type="float" office:value="19.332735" calcext:value-type="float">
            <text:p>19.33273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504</text:p>
          </table:table-cell>
          <table:table-cell office:value-type="float" office:value="21.246057" calcext:value-type="float">
            <text:p>21.246057</text:p>
          </table:table-cell>
          <table:table-cell office:value-type="string" calcext:value-type="string">
            <text:p>Mult 2 blocks</text:p>
          </table:table-cell>
          <table:table-cell office:value-type="string" calcext:value-type="string">
            <text:p>After: register allocation failed</text:p>
          </table:table-cell>
          <table:table-cell table:number-columns-repeated="1016"/>
        </table:table-row>
        <table:table-row table:style-name="ro1" table:number-rows-repeated="10469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Matrix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 calcext:value-type="string">
            <text:p>Cmdline:</text:p>
          </table:table-cell>
          <table:table-cell office:value-type="string" calcext:value-type="string">
            <text:p>sudo ./obj/qpu-debug/bin/Matrix -read=prefetch -d= -n=</text:p>
          </table:table-cell>
          <table:table-cell table:number-columns-repeated="1022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Empty values:</text:p>
          </table:table-cell>
          <table:table-cell office:value-type="string" calcext:value-type="string">
            <text:p>Failed to invoke kernel on QP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2" office:value-type="string" calcext:value-type="string">
            <text:p>-read=</text:p>
          </table:table-cell>
          <table:table-cell table:style-name="ce66" office:value-type="string" calcext:value-type="string">
            <text:p>-d=</text:p>
          </table:table-cell>
          <table:table-cell table:style-name="ce66" office:value-type="string" calcext:value-type="string">
            <text:p>-n=</text:p>
          </table:table-cell>
          <table:table-cell table:number-columns-repeated="1017"/>
        </table:table-row>
        <table:table-row table:style-name="ro1">
          <table:table-cell table:style-name="ce61" table:number-columns-repeated="4"/>
          <table:table-cell table:style-name="ce63" table:number-columns-repeated="2"/>
          <table:table-cell table:style-name="ce6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1" table:number-columns-repeated="100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table:style-name="ce18" office:value-type="string" calcext:value-type="string">
            <text:p>40b92f8</text:p>
          </table:table-cell>
          <table:table-cell table:style-name="ce18" office:value-type="string" calcext:value-type="string">
            <text:p>rianne</text:p>
          </table:table-cell>
          <table:table-cell table:style-name="ce18" office:value-type="string" calcext:value-type="string">
            <text:p>pi3</text:p>
          </table:table-cell>
          <table:table-cell table:style-name="ce64" office:value-type="string" calcext:value-type="string">
            <text:p>prefetch</text:p>
          </table:table-cell>
          <table:table-cell table:style-name="ce67" office:value-type="float" office:value="512" calcext:value-type="float">
            <text:p>512</text:p>
          </table:table-cell>
          <table:table-cell table:style-name="ce65" office:value-type="float" office:value="1.283916" calcext:value-type="float">
            <text:p>1.283916</text:p>
          </table:table-cell>
          <table:table-cell office:value-type="float" office:value="0.944101" calcext:value-type="float">
            <text:p>0.944101</text:p>
          </table:table-cell>
          <table:table-cell/>
          <table:table-cell office:value-type="float" office:value="0.472496" calcext:value-type="float">
            <text:p>0.472496</text:p>
          </table:table-cell>
          <table:table-cell table:number-columns-repeated="3"/>
          <table:table-cell office:value-type="float" office:value="0.243976" calcext:value-type="float">
            <text:p>0.243976</text:p>
          </table:table-cell>
          <table:table-cell table:number-columns-repeated="1010"/>
        </table:table-row>
        <table:table-row table:style-name="ro1">
          <table:table-cell/>
          <table:table-cell table:style-name="ce18" table:number-columns-repeated="3"/>
          <table:table-cell table:style-name="ce64" office:value-type="string" calcext:value-type="string">
            <text:p>default</text:p>
          </table:table-cell>
          <table:table-cell table:style-name="ce67"/>
          <table:table-cell table:style-name="ce65" office:value-type="float" office:value="7.685636" calcext:value-type="float">
            <text:p>7.685636</text:p>
          </table:table-cell>
          <table:table-cell office:value-type="float" office:value="5.372833" calcext:value-type="float">
            <text:p>5.372833</text:p>
          </table:table-cell>
          <table:table-cell office:value-type="float" office:value="5.302814" calcext:value-type="float">
            <text:p>5.302814</text:p>
          </table:table-cell>
          <table:table-cell office:value-type="float" office:value="5.281491" calcext:value-type="float">
            <text:p>5.281491</text:p>
          </table:table-cell>
          <table:table-cell office:value-type="float" office:value="5.31088" calcext:value-type="float">
            <text:p>5.31088</text:p>
          </table:table-cell>
          <table:table-cell office:value-type="float" office:value="5.321835" calcext:value-type="float">
            <text:p>5.321835</text:p>
          </table:table-cell>
          <table:table-cell/>
          <table:table-cell office:value-type="float" office:value="5.31766" calcext:value-type="float">
            <text:p>5.31766</text:p>
          </table:table-cell>
          <table:table-cell office:value-type="float" office:value="5.321009" calcext:value-type="float">
            <text:p>5.321009</text:p>
          </table:table-cell>
          <table:table-cell table:number-columns-repeated="2"/>
          <table:table-cell office:value-type="float" office:value="5.348452" calcext:value-type="float">
            <text:p>5.348452</text:p>
          </table:table-cell>
          <table:table-cell table:number-columns-repeated="1006"/>
        </table:table-row>
        <table:table-row table:style-name="ro1">
          <table:table-cell/>
          <table:table-cell table:style-name="ce18" table:number-columns-repeated="3"/>
          <table:table-cell table:style-name="ce64" office:value-type="string" calcext:value-type="string">
            <text:p>tmu</text:p>
          </table:table-cell>
          <table:table-cell table:style-name="ce67"/>
          <table:table-cell table:style-name="ce65" office:value-type="float" office:value="3.737733" calcext:value-type="float">
            <text:p>3.737733</text:p>
          </table:table-cell>
          <table:table-cell office:value-type="float" office:value="1.870399" calcext:value-type="float">
            <text:p>1.870399</text:p>
          </table:table-cell>
          <table:table-cell office:value-type="float" office:value="1.248937" calcext:value-type="float">
            <text:p>1.248937</text:p>
          </table:table-cell>
          <table:table-cell office:value-type="float" office:value="0.935308" calcext:value-type="float">
            <text:p>0.935308</text:p>
          </table:table-cell>
          <table:table-cell table:number-columns-repeated="3"/>
          <table:table-cell office:value-type="float" office:value="0.475694" calcext:value-type="float">
            <text:p>0.475694</text:p>
          </table:table-cell>
          <table:table-cell office:value-type="float" office:value="0.423856" calcext:value-type="float">
            <text:p>0.42385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64" office:value-type="string" calcext:value-type="string">
            <text:p>prefetch</text:p>
          </table:table-cell>
          <table:table-cell table:style-name="ce65" office:value-type="float" office:value="576" calcext:value-type="float">
            <text:p>576</text:p>
          </table:table-cell>
          <table:table-cell table:style-name="ce65" office:value-type="float" office:value="1.782654" calcext:value-type="float">
            <text:p>1.782654</text:p>
          </table:table-cell>
          <table:table-cell office:value-type="float" office:value="1.323425" calcext:value-type="float">
            <text:p>1.323425</text:p>
          </table:table-cell>
          <table:table-cell office:value-type="float" office:value="0.872337" calcext:value-type="float">
            <text:p>0.872337</text:p>
          </table:table-cell>
          <table:table-cell office:value-type="float" office:value="0.662074" calcext:value-type="float">
            <text:p>0.662074</text:p>
          </table:table-cell>
          <table:table-cell/>
          <table:table-cell office:value-type="float" office:value="0.457605" calcext:value-type="float">
            <text:p>0.457605</text:p>
          </table:table-cell>
          <table:table-cell/>
          <table:table-cell office:value-type="float" office:value="0.342062" calcext:value-type="float">
            <text:p>0.342062</text:p>
          </table:table-cell>
          <table:table-cell office:value-type="float" office:value="0.301937" calcext:value-type="float">
            <text:p>0.301937</text:p>
          </table:table-cell>
          <table:table-cell table:number-columns-repeated="2"/>
          <table:table-cell office:value-type="float" office:value="0.228797" calcext:value-type="float">
            <text:p>0.228797</text:p>
          </table:table-cell>
          <table:table-cell table:number-columns-repeated="1006"/>
        </table:table-row>
        <table:table-row table:style-name="ro1">
          <table:table-cell office:value-type="float" office:value="20210329" calcext:value-type="float">
            <text:p>20210329</text:p>
          </table:table-cell>
          <table:table-cell office:value-type="string" calcext:value-type="string">
            <text:p>30d2e09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1</text:p>
          </table:table-cell>
          <table:table-cell table:style-name="ce65" table:number-columns-repeated="3"/>
          <table:table-cell table:number-columns-repeated="1017"/>
        </table:table-row>
        <table:table-row table:style-name="ro1" table:number-rows-repeated="9">
          <table:table-cell table:number-columns-repeated="4"/>
          <table:table-cell table:style-name="ce65" table:number-columns-repeated="3"/>
          <table:table-cell table:number-columns-repeated="101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18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1" calcext:value-type="float">
            <text:p>0.00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9" calcext:value-type="float">
            <text:p>0.000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212" calcext:value-type="float">
            <text:p>0.000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335" calcext:value-type="float">
            <text:p>0.000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26" calcext:value-type="float">
            <text:p>0.000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48" calcext:value-type="float">
            <text:p>0.000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6" calcext:value-type="float">
            <text:p>0.000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25" calcext:value-type="float">
            <text:p>0.000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4" calcext:value-type="float">
            <text:p>0.00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5" calcext:value-type="float">
            <text:p>0.000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74" calcext:value-type="float">
            <text:p>0.000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1166" calcext:value-type="float">
            <text:p>0.001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39" calcext:value-type="float">
            <text:p>0.0003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1011" calcext:value-type="float">
            <text:p>0.00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62" calcext:value-type="float">
            <text:p>0.000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803" calcext:value-type="float">
            <text:p>0.000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98" calcext:value-type="float">
            <text:p>0.000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2166" calcext:value-type="float">
            <text:p>0.002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426" calcext:value-type="float">
            <text:p>0.000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1968" calcext:value-type="float">
            <text:p>0.0019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361" calcext:value-type="float">
            <text:p>0.000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67" calcext:value-type="float">
            <text:p>0.001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8" calcext:value-type="float">
            <text:p>0.00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623" calcext:value-type="float">
            <text:p>0.0036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78" calcext:value-type="float">
            <text:p>0.000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256" calcext:value-type="float">
            <text:p>0.003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16" calcext:value-type="float">
            <text:p>0.0006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5369" calcext:value-type="float">
            <text:p>0.005369</text:p>
          </table:table-cell>
          <table:table-cell office:value-type="float" office:value="0.005371" calcext:value-type="float">
            <text:p>0.005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811" calcext:value-type="float">
            <text:p>0.0008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4792" calcext:value-type="float">
            <text:p>0.004792</text:p>
          </table:table-cell>
          <table:table-cell office:value-type="float" office:value="0.004798" calcext:value-type="float">
            <text:p>0.004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729" calcext:value-type="float">
            <text:p>0.000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0.006681" calcext:value-type="float">
            <text:p>0.006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1087" calcext:value-type="float">
            <text:p>0.001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8826" calcext:value-type="float">
            <text:p>0.008826</text:p>
          </table:table-cell>
          <table:table-cell office:value-type="float" office:value="0.008839" calcext:value-type="float">
            <text:p>0.008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237" calcext:value-type="float">
            <text:p>0.001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11325" calcext:value-type="float">
            <text:p>0.011325</text:p>
          </table:table-cell>
          <table:table-cell office:value-type="float" office:value="0.01132" calcext:value-type="float">
            <text:p>0.01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001704" calcext:value-type="float">
            <text:p>0.001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14107" calcext:value-type="float">
            <text:p>0.014107</text:p>
          </table:table-cell>
          <table:table-cell office:value-type="float" office:value="0.014096" calcext:value-type="float">
            <text:p>0.01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0.001892" calcext:value-type="float">
            <text:p>0.001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17251" calcext:value-type="float">
            <text:p>0.017251</text:p>
          </table:table-cell>
          <table:table-cell office:value-type="float" office:value="0.017255" calcext:value-type="float">
            <text:p>0.017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2469" calcext:value-type="float">
            <text:p>0.002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20683" calcext:value-type="float">
            <text:p>0.020683</text:p>
          </table:table-cell>
          <table:table-cell office:value-type="float" office:value="0.020692" calcext:value-type="float">
            <text:p>0.0206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697" calcext:value-type="float">
            <text:p>0.00269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18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293" calcext:value-type="float">
            <text:p>0.000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03" calcext:value-type="float">
            <text:p>0.000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414" calcext:value-type="float">
            <text:p>0.000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table:number-columns-repeated="2"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45" calcext:value-type="float">
            <text:p>0.000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52" calcext:value-type="float">
            <text:p>0.000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06" calcext:value-type="float">
            <text:p>0.000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42" calcext:value-type="float">
            <text:p>0.000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41" calcext:value-type="float">
            <text:p>0.000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49" calcext:value-type="float">
            <text:p>0.000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9" calcext:value-type="float">
            <text:p>0.000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27" calcext:value-type="float">
            <text:p>0.000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4" calcext:value-type="float">
            <text:p>0.000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1303" calcext:value-type="float">
            <text:p>0.001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329" calcext:value-type="float">
            <text:p>0.000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34" calcext:value-type="float">
            <text:p>0.000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338" calcext:value-type="float">
            <text:p>0.000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1235" calcext:value-type="float">
            <text:p>0.001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314" calcext:value-type="float">
            <text:p>0.000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17" calcext:value-type="float">
            <text:p>0.000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325" calcext:value-type="float">
            <text:p>0.000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54" calcext:value-type="float">
            <text:p>0.00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7" calcext:value-type="float">
            <text:p>0.00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9" calcext:value-type="float">
            <text:p>0.000139</text:p>
          </table:table-cell>
          <table:table-cell table:number-columns-repeated="1018"/>
        </table:table-row>
      </table:table>
      <table:table table:name="Platforms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style-name="ce22" office:value-type="string" calcext:value-type="string">
            <text:p>Scripts for data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24" office:value-type="string" calcext:value-type="string">
            <text:p>Hostname</text:p>
          </table:table-cell>
          <table:table-cell table:style-name="ce24" office:value-type="string" calcext:value-type="string">
            <text:p>Architecture</text:p>
          </table:table-cell>
          <table:table-cell table:style-name="ce24" office:value-type="string" calcext:value-type="string">
            <text:p>Model</text:p>
          </table:table-cell>
          <table:table-cell table:style-name="ce24" office:value-type="string" calcext:value-type="string">
            <text:p>Snapshot Date</text:p>
          </table:table-cell>
          <table:table-cell table:style-name="ce24" office:value-type="string" calcext:value-type="string">
            <text:p>Debian Version</text:p>
          </table:table-cell>
          <table:table-cell table:style-name="ce24" office:value-type="string" calcext:value-type="string">
            <text:p>Kernel version</text:p>
          </table:table-cell>
          <table:table-cell table:style-name="ce24" office:value-type="string" calcext:value-type="string">
            <text:p>Comments</text:p>
          </table:table-cell>
          <table:table-cell table:style-name="ce24" office:value-type="string" calcext:value-type="string">
            <text:p>uname -a</text:p>
          </table:table-cell>
          <table:table-cell table:style-name="ce24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/>
          <table:table-cell office:value-type="string" calcext:value-type="string">
            <text:p>Linux pi1-1 5.10.7+ #1395 Mon Jan 18 16:10:39 GMT 2021 armv6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2-1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2 Model B Rev 1.1</text:p>
          </table:table-cell>
          <table:table-cell office:value-type="float" office:value="20210402" calcext:value-type="float">
            <text:p>20210402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17-v7+</text:p>
          </table:table-cell>
          <table:table-cell/>
          <table:table-cell office:value-type="string" calcext:value-type="string">
            <text:p>Linux pi2-1 5.10.17-v7+ #1403 SMP Mon Feb 22 11:29:51 GMT 2021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/>
          <table:table-cell office:value-type="string" calcext:value-type="string">
            <text:p>Linux rianne 4.19.97-v7+ #1294 SMP Thu Jan 30 13:15:58 GM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/>
          <table:table-cell office:value-type="string" calcext:value-type="string">
            <text:p>Linux pi4-3 5.4.51-v7l+ #1333 SMP Mon Aug 10 16:51:40 BS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/>
          <table:table-cell office:value-type="string" calcext:value-type="string">
            <text:p>Linux silke 5.10.5-v8+ #1392 SMP PREEMPT Sat Jan 9 18:56:30 GMT 2021 aarch64 GNU/Linux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120228" calcext:value-type="float">
            <text:p>20120228</text:p>
          </table:table-cell>
          <table:table-cell/>
          <table:table-cell office:value-type="string" calcext:value-type="string">
            <text:p>Linux 5.10.11-v8+</text:p>
          </table:table-cell>
          <table:table-cell/>
          <table:table-cell office:value-type="string" calcext:value-type="string">
            <text:p>Linux silke 5.10.11-v8+ #1399 SMP PREEMPT Thu Jan 28 12:14:03 GMT 2021 aarch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/>
          <table:table-cell office:value-type="string" calcext:value-type="string">
            <text:p>Linux olivia 4.19.0-14-amd64 #1 SMP Debian 4.19.171-2 (2021-01-30) x86_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2</text:p>
          </table:table-cell>
          <table:table-cell/>
          <table:table-cell table:style-name="ce22" office:value-type="string" calcext:value-type="string">
            <text:p>used as desktop, for reference</text:p>
          </table:table-cell>
          <table:table-cell table:number-columns-repeated="4"/>
          <table:table-cell office:value-type="string" calcext:value-type="string">
            <text:p>Linux pi4-2 5.4.72-v7l+ #1356 SMP Thu Oct 22 13:57:51 BST 2020 armv7l GNU/Linux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04:06:51.875238062</meta:creation-date>
    <dc:date>2026-04-30T13:12:52.895690832</dc:date>
    <meta:editing-duration>P20DT5H43M3S</meta:editing-duration>
    <meta:editing-cycles>138</meta:editing-cycles>
    <meta:generator>LibreOffice/7.4.7.2$Linux_AARCH64 LibreOffice_project/40$Build-2</meta:generator>
    <meta:document-statistic meta:table-count="4" meta:cell-count="7781" meta:object-count="1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746cm" svg:y="3.706cm" style:legend-expansion="high" chart:style-name="ch2"/>
        <chart:plot-area chart:style-name="ch3" table:cell-range-address="Profiles.A30:Profiles.J33" chart:data-source-has-labels="both" svg:x="0.32cm" svg:y="0.18cm" svg:width="14.106cm" svg:height="8.646cm">
          <chart:coordinate-region svg:x="1.418cm" svg:y="0.379cm" svg:width="13.008cm" svg:height="5.689cm"/>
          <chart:axis chart:dimension="x" chart:name="primary-x" chart:style-name="ch4" chartooo:axis-type="auto">
            <chartooo:date-scale/>
            <chart:categories table:cell-range-address="Profiles.B30:Profiles.J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31:Profiles.J31" chart:label-cell-address="Profiles.A31:Profiles.A31" chart:class="chart:bar">
            <chart:data-point chart:repeated="9"/>
          </chart:series>
          <chart:series chart:style-name="ch8" chart:values-cell-range-address="Profiles.B32:Profiles.J32" chart:label-cell-address="Profiles.A32:Profiles.A32" chart:class="chart:bar">
            <chart:data-point chart:repeated="9"/>
          </chart:series>
          <chart:series chart:style-name="ch9" chart:values-cell-range-address="Profiles.B33:Profiles.J33" chart:label-cell-address="Profiles.A33:Profiles.A33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30:Profiles.J30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1a</text:p>
              </table:table-cell>
              <table:table-cell office:value-type="string">
                <text:p>Kernel1a Max QPUs</text:p>
              </table:table-cell>
              <table:table-cell office:value-type="string">
                <text:p>Kernel2 1 QPU</text:p>
              </table:table-cell>
              <table:table-cell office:value-type="string">
                <text:p>Kernel2 Max  QPUs</text:p>
              </table:table-cell>
              <table:table-cell office:value-type="string">
                <text:p>Kernel3</text:p>
              </table:table-cell>
              <table:table-cell office:value-type="string">
                <text:p>Kernel3 Max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31:Profiles.A31</svg:desc>
                </draw:g>
              </table:table-cell>
              <table:table-cell office:value-type="float" office:value="0.016009">
                <text:p>0.016009</text:p>
                <draw:g>
                  <svg:desc>Profiles.B31:Profiles.J31</svg:desc>
                </draw:g>
              </table:table-cell>
              <table:table-cell office:value-type="float" office:value="0.020724">
                <text:p>0.020724</text:p>
              </table:table-cell>
              <table:table-cell office:value-type="float" office:value="0.024813">
                <text:p>0.024813</text:p>
              </table:table-cell>
              <table:table-cell office:value-type="float" office:value="0.013057">
                <text:p>0.013057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057">
                <text:p>0.013057</text:p>
              </table:table-cell>
              <table:table-cell office:value-type="float" office:value="0.014803">
                <text:p>0.014803</text:p>
              </table:table-cell>
              <table:table-cell office:value-type="float" office:value="0.013066">
                <text:p>0.013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</text:p>
                <draw:g>
                  <svg:desc>Profiles.A32:Profiles.A32</svg:desc>
                </draw:g>
              </table:table-cell>
              <table:table-cell office:value-type="float" office:value="0.00825">
                <text:p>0.00825</text:p>
                <draw:g>
                  <svg:desc>Profiles.B32:Profiles.J32</svg:desc>
                </draw:g>
              </table:table-cell>
              <table:table-cell office:value-type="float" office:value="0.010297">
                <text:p>0.010297</text:p>
              </table:table-cell>
              <table:table-cell office:value-type="float" office:value="0.011673">
                <text:p>0.011673</text:p>
              </table:table-cell>
              <table:table-cell office:value-type="float" office:value="0.006082">
                <text:p>0.006082</text:p>
              </table:table-cell>
              <table:table-cell office:value-type="float" office:value="0.008178">
                <text:p>0.008178</text:p>
              </table:table-cell>
              <table:table-cell office:value-type="float" office:value="0.005183">
                <text:p>0.005183</text:p>
              </table:table-cell>
              <table:table-cell office:value-type="float" office:value="0.006655">
                <text:p>0.006655</text:p>
              </table:table-cell>
              <table:table-cell office:value-type="float" office:value="0.005126">
                <text:p>0.005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5</text:p>
                <draw:g>
                  <svg:desc>Profiles.A33:Profiles.A33</svg:desc>
                </draw:g>
              </table:table-cell>
              <table:table-cell office:value-type="float" office:value="0.002224">
                <text:p>0.002224</text:p>
                <draw:g>
                  <svg:desc>Profiles.B33:Profiles.J33</svg:desc>
                </draw:g>
              </table:table-cell>
              <table:table-cell office:value-type="float" office:value="0.008812">
                <text:p>0.008812</text:p>
              </table:table-cell>
              <table:table-cell office:value-type="float" office:value="0.008748">
                <text:p>0.008748</text:p>
              </table:table-cell>
              <table:table-cell office:value-type="float" office:value="0.004084">
                <text:p>0.004084</text:p>
              </table:table-cell>
              <table:table-cell office:value-type="float" office:value="0.006057">
                <text:p>0.006057</text:p>
              </table:table-cell>
              <table:table-cell office:value-type="float" office:value="0.003775">
                <text:p>0.003775</text:p>
              </table:table-cell>
              <table:table-cell office:value-type="float" office:value="0.006365">
                <text:p>0.006365</text:p>
              </table:table-cell>
              <table:table-cell office:value-type="float" office:value="0.003766">
                <text:p>0.0037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Timing.I249:Timing.U252" chart:data-source-has-labels="both" svg:x="0.32cm" svg:y="0.18cm" svg:width="12.409cm" svg:height="8.64cm">
          <chart:coordinate-region svg:x="1.418cm" svg:y="0.379cm" svg:width="11.311cm" svg:height="7.794cm"/>
          <chart:axis chart:dimension="x" chart:name="primary-x" chart:style-name="ch4" chartooo:axis-type="auto">
            <chartooo:date-scale/>
            <chart:categories table:cell-range-address="Timing.J249:Timing.U2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J250:Timing.U250" chart:label-cell-address="Timing.I250:Timing.I250" chart:class="chart:bar">
            <chart:data-point chart:repeated="12"/>
          </chart:series>
          <chart:series chart:style-name="ch8" chart:values-cell-range-address="Timing.J251:Timing.U251" chart:label-cell-address="Timing.I251:Timing.I251" chart:class="chart:bar">
            <chart:data-point chart:repeated="12"/>
          </chart:series>
          <chart:series chart:style-name="ch9" chart:values-cell-range-address="Timing.J252:Timing.U252" chart:label-cell-address="Timing.I252:Timing.I25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249:Timing.U249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I250:Timing.I250</svg:desc>
                </draw:g>
              </table:table-cell>
              <table:table-cell office:value-type="float" office:value="0.003428">
                <text:p>0.003428</text:p>
                <draw:g>
                  <svg:desc>Timing.J250:Timing.U250</svg:desc>
                </draw:g>
              </table:table-cell>
              <table:table-cell office:value-type="float" office:value="0.003521">
                <text:p>0.003521</text:p>
              </table:table-cell>
              <table:table-cell office:value-type="float" office:value="0.004315">
                <text:p>0.004315</text:p>
              </table:table-cell>
              <table:table-cell office:value-type="float" office:value="0.004609">
                <text:p>0.004609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complex</text:p>
                <draw:g>
                  <svg:desc>Timing.I251:Timing.I251</svg:desc>
                </draw:g>
              </table:table-cell>
              <table:table-cell office:value-type="float" office:value="0.003708">
                <text:p>0.003708</text:p>
                <draw:g>
                  <svg:desc>Timing.J251:Timing.U251</svg:desc>
                </draw:g>
              </table:table-cell>
              <table:table-cell office:value-type="float" office:value="0.004115">
                <text:p>0.00411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6729">
                <text:p>0.006729</text:p>
              </table:table-cell>
              <table:table-cell office:value-type="float" office:value="0.009991">
                <text:p>0.009991</text:p>
              </table:table-cell>
              <table:table-cell office:value-type="float" office:value="0.011345">
                <text:p>0.01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float</text:p>
                <draw:g>
                  <svg:desc>Timing.I252:Timing.I252</svg:desc>
                </draw:g>
              </table:table-cell>
              <table:table-cell office:value-type="float" office:value="0.003499">
                <text:p>0.003499</text:p>
                <draw:g>
                  <svg:desc>Timing.J252:Timing.U252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5cm" svg:height="11.635cm" xlink:href=".." xlink:type="simple" chart:class="chart:bar" chart:style-name="ch1">
        <chart:title svg:x="6.971cm" svg:y="0.368cm" chart:style-name="ch2">
          <text:p>v3d  sin/cos - inline float</text:p>
        </chart:title>
        <chart:subtitle svg:x="7.857cm" svg:y="1.379cm" chart:style-name="ch3">
          <text:p>-d=8, 10 iterations</text:p>
        </chart:subtitle>
        <chart:legend chart:legend-position="end" svg:x="15.787cm" svg:y="5.02cm" style:legend-expansion="high" chart:style-name="ch4"/>
        <chart:plot-area chart:style-name="ch5" table:cell-range-address="Timing.I444:Timing.V447" chart:data-source-has-labels="both" svg:x="1.39cm" svg:y="2.294cm" svg:width="14.018cm" svg:height="8.128cm">
          <chart:coordinate-region svg:x="2.488cm" svg:y="2.493cm" svg:width="12.92cm" svg:height="7.282cm"/>
          <chart:axis chart:dimension="x" chart:name="primary-x" chart:style-name="ch6" chartooo:axis-type="auto">
            <chartooo:date-scale/>
            <chart:title svg:x="7.111cm" svg:y="10.654cm" chart:style-name="ch7">
              <text:p>Matrix dimension</text:p>
            </chart:title>
            <chart:categories table:cell-range-address="Timing.J444:Timing.V444"/>
          </chart:axis>
          <chart:axis chart:dimension="y" chart:name="primary-y" chart:style-name="ch8">
            <chart:title svg:x="0.451cm" svg:y="7.024cm" chart:style-name="ch9">
              <text:p>seconds</text:p>
            </chart:title>
            <chart:grid chart:style-name="ch10" chart:class="major"/>
          </chart:axis>
          <chart:series chart:style-name="ch11" chart:values-cell-range-address="Timing.J445:Timing.V445" chart:label-cell-address="Timing.I445:Timing.I445" chart:class="chart:bar">
            <chart:data-point chart:repeated="13"/>
          </chart:series>
          <chart:series chart:style-name="ch12" chart:values-cell-range-address="Timing.J446:Timing.V446" chart:label-cell-address="Timing.I446:Timing.I446" chart:class="chart:bar">
            <chart:data-point chart:repeated="13"/>
          </chart:series>
          <chart:series chart:style-name="ch13" chart:values-cell-range-address="Timing.J447:Timing.V447" chart:label-cell-address="Timing.I447:Timing.I447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444:Timing.V444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  <table:table-cell office:value-type="float" office:value="784">
                <text:p>784</text:p>
              </table:table-cell>
            </table:table-row>
          </table:table-header-rows>
          <table:table-rows>
            <table:table-row>
              <table:table-cell office:value-type="string">
                <text:p>pi4 lib functions</text:p>
                <draw:g>
                  <svg:desc>Timing.I445:Timing.I445</svg:desc>
                </draw:g>
              </table:table-cell>
              <table:table-cell office:value-type="float" office:value="0.003499">
                <text:p>0.003499</text:p>
                <draw:g>
                  <svg:desc>Timing.J445:Timing.V445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 hardware</text:p>
                <draw:g>
                  <svg:desc>Timing.I446:Timing.I446</svg:desc>
                </draw:g>
              </table:table-cell>
              <table:table-cell office:value-type="float" office:value="0.003383">
                <text:p>0.003383</text:p>
                <draw:g>
                  <svg:desc>Timing.J446:Timing.V446</svg:desc>
                </draw:g>
              </table:table-cell>
              <table:table-cell office:value-type="float" office:value="0.003722">
                <text:p>0.003722</text:p>
              </table:table-cell>
              <table:table-cell office:value-type="float" office:value="0.005821">
                <text:p>0.005821</text:p>
              </table:table-cell>
              <table:table-cell office:value-type="float" office:value="0.006805">
                <text:p>0.006805</text:p>
              </table:table-cell>
              <table:table-cell office:value-type="float" office:value="0.010335">
                <text:p>0.010335</text:p>
              </table:table-cell>
              <table:table-cell office:value-type="float" office:value="0.014909">
                <text:p>0.014909</text:p>
              </table:table-cell>
              <table:table-cell office:value-type="float" office:value="0.019662">
                <text:p>0.019662</text:p>
              </table:table-cell>
              <table:table-cell office:value-type="float" office:value="0.01878">
                <text:p>0.01878</text:p>
              </table:table-cell>
              <table:table-cell office:value-type="float" office:value="0.025099">
                <text:p>0.025099</text:p>
              </table:table-cell>
              <table:table-cell office:value-type="float" office:value="0.027739">
                <text:p>0.027739</text:p>
              </table:table-cell>
              <table:table-cell office:value-type="float" office:value="0.035538">
                <text:p>0.035538</text:p>
              </table:table-cell>
              <table:table-cell office:value-type="float" office:value="0.039354">
                <text:p>0.039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 matrix mult</text:p>
                <draw:g>
                  <svg:desc>Timing.I447:Timing.I447</svg:desc>
                </draw:g>
              </table:table-cell>
              <table:table-cell office:value-type="float" office:value="0.00326">
                <text:p>0.00326</text:p>
                <draw:g>
                  <svg:desc>Timing.J447:Timing.V447</svg:desc>
                </draw:g>
              </table:table-cell>
              <table:table-cell office:value-type="float" office:value="0.00351">
                <text:p>0.00351</text:p>
              </table:table-cell>
              <table:table-cell office:value-type="float" office:value="0.004515">
                <text:p>0.004515</text:p>
              </table:table-cell>
              <table:table-cell office:value-type="float" office:value="0.004516">
                <text:p>0.004516</text:p>
              </table:table-cell>
              <table:table-cell office:value-type="float" office:value="0.006605">
                <text:p>0.00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443cm" svg:height="10.11cm" xlink:href=".." xlink:type="simple" chart:class="chart:bar" chart:style-name="ch1">
        <chart:title svg:x="9.751cm" svg:y="0.338cm" chart:style-name="ch2">
          <text:p>HeatMap</text:p>
        </chart:title>
        <chart:subtitle svg:x="8.534cm" svg:y="1.319cm" chart:style-name="ch3">
          <text:p>512x506, 1500 Iterations</text:p>
        </chart:subtitle>
        <chart:legend chart:legend-position="end" svg:x="19.1cm" svg:y="4.507cm" style:legend-expansion="high" chart:style-name="ch4"/>
        <chart:plot-area chart:style-name="ch5" table:cell-range-address="Timing.J185:Timing.O187" chart:data-source-has-labels="both" svg:x="1.439cm" svg:y="2.204cm" svg:width="17.233cm" svg:height="6.723cm">
          <chart:coordinate-region svg:x="2.06cm" svg:y="2.403cm" svg:width="16.612cm" svg:height="5.877cm"/>
          <chart:axis chart:dimension="x" chart:name="primary-x" chart:style-name="ch6" chartooo:axis-type="auto">
            <chartooo:date-scale/>
            <chart:title svg:x="9.191cm" svg:y="9.129cm" chart:style-name="ch7">
              <text:p>Num QPUs</text:p>
            </chart:title>
            <chart:categories table:cell-range-address="Timing.K185:Timing.O185"/>
          </chart:axis>
          <chart:axis chart:dimension="x" chart:name="secondary-x" chart:style-name="ch8"/>
          <chart:axis chart:dimension="y" chart:name="primary-y" chart:style-name="ch9">
            <chart:title svg:x="0.451cm" svg:y="6.257cm" chart:style-name="ch10">
              <text:p>Seconds</text:p>
            </chart:title>
            <chart:grid chart:style-name="ch11" chart:class="major"/>
          </chart:axis>
          <chart:series chart:style-name="ch12" chart:values-cell-range-address="Timing.K186:Timing.O186" chart:label-cell-address="Timing.J186:Timing.J186" chart:class="chart:bar">
            <chart:data-point chart:repeated="5"/>
          </chart:series>
          <chart:series chart:style-name="ch13" chart:values-cell-range-address="Timing.K187:Timing.O187" chart:label-cell-address="Timing.J187:Timing.J18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iming.K185:Timing.O18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Timing.J186:Timing.J186</svg:desc>
                </draw:g>
              </table:table-cell>
              <table:table-cell office:value-type="float" office:value="58.47852">
                <text:p>58.47852</text:p>
                <draw:g>
                  <svg:desc>Timing.K186:Timing.O186</svg:desc>
                </draw:g>
              </table:table-cell>
              <table:table-cell office:value-type="float" office:value="29.671871">
                <text:p>29.671871</text:p>
              </table:table-cell>
              <table:table-cell office:value-type="float" office:value="16.260778">
                <text:p>16.260778</text:p>
              </table:table-cell>
              <table:table-cell office:value-type="float" office:value="16.239317">
                <text:p>16.239317</text:p>
              </table:table-cell>
              <table:table-cell office:value-type="float" office:value="16.254746">
                <text:p>16.254746</text:p>
              </table:table-cell>
            </table:table-row>
            <table:table-row>
              <table:table-cell office:value-type="string">
                <text:p>pi4 64-bits</text:p>
                <draw:g>
                  <svg:desc>Timing.J187:Timing.J187</svg:desc>
                </draw:g>
              </table:table-cell>
              <table:table-cell office:value-type="float" office:value="34.449104">
                <text:p>34.449104</text:p>
                <draw:g>
                  <svg:desc>Timing.K187:Timing.O18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5815">
                <text:p>4.4258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81cm" svg:height="14.425cm" xlink:href=".." xlink:type="simple" chart:class="chart:bar" chart:style-name="ch1">
        <chart:title svg:x="7.39cm" svg:y="0.424cm" chart:style-name="ch2">
          <text:p>Pi4 First Block Matrix Multiplication without result reads</text:p>
        </chart:title>
        <chart:subtitle svg:x="9.374cm" svg:y="1.491cm" chart:style-name="ch3">
          <text:p>10 iterations; above 992 heap size: 64MB</text:p>
        </chart:subtitle>
        <chart:legend chart:legend-position="end" svg:x="21.998cm" svg:y="6.664cm" style:legend-expansion="high" chart:style-name="ch4"/>
        <chart:plot-area chart:style-name="ch5" table:cell-range-address="Timing.J1110:Timing.BD1110 Timing.I1122:Timing.BD1122 Timing.I1124:Timing.BD1124" chart:data-source-has-labels="both" svg:x="0.732cm" svg:y="2.69cm" svg:width="20.922cm" svg:height="11.215cm">
          <chart:coordinate-region svg:x="1.353cm" svg:y="2.889cm" svg:width="20.301cm" svg:height="9.962cm"/>
          <chart:axis chart:dimension="x" chart:name="primary-x" chart:style-name="ch6" chartooo:axis-type="auto">
            <chartooo:date-scale/>
            <chart:title svg:x="9.905cm" svg:y="13.865cm" chart:style-name="ch7">
              <text:p>Matrix dimension</text:p>
            </chart:title>
            <chart:categories table:cell-range-address="Timing.J1110:Timing.BD1110"/>
          </chart:axis>
          <chart:axis chart:dimension="y" chart:name="primary-y" chart:style-name="ch8">
            <chart:title svg:x="0cm" svg:y="8.989cm" chart:style-name="ch9">
              <text:p>Seconds</text:p>
            </chart:title>
            <chart:grid chart:style-name="ch10" chart:class="major"/>
          </chart:axis>
          <chart:series chart:style-name="ch11" chart:values-cell-range-address="Timing.J1122:Timing.BD1122" chart:label-cell-address="Timing.I1122:Timing.I1122" chart:class="chart:bar">
            <chart:data-point chart:repeated="47"/>
          </chart:series>
          <chart:series chart:style-name="ch12" chart:values-cell-range-address="Timing.J1124:Timing.BD1124" chart:label-cell-address="Timing.I1124:Timing.I1124" chart:class="chart:bar">
            <chart:data-point chart:repeated="4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Timing.J1110:Timing.BD1110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  <table:table-cell office:value-type="float" office:value="192">
                <text:p>192</text:p>
              </table:table-cell>
              <table:table-cell office:value-type="float" office:value="224">
                <text:p>224</text:p>
              </table:table-cell>
              <table:table-cell office:value-type="float" office:value="256">
                <text:p>256</text:p>
              </table:table-cell>
              <table:table-cell office:value-type="float" office:value="288">
                <text:p>288</text:p>
              </table:table-cell>
              <table:table-cell office:value-type="float" office:value="320">
                <text:p>320</text:p>
              </table:table-cell>
              <table:table-cell office:value-type="float" office:value="352">
                <text:p>352</text:p>
              </table:table-cell>
              <table:table-cell office:value-type="float" office:value="384">
                <text:p>384</text:p>
              </table:table-cell>
              <table:table-cell office:value-type="float" office:value="416">
                <text:p>416</text:p>
              </table:table-cell>
              <table:table-cell office:value-type="float" office:value="448">
                <text:p>448</text:p>
              </table:table-cell>
              <table:table-cell office:value-type="float" office:value="480">
                <text:p>480</text:p>
              </table:table-cell>
              <table:table-cell office:value-type="float" office:value="512">
                <text:p>512</text:p>
              </table:table-cell>
              <table:table-cell office:value-type="float" office:value="544">
                <text:p>544</text:p>
              </table:table-cell>
              <table:table-cell office:value-type="float" office:value="576">
                <text:p>576</text:p>
              </table:table-cell>
              <table:table-cell office:value-type="float" office:value="608">
                <text:p>608</text:p>
              </table:table-cell>
              <table:table-cell office:value-type="float" office:value="640">
                <text:p>640</text:p>
              </table:table-cell>
              <table:table-cell office:value-type="float" office:value="672">
                <text:p>672</text:p>
              </table:table-cell>
              <table:table-cell office:value-type="float" office:value="704">
                <text:p>704</text:p>
              </table:table-cell>
              <table:table-cell office:value-type="float" office:value="736">
                <text:p>736</text:p>
              </table:table-cell>
              <table:table-cell office:value-type="float" office:value="768">
                <text:p>768</text:p>
              </table:table-cell>
              <table:table-cell office:value-type="float" office:value="800">
                <text:p>800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  <table:table-cell office:value-type="float" office:value="1024">
                <text:p>1024</text:p>
              </table:table-cell>
              <table:table-cell office:value-type="float" office:value="1056">
                <text:p>1056</text:p>
              </table:table-cell>
              <table:table-cell office:value-type="float" office:value="1088">
                <text:p>1088</text:p>
              </table:table-cell>
              <table:table-cell office:value-type="float" office:value="1120">
                <text:p>1120</text:p>
              </table:table-cell>
              <table:table-cell office:value-type="float" office:value="1152">
                <text:p>1152</text:p>
              </table:table-cell>
              <table:table-cell office:value-type="float" office:value="1184">
                <text:p>1184</text:p>
              </table:table-cell>
              <table:table-cell office:value-type="float" office:value="1216">
                <text:p>1216</text:p>
              </table:table-cell>
              <table:table-cell office:value-type="float" office:value="1248">
                <text:p>1248</text:p>
              </table:table-cell>
              <table:table-cell office:value-type="float" office:value="1280">
                <text:p>1280</text:p>
              </table:table-cell>
              <table:table-cell office:value-type="float" office:value="1312">
                <text:p>1312</text:p>
              </table:table-cell>
              <table:table-cell office:value-type="float" office:value="1344">
                <text:p>1344</text:p>
              </table:table-cell>
              <table:table-cell office:value-type="float" office:value="1376">
                <text:p>1376</text:p>
              </table:table-cell>
              <table:table-cell office:value-type="float" office:value="1408">
                <text:p>1408</text:p>
              </table:table-cell>
              <table:table-cell office:value-type="float" office:value="1440">
                <text:p>1440</text:p>
              </table:table-cell>
              <table:table-cell office:value-type="float" office:value="1472">
                <text:p>1472</text:p>
              </table:table-cell>
              <table:table-cell office:value-type="float" office:value="1504">
                <text:p>1504</text:p>
              </table:table-cell>
            </table:table-row>
          </table:table-header-rows>
          <table:table-rows>
            <table:table-row>
              <table:table-cell office:value-type="string">
                <text:p>Pi4-64 block -n=8</text:p>
                <draw:g>
                  <svg:desc>Timing.I1122:Timing.I1122</svg:desc>
                </draw:g>
              </table:table-cell>
              <table:table-cell office:value-type="float" office:value="0.00299">
                <text:p>0.00299</text:p>
                <draw:g>
                  <svg:desc>Timing.J1122:Timing.BD1122</svg:desc>
                </draw:g>
              </table:table-cell>
              <table:table-cell office:value-type="float" office:value="0.009281">
                <text:p>0.009281</text:p>
              </table:table-cell>
              <table:table-cell office:value-type="float" office:value="0.020125">
                <text:p>0.020125</text:p>
              </table:table-cell>
              <table:table-cell office:value-type="float" office:value="0.036434">
                <text:p>0.036434</text:p>
              </table:table-cell>
              <table:table-cell office:value-type="float" office:value="0.058297">
                <text:p>0.058297</text:p>
              </table:table-cell>
              <table:table-cell office:value-type="float" office:value="0.086988">
                <text:p>0.086988</text:p>
              </table:table-cell>
              <table:table-cell office:value-type="float" office:value="0.122987">
                <text:p>0.122987</text:p>
              </table:table-cell>
              <table:table-cell office:value-type="float" office:value="0.173091">
                <text:p>0.173091</text:p>
              </table:table-cell>
              <table:table-cell office:value-type="float" office:value="0.221307">
                <text:p>0.221307</text:p>
              </table:table-cell>
              <table:table-cell office:value-type="float" office:value="0.341209">
                <text:p>0.341209</text:p>
              </table:table-cell>
              <table:table-cell office:value-type="float" office:value="0.418803">
                <text:p>0.418803</text:p>
              </table:table-cell>
              <table:table-cell office:value-type="float" office:value="0.877601">
                <text:p>0.877601</text:p>
              </table:table-cell>
              <table:table-cell office:value-type="float" office:value="1.083806">
                <text:p>1.083806</text:p>
              </table:table-cell>
              <table:table-cell office:value-type="float" office:value="1.291524">
                <text:p>1.291524</text:p>
              </table:table-cell>
              <table:table-cell office:value-type="float" office:value="1.536153">
                <text:p>1.536153</text:p>
              </table:table-cell>
              <table:table-cell office:value-type="float" office:value="1.7882">
                <text:p>1.7882</text:p>
              </table:table-cell>
              <table:table-cell office:value-type="float" office:value="2.16244">
                <text:p>2.16244</text:p>
              </table:table-cell>
              <table:table-cell office:value-type="float" office:value="2.397848">
                <text:p>2.397848</text:p>
              </table:table-cell>
              <table:table-cell office:value-type="float" office:value="2.830069">
                <text:p>2.830069</text:p>
              </table:table-cell>
              <table:table-cell office:value-type="float" office:value="3.033465">
                <text:p>3.033465</text:p>
              </table:table-cell>
              <table:table-cell office:value-type="float" office:value="3.128687">
                <text:p>3.128687</text:p>
              </table:table-cell>
              <table:table-cell office:value-type="float" office:value="3.81947">
                <text:p>3.81947</text:p>
              </table:table-cell>
              <table:table-cell office:value-type="float" office:value="2.61696">
                <text:p>2.61696</text:p>
              </table:table-cell>
              <table:table-cell office:value-type="float" office:value="4.075937">
                <text:p>4.075937</text:p>
              </table:table-cell>
              <table:table-cell office:value-type="float" office:value="5.115052">
                <text:p>5.115052</text:p>
              </table:table-cell>
              <table:table-cell office:value-type="float" office:value="3.77237">
                <text:p>3.77237</text:p>
              </table:table-cell>
              <table:table-cell office:value-type="float" office:value="5.258296">
                <text:p>5.258296</text:p>
              </table:table-cell>
              <table:table-cell office:value-type="float" office:value="6.711325">
                <text:p>6.711325</text:p>
              </table:table-cell>
              <table:table-cell office:value-type="float" office:value="5.198809">
                <text:p>5.198809</text:p>
              </table:table-cell>
              <table:table-cell office:value-type="float" office:value="5.689355">
                <text:p>5.689355</text:p>
              </table:table-cell>
              <table:table-cell office:value-type="float" office:value="5.948296">
                <text:p>5.948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2 Pi4-64 block -n=8</text:p>
                <draw:g>
                  <svg:desc>Timing.I1124:Timing.I1124</svg:desc>
                </draw:g>
              </table:table-cell>
              <table:table-cell office:value-type="float" office:value="0.003257">
                <text:p>0.003257</text:p>
                <draw:g>
                  <svg:desc>Timing.J1124:Timing.BD1124</svg:desc>
                </draw:g>
              </table:table-cell>
              <table:table-cell office:value-type="float" office:value="0.009515">
                <text:p>0.009515</text:p>
              </table:table-cell>
              <table:table-cell office:value-type="float" office:value="0.020356">
                <text:p>0.020356</text:p>
              </table:table-cell>
              <table:table-cell office:value-type="float" office:value="0.036603">
                <text:p>0.036603</text:p>
              </table:table-cell>
              <table:table-cell office:value-type="float" office:value="0.058338">
                <text:p>0.058338</text:p>
              </table:table-cell>
              <table:table-cell office:value-type="float" office:value="0.092567">
                <text:p>0.092567</text:p>
              </table:table-cell>
              <table:table-cell office:value-type="float" office:value="0.122295">
                <text:p>0.122295</text:p>
              </table:table-cell>
              <table:table-cell office:value-type="float" office:value="0.171875">
                <text:p>0.171875</text:p>
              </table:table-cell>
              <table:table-cell office:value-type="float" office:value="0.220375">
                <text:p>0.220375</text:p>
              </table:table-cell>
              <table:table-cell office:value-type="float" office:value="0.288439">
                <text:p>0.288439</text:p>
              </table:table-cell>
              <table:table-cell office:value-type="float" office:value="0.418655">
                <text:p>0.418655</text:p>
              </table:table-cell>
              <table:table-cell office:value-type="float" office:value="0.523694">
                <text:p>0.523694</text:p>
              </table:table-cell>
              <table:table-cell office:value-type="float" office:value="0.631981">
                <text:p>0.631981</text:p>
              </table:table-cell>
              <table:table-cell office:value-type="float" office:value="0.744844">
                <text:p>0.744844</text:p>
              </table:table-cell>
              <table:table-cell office:value-type="float" office:value="0.885581">
                <text:p>0.885581</text:p>
              </table:table-cell>
              <table:table-cell office:value-type="float" office:value="1.044115">
                <text:p>1.044115</text:p>
              </table:table-cell>
              <table:table-cell office:value-type="float" office:value="1.2618">
                <text:p>1.2618</text:p>
              </table:table-cell>
              <table:table-cell office:value-type="float" office:value="1.41101">
                <text:p>1.41101</text:p>
              </table:table-cell>
              <table:table-cell office:value-type="float" office:value="1.65828">
                <text:p>1.65828</text:p>
              </table:table-cell>
              <table:table-cell office:value-type="float" office:value="1.843521">
                <text:p>1.843521</text:p>
              </table:table-cell>
              <table:table-cell office:value-type="float" office:value="2.209391">
                <text:p>2.209391</text:p>
              </table:table-cell>
              <table:table-cell office:value-type="float" office:value="2.380627">
                <text:p>2.380627</text:p>
              </table:table-cell>
              <table:table-cell office:value-type="float" office:value="2.699806">
                <text:p>2.699806</text:p>
              </table:table-cell>
              <table:table-cell office:value-type="float" office:value="3.003518">
                <text:p>3.003518</text:p>
              </table:table-cell>
              <table:table-cell office:value-type="float" office:value="3.430104">
                <text:p>3.430104</text:p>
              </table:table-cell>
              <table:table-cell office:value-type="float" office:value="3.709641">
                <text:p>3.709641</text:p>
              </table:table-cell>
              <table:table-cell office:value-type="float" office:value="4.034827">
                <text:p>4.034827</text:p>
              </table:table-cell>
              <table:table-cell office:value-type="float" office:value="4.420161">
                <text:p>4.420161</text:p>
              </table:table-cell>
              <table:table-cell office:value-type="float" office:value="5.183529">
                <text:p>5.183529</text:p>
              </table:table-cell>
              <table:table-cell office:value-type="float" office:value="5.086924">
                <text:p>5.086924</text:p>
              </table:table-cell>
              <table:table-cell office:value-type="float" office:value="6.116228">
                <text:p>6.116228</text:p>
              </table:table-cell>
              <table:table-cell office:value-type="float" office:value="6.212815">
                <text:p>6.212815</text:p>
              </table:table-cell>
              <table:table-cell office:value-type="float" office:value="6.849411">
                <text:p>6.849411</text:p>
              </table:table-cell>
              <table:table-cell office:value-type="float" office:value="7.450314">
                <text:p>7.450314</text:p>
              </table:table-cell>
              <table:table-cell office:value-type="float" office:value="8.165679">
                <text:p>8.165679</text:p>
              </table:table-cell>
              <table:table-cell office:value-type="float" office:value="9.423962">
                <text:p>9.423962</text:p>
              </table:table-cell>
              <table:table-cell office:value-type="float" office:value="9.840509">
                <text:p>9.840509</text:p>
              </table:table-cell>
              <table:table-cell office:value-type="float" office:value="11.637999">
                <text:p>11.637999</text:p>
              </table:table-cell>
              <table:table-cell office:value-type="float" office:value="11.248815">
                <text:p>11.248815</text:p>
              </table:table-cell>
              <table:table-cell office:value-type="float" office:value="12.936267">
                <text:p>12.936267</text:p>
              </table:table-cell>
              <table:table-cell office:value-type="float" office:value="13.110754">
                <text:p>13.110754</text:p>
              </table:table-cell>
              <table:table-cell office:value-type="float" office:value="14.664275">
                <text:p>14.664275</text:p>
              </table:table-cell>
              <table:table-cell office:value-type="float" office:value="15.758054">
                <text:p>15.758054</text:p>
              </table:table-cell>
              <table:table-cell office:value-type="float" office:value="17.786911">
                <text:p>17.786911</text:p>
              </table:table-cell>
              <table:table-cell office:value-type="float" office:value="19.000269">
                <text:p>19.000269</text:p>
              </table:table-cell>
              <table:table-cell office:value-type="float" office:value="19.332735">
                <text:p>19.332735</text:p>
              </table:table-cell>
              <table:table-cell office:value-type="float" office:value="21.246057">
                <text:p>21.24605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cm" svg:height="11.158cm" xlink:href=".." xlink:type="simple" chart:class="chart:bar" chart:style-name="ch1">
        <chart:title svg:x="8.275cm" svg:y="0.359cm" chart:style-name="ch2">
          <text:p>v3d Block Multiplication</text:p>
        </chart:title>
        <chart:subtitle svg:x="9.585cm" svg:y="1.361cm" chart:style-name="ch3">
          <text:p>10 iterations</text:p>
        </chart:subtitle>
        <chart:legend chart:legend-position="end" svg:x="17.946cm" svg:y="4.533cm" style:legend-expansion="high" chart:style-name="ch4"/>
        <chart:plot-area chart:style-name="ch5" table:cell-range-address="Timing.J1110:Timing.AA1110 Timing.I1119:Timing.AA1122" chart:data-source-has-labels="both" svg:x="1.439cm" svg:y="2.267cm" svg:width="16.079cm" svg:height="7.687cm">
          <chart:coordinate-region svg:x="2.06cm" svg:y="2.466cm" svg:width="15.458cm" svg:height="6.841cm"/>
          <chart:axis chart:dimension="x" chart:name="primary-x" chart:style-name="ch6" chartooo:axis-type="auto">
            <chartooo:date-scale/>
            <chart:title svg:x="8.19cm" svg:y="10.177cm" chart:style-name="ch7">
              <text:p>Matrix dimension</text:p>
            </chart:title>
            <chart:categories table:cell-range-address="Timing.J1110:Timing.AA1110"/>
          </chart:axis>
          <chart:axis chart:dimension="y" chart:name="primary-y" chart:style-name="ch8">
            <chart:title svg:x="0.451cm" svg:y="6.802cm" chart:style-name="ch9">
              <text:p>Seconds</text:p>
            </chart:title>
            <chart:grid chart:style-name="ch10" chart:class="major"/>
          </chart:axis>
          <chart:series chart:style-name="ch11" chart:values-cell-range-address="Timing.J1119:Timing.AA1119" chart:label-cell-address="Timing.I1119:Timing.I1119" chart:class="chart:bar">
            <chart:data-point chart:repeated="18"/>
          </chart:series>
          <chart:series chart:style-name="ch12" chart:values-cell-range-address="Timing.J1120:Timing.AA1120" chart:label-cell-address="Timing.I1120:Timing.I1120" chart:class="chart:bar">
            <chart:data-point chart:repeated="18"/>
          </chart:series>
          <chart:series chart:style-name="ch13" chart:values-cell-range-address="Timing.J1121:Timing.AA1121" chart:label-cell-address="Timing.I1121:Timing.I1121" chart:class="chart:bar">
            <chart:data-point chart:repeated="18"/>
          </chart:series>
          <chart:series chart:style-name="ch14" chart:values-cell-range-address="Timing.J1122:Timing.AA1122" chart:label-cell-address="Timing.I1122:Timing.I1122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Timing.J1110:Timing.AA1110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  <table:table-cell office:value-type="float" office:value="192">
                <text:p>192</text:p>
              </table:table-cell>
              <table:table-cell office:value-type="float" office:value="224">
                <text:p>224</text:p>
              </table:table-cell>
              <table:table-cell office:value-type="float" office:value="256">
                <text:p>256</text:p>
              </table:table-cell>
              <table:table-cell office:value-type="float" office:value="288">
                <text:p>288</text:p>
              </table:table-cell>
              <table:table-cell office:value-type="float" office:value="320">
                <text:p>320</text:p>
              </table:table-cell>
              <table:table-cell office:value-type="float" office:value="352">
                <text:p>352</text:p>
              </table:table-cell>
              <table:table-cell office:value-type="float" office:value="384">
                <text:p>384</text:p>
              </table:table-cell>
              <table:table-cell office:value-type="float" office:value="416">
                <text:p>416</text:p>
              </table:table-cell>
              <table:table-cell office:value-type="float" office:value="448">
                <text:p>448</text:p>
              </table:table-cell>
              <table:table-cell office:value-type="float" office:value="480">
                <text:p>480</text:p>
              </table:table-cell>
              <table:table-cell office:value-type="float" office:value="512">
                <text:p>512</text:p>
              </table:table-cell>
              <table:table-cell office:value-type="float" office:value="544">
                <text:p>544</text:p>
              </table:table-cell>
              <table:table-cell office:value-type="float" office:value="576">
                <text:p>576</text:p>
              </table:table-cell>
            </table:table-row>
          </table:table-header-rows>
          <table:table-rows>
            <table:table-row>
              <table:table-cell office:value-type="string">
                <text:p>Pi4-64 full -n=1</text:p>
                <draw:g>
                  <svg:desc>Timing.I1119:Timing.I1119</svg:desc>
                </draw:g>
              </table:table-cell>
              <table:table-cell office:value-type="float" office:value="0.008195">
                <text:p>0.008195</text:p>
                <draw:g>
                  <svg:desc>Timing.J1119:Timing.AA1119</svg:desc>
                </draw:g>
              </table:table-cell>
              <table:table-cell office:value-type="float" office:value="0.031683">
                <text:p>0.031683</text:p>
              </table:table-cell>
              <table:table-cell office:value-type="float" office:value="0.07533">
                <text:p>0.07533</text:p>
              </table:table-cell>
              <table:table-cell office:value-type="float" office:value="0.145685">
                <text:p>0.145685</text:p>
              </table:table-cell>
              <table:table-cell office:value-type="float" office:value="0.24717">
                <text:p>0.24717</text:p>
              </table:table-cell>
              <table:table-cell office:value-type="float" office:value="0.384656">
                <text:p>0.384656</text:p>
              </table:table-cell>
              <table:table-cell office:value-type="float" office:value="0.563212">
                <text:p>0.563212</text:p>
              </table:table-cell>
              <table:table-cell office:value-type="float" office:value="0.790538">
                <text:p>0.790538</text:p>
              </table:table-cell>
              <table:table-cell office:value-type="float" office:value="1.205929">
                <text:p>1.205929</text:p>
              </table:table-cell>
              <table:table-cell office:value-type="float" office:value="1.590564">
                <text:p>1.590564</text:p>
              </table:table-cell>
              <table:table-cell office:value-type="float" office:value="1.998456">
                <text:p>1.998456</text:p>
              </table:table-cell>
              <table:table-cell office:value-type="float" office:value="2.543847">
                <text:p>2.543847</text:p>
              </table:table-cell>
              <table:table-cell office:value-type="float" office:value="3.120268">
                <text:p>3.120268</text:p>
              </table:table-cell>
              <table:table-cell office:value-type="float" office:value="3.805345">
                <text:p>3.805345</text:p>
              </table:table-cell>
              <table:table-cell office:value-type="float" office:value="4.615666">
                <text:p>4.615666</text:p>
              </table:table-cell>
              <table:table-cell office:value-type="float" office:value="5.781734">
                <text:p>5.781734</text:p>
              </table:table-cell>
              <table:table-cell office:value-type="float" office:value="8.378145">
                <text:p>8.378145</text:p>
              </table:table-cell>
              <table:table-cell office:value-type="float" office:value="8.818791">
                <text:p>8.818791</text:p>
              </table:table-cell>
            </table:table-row>
            <table:table-row>
              <table:table-cell office:value-type="string">
                <text:p>Pi4-64 full -n=8</text:p>
                <draw:g>
                  <svg:desc>Timing.I1120:Timing.I1120</svg:desc>
                </draw:g>
              </table:table-cell>
              <table:table-cell office:value-type="float" office:value="0.002218">
                <text:p>0.002218</text:p>
                <draw:g>
                  <svg:desc>Timing.J1120:Timing.AA1120</svg:desc>
                </draw:g>
              </table:table-cell>
              <table:table-cell office:value-type="float" office:value="0.006218">
                <text:p>0.006218</text:p>
              </table:table-cell>
              <table:table-cell office:value-type="float" office:value="0.01341">
                <text:p>0.01341</text:p>
              </table:table-cell>
              <table:table-cell office:value-type="float" office:value="0.024556">
                <text:p>0.024556</text:p>
              </table:table-cell>
              <table:table-cell office:value-type="float" office:value="0.040461">
                <text:p>0.040461</text:p>
              </table:table-cell>
              <table:table-cell office:value-type="float" office:value="0.061494">
                <text:p>0.061494</text:p>
              </table:table-cell>
              <table:table-cell office:value-type="float" office:value="0.088609">
                <text:p>0.088609</text:p>
              </table:table-cell>
              <table:table-cell office:value-type="float" office:value="0.125948">
                <text:p>0.125948</text:p>
              </table:table-cell>
              <table:table-cell office:value-type="float" office:value="0.184956">
                <text:p>0.184956</text:p>
              </table:table-cell>
              <table:table-cell office:value-type="float" office:value="0.249402">
                <text:p>0.249402</text:p>
              </table:table-cell>
              <table:table-cell office:value-type="float" office:value="0.304661">
                <text:p>0.304661</text:p>
              </table:table-cell>
              <table:table-cell office:value-type="float" office:value="0.399475">
                <text:p>0.399475</text:p>
              </table:table-cell>
              <table:table-cell office:value-type="float" office:value="0.483913">
                <text:p>0.483913</text:p>
              </table:table-cell>
              <table:table-cell office:value-type="float" office:value="0.575486">
                <text:p>0.575486</text:p>
              </table:table-cell>
              <table:table-cell office:value-type="float" office:value="0.659748">
                <text:p>0.659748</text:p>
              </table:table-cell>
              <table:table-cell office:value-type="float" office:value="1.434297">
                <text:p>1.434297</text:p>
              </table:table-cell>
              <table:table-cell office:value-type="float" office:value="1.699447">
                <text:p>1.699447</text:p>
              </table:table-cell>
              <table:table-cell office:value-type="float" office:value="1.140655">
                <text:p>1.140655</text:p>
              </table:table-cell>
            </table:table-row>
            <table:table-row>
              <table:table-cell office:value-type="string">
                <text:p>Pi4-64 block -n=1</text:p>
                <draw:g>
                  <svg:desc>Timing.I1121:Timing.I1121</svg:desc>
                </draw:g>
              </table:table-cell>
              <table:table-cell office:value-type="float" office:value="0.014208">
                <text:p>0.014208</text:p>
                <draw:g>
                  <svg:desc>Timing.J1121:Timing.AA1121</svg:desc>
                </draw:g>
              </table:table-cell>
              <table:table-cell office:value-type="float" office:value="0.055811">
                <text:p>0.055811</text:p>
              </table:table-cell>
              <table:table-cell office:value-type="float" office:value="0.129277">
                <text:p>0.129277</text:p>
              </table:table-cell>
              <table:table-cell office:value-type="float" office:value="0.239092">
                <text:p>0.239092</text:p>
              </table:table-cell>
              <table:table-cell office:value-type="float" office:value="0.388923">
                <text:p>0.388923</text:p>
              </table:table-cell>
              <table:table-cell office:value-type="float" office:value="0.583035">
                <text:p>0.583035</text:p>
              </table:table-cell>
              <table:table-cell office:value-type="float" office:value="0.832769">
                <text:p>0.832769</text:p>
              </table:table-cell>
              <table:table-cell office:value-type="float" office:value="1.146657">
                <text:p>1.146657</text:p>
              </table:table-cell>
              <table:table-cell office:value-type="float" office:value="1.510728">
                <text:p>1.510728</text:p>
              </table:table-cell>
              <table:table-cell office:value-type="float" office:value="1.952475">
                <text:p>1.952475</text:p>
              </table:table-cell>
              <table:table-cell office:value-type="float" office:value="2.913386">
                <text:p>2.913386</text:p>
              </table:table-cell>
              <table:table-cell office:value-type="float" office:value="6.452958">
                <text:p>6.452958</text:p>
              </table:table-cell>
              <table:table-cell office:value-type="float" office:value="5.735005">
                <text:p>5.735005</text:p>
              </table:table-cell>
              <table:table-cell office:value-type="float" office:value="8.630354">
                <text:p>8.630354</text:p>
              </table:table-cell>
              <table:table-cell office:value-type="float" office:value="7.770251">
                <text:p>7.770251</text:p>
              </table:table-cell>
              <table:table-cell office:value-type="float" office:value="9.957042">
                <text:p>9.957042</text:p>
              </table:table-cell>
              <table:table-cell office:value-type="float" office:value="13.020107">
                <text:p>13.020107</text:p>
              </table:table-cell>
              <table:table-cell office:value-type="float" office:value="13.820134">
                <text:p>13.820134</text:p>
              </table:table-cell>
            </table:table-row>
            <table:table-row>
              <table:table-cell office:value-type="string">
                <text:p>Pi4-64 block -n=8</text:p>
                <draw:g>
                  <svg:desc>Timing.I1122:Timing.I1122</svg:desc>
                </draw:g>
              </table:table-cell>
              <table:table-cell office:value-type="float" office:value="0.00299">
                <text:p>0.00299</text:p>
                <draw:g>
                  <svg:desc>Timing.J1122:Timing.AA1122</svg:desc>
                </draw:g>
              </table:table-cell>
              <table:table-cell office:value-type="float" office:value="0.009281">
                <text:p>0.009281</text:p>
              </table:table-cell>
              <table:table-cell office:value-type="float" office:value="0.020125">
                <text:p>0.020125</text:p>
              </table:table-cell>
              <table:table-cell office:value-type="float" office:value="0.036434">
                <text:p>0.036434</text:p>
              </table:table-cell>
              <table:table-cell office:value-type="float" office:value="0.058297">
                <text:p>0.058297</text:p>
              </table:table-cell>
              <table:table-cell office:value-type="float" office:value="0.086988">
                <text:p>0.086988</text:p>
              </table:table-cell>
              <table:table-cell office:value-type="float" office:value="0.122987">
                <text:p>0.122987</text:p>
              </table:table-cell>
              <table:table-cell office:value-type="float" office:value="0.173091">
                <text:p>0.173091</text:p>
              </table:table-cell>
              <table:table-cell office:value-type="float" office:value="0.221307">
                <text:p>0.221307</text:p>
              </table:table-cell>
              <table:table-cell office:value-type="float" office:value="0.341209">
                <text:p>0.341209</text:p>
              </table:table-cell>
              <table:table-cell office:value-type="float" office:value="0.418803">
                <text:p>0.418803</text:p>
              </table:table-cell>
              <table:table-cell office:value-type="float" office:value="0.877601">
                <text:p>0.877601</text:p>
              </table:table-cell>
              <table:table-cell office:value-type="float" office:value="1.083806">
                <text:p>1.083806</text:p>
              </table:table-cell>
              <table:table-cell office:value-type="float" office:value="1.291524">
                <text:p>1.291524</text:p>
              </table:table-cell>
              <table:table-cell office:value-type="float" office:value="1.536153">
                <text:p>1.536153</text:p>
              </table:table-cell>
              <table:table-cell office:value-type="float" office:value="1.7882">
                <text:p>1.7882</text:p>
              </table:table-cell>
              <table:table-cell office:value-type="float" office:value="2.16244">
                <text:p>2.16244</text:p>
              </table:table-cell>
              <table:table-cell office:value-type="float" office:value="2.397848">
                <text:p>2.39784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8.98cm" xlink:href=".." xlink:type="simple" chart:class="chart:scatter" chart:style-name="ch1">
        <chart:legend chart:legend-position="end" svg:x="12.02cm" svg:y="3.942cm" style:legend-expansion="high" chart:style-name="ch2"/>
        <chart:plot-area chart:style-name="ch3" table:cell-range-address="Profiles.B121:Profiles.D128 Profiles.C120:Profiles.D120" chart:data-source-has-labels="row" svg:x="0.32cm" svg:y="0.179cm" svg:width="11.38cm" svg:height="8.622cm">
          <chart:coordinate-region svg:x="0.941cm" svg:y="0.378cm" svg:width="10.387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ofiles.C121:Profiles.C128" chart:label-cell-address="Profiles.C120:Profiles.C120" chart:class="chart:scatter">
            <chart:domain table:cell-range-address="Profiles.B121:Profiles.B128"/>
            <chart:data-point chart:repeated="8"/>
          </chart:series>
          <chart:series chart:style-name="ch8" chart:values-cell-range-address="Profiles.D121:Profiles.D128" chart:label-cell-address="Profiles.D120:Profiles.D120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1 QPU</text:p>
                <draw:g>
                  <svg:desc>Profiles.C120:Profiles.C120</svg:desc>
                </draw:g>
              </table:table-cell>
              <table:table-cell office:value-type="string">
                <text:p>Time Max QPU’s</text:p>
                <draw:g>
                  <svg:desc>Profiles.D120:Profiles.D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rofiles.B121:Profiles.B128</svg:desc>
                </draw:g>
              </table:table-cell>
              <table:table-cell office:value-type="float" office:value="9.046829">
                <text:p>9.046829</text:p>
                <draw:g>
                  <svg:desc>Profiles.C121:Profiles.C128</svg:desc>
                </draw:g>
              </table:table-cell>
              <table:table-cell office:value-type="float" office:value="4.660485">
                <text:p>4.660485</text:p>
                <draw:g>
                  <svg:desc>Profiles.D121:Profiles.D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04621">
                <text:p>6.704621</text:p>
              </table:table-cell>
              <table:table-cell office:value-type="float" office:value="2.634295">
                <text:p>2.634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.316423">
                <text:p>5.316423</text:p>
              </table:table-cell>
              <table:table-cell office:value-type="float" office:value="1.28237">
                <text:p>1.28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.870404">
                <text:p>4.870404</text:p>
              </table:table-cell>
              <table:table-cell office:value-type="float" office:value="0.85728">
                <text:p>0.85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.656257">
                <text:p>4.656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.523773">
                <text:p>4.523773</text:p>
              </table:table-cell>
              <table:table-cell office:value-type="float" office:value="0.520911">
                <text:p>0.520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4.482469">
                <text:p>4.482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4.466597">
                <text:p>4.466597</text:p>
              </table:table-cell>
              <table:table-cell office:value-type="float" office:value="0.459195">
                <text:p>0.45919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67cm" svg:height="9.008cm" xlink:href=".." xlink:type="simple" chart:class="chart:bar" chart:style-name="ch1">
        <chart:legend chart:legend-position="end" svg:x="15.989cm" svg:y="3.209cm" style:legend-expansion="high" chart:style-name="ch2"/>
        <chart:plot-area chart:style-name="ch3" table:cell-range-address="Profiles.A4:Profiles.F9" chart:data-source-has-labels="both" svg:x="0.379cm" svg:y="0.18cm" svg:width="15.231cm" svg:height="8.648cm">
          <chart:coordinate-region svg:x="1cm" svg:y="0.379cm" svg:width="14.61cm" svg:height="7.802cm"/>
          <chart:axis chart:dimension="x" chart:name="primary-x" chart:style-name="ch4" chartooo:axis-type="auto">
            <chartooo:date-scale/>
            <chart:categories table:cell-range-address="Profiles.B4:Profiles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F5" chart:label-cell-address="Profiles.A5:Profiles.A5" chart:class="chart:bar">
            <chart:data-point chart:repeated="5"/>
          </chart:series>
          <chart:series chart:style-name="ch8" chart:values-cell-range-address="Profiles.B6:Profiles.F6" chart:label-cell-address="Profiles.A6:Profiles.A6" chart:class="chart:bar">
            <chart:data-point chart:repeated="5"/>
          </chart:series>
          <chart:series chart:style-name="ch9" chart:values-cell-range-address="Profiles.B7:Profiles.F7" chart:label-cell-address="Profiles.A7:Profiles.A7" chart:class="chart:bar">
            <chart:data-point chart:repeated="5"/>
          </chart:series>
          <chart:series chart:style-name="ch10" chart:values-cell-range-address="Profiles.B8:Profiles.F8" chart:label-cell-address="Profiles.A8:Profiles.A8" chart:class="chart:bar">
            <chart:data-point chart:repeated="5"/>
          </chart:series>
          <chart:series chart:style-name="ch11" chart:values-cell-range-address="Profiles.B9:Profiles.F9" chart:label-cell-address="Profiles.A9:Profiles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F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48 rotate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F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243967">
                <text:p>46.243967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F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05957">
                <text:p>12.905957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NaN">
                <text:p>NaN</text:p>
                <draw:g>
                  <svg:desc>Profiles.B9:Profiles.F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94523">
                <text:p>3.094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2:Profiles.F54" chart:data-source-has-labels="both" svg:x="0.32cm" svg:y="0.18cm" svg:width="13.63cm" svg:height="8.646cm">
          <chart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2:Profiles.F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3:Profiles.F53" chart:label-cell-address="Profiles.A53:Profiles.A53" chart:class="chart:bar">
            <chart:data-point chart:repeated="5"/>
          </chart:series>
          <chart:series chart:style-name="ch8" chart:values-cell-range-address="Profiles.B54:Profiles.F54" chart:label-cell-address="Profiles.A54:Profiles.A5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2:Profiles.F52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ulti 1 QPU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3:Profiles.A53</svg:desc>
                </draw:g>
              </table:table-cell>
              <table:table-cell office:value-type="float" office:value="7.075472">
                <text:p>7.075472</text:p>
                <draw:g>
                  <svg:desc>Profiles.B53:Profiles.F53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9217">
                <text:p>2.979217</text:p>
              </table:table-cell>
            </table:table-row>
            <table:table-row>
              <table:table-cell office:value-type="string">
                <text:p>Pi4-64</text:p>
                <draw:g>
                  <svg:desc>Profiles.A54:Profiles.A54</svg:desc>
                </draw:g>
              </table:table-cell>
              <table:table-cell office:value-type="float" office:value="2.632804">
                <text:p>2.632804</text:p>
                <draw:g>
                  <svg:desc>Profiles.B54:Profiles.F54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12528">
                <text:p>2.0125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1.756cm" svg:y="3.457cm" style:legend-expansion="high" chart:style-name="ch2"/>
        <chart:plot-area chart:style-name="ch3" table:cell-range-address="Profiles.A80:Profiles.F84" chart:data-source-has-labels="both" svg:x="0.32cm" svg:y="0.18cm" svg:width="11.116cm" svg:height="8.646cm">
          <chart:coordinate-region svg:x="1.232cm" svg:y="0.38cm" svg:width="10.204cm" svg:height="7.799cm"/>
          <chart:axis chart:dimension="x" chart:name="primary-x" chart:style-name="ch4" chartooo:axis-type="auto">
            <chartooo:date-scale/>
            <chart:categories table:cell-range-address="Profiles.B80:Profiles.F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81:Profiles.F81" chart:label-cell-address="Profiles.A81:Profiles.A81" chart:class="chart:bar">
            <chart:data-point chart:repeated="5"/>
          </chart:series>
          <chart:series chart:style-name="ch8" chart:values-cell-range-address="Profiles.B82:Profiles.F82" chart:label-cell-address="Profiles.A82:Profiles.A82" chart:class="chart:bar">
            <chart:data-point chart:repeated="5"/>
          </chart:series>
          <chart:series chart:style-name="ch9" chart:values-cell-range-address="Profiles.B83:Profiles.F83" chart:label-cell-address="Profiles.A83:Profiles.A83" chart:class="chart:bar">
            <chart:data-point chart:repeated="5"/>
          </chart:series>
          <chart:series chart:style-name="ch10" chart:values-cell-range-address="Profiles.B84:Profiles.F84" chart:label-cell-address="Profiles.A84:Profiles.A8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QPU</text:p>
                <draw:g>
                  <svg:desc>Profiles.B80:Profiles.F80</svg:desc>
                </draw:g>
              </table:table-cell>
              <table:table-cell office:value-type="string">
                <text:p>2 QPU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4 QPUs</text:p>
              </table:table-cell>
            </table:table-row>
          </table:table-header-rows>
          <table:table-rows>
            <table:table-row>
              <table:table-cell office:value-type="string">
                <text:p>DMA 1 QPU kernel</text:p>
                <draw:g>
                  <svg:desc>Profiles.A81:Profiles.A81</svg:desc>
                </draw:g>
              </table:table-cell>
              <table:table-cell office:value-type="float" office:value="0.170312">
                <text:p>0.170312</text:p>
                <draw:g>
                  <svg:desc>Profiles.B81:Profiles.F81</svg:desc>
                </draw:g>
              </table:table-cell>
              <table:table-cell office:value-type="float" office:value="0.193194">
                <text:p>0.193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194">
                <text:p>0.326194</text:p>
              </table:table-cell>
            </table:table-row>
            <table:table-row>
              <table:table-cell office:value-type="string">
                <text:p>TMU 1 QPU kernel</text:p>
                <draw:g>
                  <svg:desc>Profiles.A82:Profiles.A82</svg:desc>
                </draw:g>
              </table:table-cell>
              <table:table-cell office:value-type="float" office:value="0.116388">
                <text:p>0.116388</text:p>
                <draw:g>
                  <svg:desc>Profiles.B82:Profiles.F82</svg:desc>
                </draw:g>
              </table:table-cell>
              <table:table-cell office:value-type="float" office:value="0.143072">
                <text:p>0.143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3717">
                <text:p>0.273717</text:p>
              </table:table-cell>
            </table:table-row>
            <table:table-row>
              <table:table-cell office:value-type="string">
                <text:p>DMA multi QPU kernel</text:p>
                <draw:g>
                  <svg:desc>Profiles.A83:Profiles.A83</svg:desc>
                </draw:g>
              </table:table-cell>
              <table:table-cell office:value-type="float" office:value="0.169547">
                <text:p>0.169547</text:p>
                <draw:g>
                  <svg:desc>Profiles.B83:Profiles.F83</svg:desc>
                </draw:g>
              </table:table-cell>
              <table:table-cell office:value-type="float" office:value="0.095414">
                <text:p>0.09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13">
                <text:p>0.08213</text:p>
              </table:table-cell>
            </table:table-row>
            <table:table-row>
              <table:table-cell office:value-type="string">
                <text:p>TMU multi QPU kernel</text:p>
                <draw:g>
                  <svg:desc>Profiles.A84:Profiles.A84</svg:desc>
                </draw:g>
              </table:table-cell>
              <table:table-cell office:value-type="float" office:value="0.115114">
                <text:p>0.115114</text:p>
                <draw:g>
                  <svg:desc>Profiles.B84:Profiles.F84</svg:desc>
                </draw:g>
              </table:table-cell>
              <table:table-cell office:value-type="float" office:value="0.074205">
                <text:p>0.074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838">
                <text:p>0.0688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4.506cm" svg:y="0.316cm" chart:style-name="ch2">
          <text:p>Percentage change execution time</text:p>
        </chart:title>
        <chart:legend chart:legend-position="end" svg:x="14.482cm" svg:y="3.955cm" style:legend-expansion="high" chart:style-name="ch3"/>
        <chart:plot-area chart:style-name="ch4" table:cell-range-address="Profiles.A98:Profiles.C100" chart:data-source-has-labels="both" svg:x="1.331cm" svg:y="1.275cm" svg:width="12.831cm" svg:height="7.551cm">
          <chart:coordinate-region svg:x="2.138cm" svg:y="1.474cm" svg:width="12.024cm" svg:height="6.705cm"/>
          <chart:axis chart:dimension="x" chart:name="primary-x" chart:style-name="ch5" chartooo:axis-type="auto">
            <chartooo:date-scale/>
            <chart:categories table:cell-range-address="Profiles.B98:Profiles.C98"/>
          </chart:axis>
          <chart:axis chart:dimension="y" chart:name="primary-y" chart:style-name="ch6">
            <chart:title svg:x="0.451cm" svg:y="5.253cm" chart:style-name="ch7">
              <text:p>%</text:p>
            </chart:title>
            <chart:grid chart:style-name="ch8" chart:class="major"/>
          </chart:axis>
          <chart:series chart:style-name="ch9" chart:values-cell-range-address="Profiles.B99:Profiles.C99" chart:label-cell-address="Profiles.A99:Profiles.A99" chart:class="chart:bar">
            <chart:data-point chart:repeated="2"/>
          </chart:series>
          <chart:series chart:style-name="ch10" chart:values-cell-range-address="Profiles.B100:Profiles.C100" chart:label-cell-address="Profiles.A100:Profiles.A100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</text:p>
                <draw:g>
                  <svg:desc>Profiles.B98:Profiles.C98</svg:desc>
                </draw:g>
              </table:table-cell>
              <table:table-cell office:value-type="string">
                <text:p>Rot3D</text:p>
              </table:table-cell>
            </table:table-row>
          </table:table-header-rows>
          <table:table-rows>
            <table:table-row>
              <table:table-cell office:value-type="string">
                <text:p>DMA</text:p>
                <draw:g>
                  <svg:desc>Profiles.A99:Profiles.A99</svg:desc>
                </draw:g>
              </table:table-cell>
              <table:table-cell office:value-type="float" office:value="100">
                <text:p>100</text:p>
                <draw:g>
                  <svg:desc>Profiles.B99:Profiles.C99</svg:desc>
                </draw:g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MU</text:p>
                <draw:g>
                  <svg:desc>Profiles.A100:Profiles.A100</svg:desc>
                </draw:g>
              </table:table-cell>
              <table:table-cell office:value-type="float" office:value="47.5003454750954">
                <text:p>47.5003454750954</text:p>
                <draw:g>
                  <svg:desc>Profiles.B100:Profiles.C100</svg:desc>
                </draw:g>
              </table:table-cell>
              <table:table-cell office:value-type="float" office:value="68.3381088825215">
                <text:p>68.338108882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1.218cm" xlink:href=".." xlink:type="simple" chart:class="chart:bar" chart:style-name="ch1">
        <chart:title svg:x="6.17cm" svg:y="0.36cm" chart:style-name="ch2">
          <text:p>Pi2 - 10 iterations</text:p>
        </chart:title>
        <chart:subtitle svg:x="7.427cm" svg:y="1.363cm" chart:style-name="ch3">
          <text:p>-n=12</text:p>
        </chart:subtitle>
        <chart:legend chart:legend-position="end" svg:x="13.049cm" svg:y="4.812cm" style:legend-expansion="high" chart:style-name="ch4"/>
        <chart:plot-area chart:style-name="ch5" table:cell-range-address="Timing.I214:Timing.S217" chart:data-source-has-labels="both" svg:x="1.331cm" svg:y="2.27cm" svg:width="11.398cm" svg:height="7.743cm">
          <chart:coordinate-region svg:x="2.243cm" svg:y="2.469cm" svg:width="10.486cm" svg:height="6.897cm"/>
          <chart:axis chart:dimension="x" chart:name="primary-x" chart:style-name="ch6" chartooo:axis-type="auto">
            <chartooo:date-scale/>
            <chart:title svg:x="5.716cm" svg:y="10.237cm" chart:style-name="ch7">
              <text:p>Matrix Dimension</text:p>
            </chart:title>
            <chart:categories table:cell-range-address="Timing.J214:Timing.S214"/>
          </chart:axis>
          <chart:axis chart:dimension="y" chart:name="primary-y" chart:style-name="ch8">
            <chart:title svg:x="0.451cm" svg:y="6.833cm" chart:style-name="ch9">
              <text:p>Seconds</text:p>
            </chart:title>
            <chart:grid chart:style-name="ch10" chart:class="major"/>
          </chart:axis>
          <chart:series chart:style-name="ch11" chart:values-cell-range-address="Timing.J215:Timing.S215" chart:label-cell-address="Timing.I215:Timing.I215" chart:class="chart:bar">
            <chart:data-point chart:repeated="10"/>
          </chart:series>
          <chart:series chart:style-name="ch12" chart:values-cell-range-address="Timing.J216:Timing.S216" chart:label-cell-address="Timing.I216:Timing.I216" chart:class="chart:bar">
            <chart:data-point chart:repeated="10"/>
          </chart:series>
          <chart:series chart:style-name="ch13" chart:values-cell-range-address="Timing.J217:Timing.S217" chart:label-cell-address="Timing.I217:Timing.I217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214:Timing.S214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I215:Timing.I215</svg:desc>
                </draw:g>
              </table:table-cell>
              <table:table-cell office:value-type="float" office:value="0.003205">
                <text:p>0.003205</text:p>
                <draw:g>
                  <svg:desc>Timing.J215:Timing.S215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inline complex</text:p>
                <draw:g>
                  <svg:desc>Timing.I216:Timing.I216</svg:desc>
                </draw:g>
              </table:table-cell>
              <table:table-cell office:value-type="float" office:value="0.003964">
                <text:p>0.003964</text:p>
                <draw:g>
                  <svg:desc>Timing.J216:Timing.S216</svg:desc>
                </draw:g>
              </table:table-cell>
              <table:table-cell office:value-type="float" office:value="0.006102">
                <text:p>0.006102</text:p>
              </table:table-cell>
              <table:table-cell office:value-type="float" office:value="0.008257">
                <text:p>0.008257</text:p>
              </table:table-cell>
              <table:table-cell office:value-type="float" office:value="0.00994">
                <text:p>0.00994</text:p>
              </table:table-cell>
              <table:table-cell office:value-type="float" office:value="0.01222">
                <text:p>0.01222</text:p>
              </table:table-cell>
              <table:table-cell office:value-type="float" office:value="0.018153">
                <text:p>0.018153</text:p>
              </table:table-cell>
              <table:table-cell office:value-type="float" office:value="0.047119">
                <text:p>0.047119</text:p>
              </table:table-cell>
              <table:table-cell office:value-type="float" office:value="0.053517">
                <text:p>0.053517</text:p>
              </table:table-cell>
              <table:table-cell office:value-type="float" office:value="0.060098">
                <text:p>0.060098</text:p>
              </table:table-cell>
              <table:table-cell office:value-type="float" office:value="0.07089">
                <text:p>0.07089</text:p>
              </table:table-cell>
            </table:table-row>
            <table:table-row>
              <table:table-cell office:value-type="string">
                <text:p>inline float</text:p>
                <draw:g>
                  <svg:desc>Timing.I217:Timing.I217</svg:desc>
                </draw:g>
              </table:table-cell>
              <table:table-cell office:value-type="float" office:value="0.003467">
                <text:p>0.003467</text:p>
                <draw:g>
                  <svg:desc>Timing.J217:Timing.S217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225cm" svg:height="10.175cm" xlink:href=".." xlink:type="simple" chart:class="chart:bar" chart:style-name="ch1">
        <chart:title svg:x="6.989cm" svg:y="0.339cm" chart:style-name="ch2">
          <text:p>Matrix mult - 10 iterations</text:p>
        </chart:title>
        <chart:subtitle svg:x="7.795cm" svg:y="1.321cm" chart:style-name="ch3">
          <text:p>vc4 -n=12, v3d -n=8</text:p>
        </chart:subtitle>
        <chart:legend chart:legend-position="end" svg:x="18.02cm" svg:y="4.041cm" style:legend-expansion="high" chart:style-name="ch4"/>
        <chart:plot-area chart:style-name="ch5" table:cell-range-address="Timing.I372:Timing.S376" chart:data-source-has-labels="both" svg:x="1.395cm" svg:y="2.207cm" svg:width="16.241cm" svg:height="6.784cm">
          <chart:coordinate-region svg:x="2.493cm" svg:y="2.406cm" svg:width="15.143cm" svg:height="5.938cm"/>
          <chart:axis chart:dimension="x" chart:name="primary-x" chart:style-name="ch6" chartooo:axis-type="auto">
            <chartooo:date-scale/>
            <chart:title svg:x="8.227cm" svg:y="9.194cm" chart:style-name="ch7">
              <text:p>Matrix dimension</text:p>
            </chart:title>
            <chart:categories table:cell-range-address="Timing.J372:Timing.S372"/>
          </chart:axis>
          <chart:axis chart:dimension="y" chart:name="primary-y" chart:style-name="ch8">
            <chart:title svg:x="0.451cm" svg:y="6.291cm" chart:style-name="ch9">
              <text:p>Seconds</text:p>
            </chart:title>
            <chart:grid chart:style-name="ch10" chart:class="major"/>
          </chart:axis>
          <chart:series chart:style-name="ch11" chart:values-cell-range-address="Timing.J373:Timing.S373" chart:label-cell-address="Timing.I373:Timing.I373" chart:class="chart:bar">
            <chart:data-point chart:repeated="10"/>
          </chart:series>
          <chart:series chart:style-name="ch12" chart:values-cell-range-address="Timing.J374:Timing.S374" chart:label-cell-address="Timing.I374:Timing.I374" chart:class="chart:bar">
            <chart:data-point chart:repeated="10"/>
          </chart:series>
          <chart:series chart:style-name="ch13" chart:values-cell-range-address="Timing.J375:Timing.S375" chart:label-cell-address="Timing.I375:Timing.I375" chart:class="chart:bar">
            <chart:data-point chart:repeated="10"/>
          </chart:series>
          <chart:series chart:style-name="ch14" chart:values-cell-range-address="Timing.J376:Timing.S376" chart:label-cell-address="Timing.I376:Timing.I376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372:Timing.S372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I373:Timing.I373</svg:desc>
                </draw:g>
              </table:table-cell>
              <table:table-cell office:value-type="float" office:value="0.005854">
                <text:p>0.005854</text:p>
                <draw:g>
                  <svg:desc>Timing.J373:Timing.S373</svg:desc>
                </draw:g>
              </table:table-cell>
              <table:table-cell office:value-type="float" office:value="0.006329">
                <text:p>0.006329</text:p>
              </table:table-cell>
              <table:table-cell office:value-type="float" office:value="0.006731">
                <text:p>0.006731</text:p>
              </table:table-cell>
              <table:table-cell office:value-type="float" office:value="0.007711">
                <text:p>0.007711</text:p>
              </table:table-cell>
              <table:table-cell office:value-type="float" office:value="0.008032">
                <text:p>0.008032</text:p>
              </table:table-cell>
              <table:table-cell office:value-type="float" office:value="0.008537">
                <text:p>0.008537</text:p>
              </table:table-cell>
              <table:table-cell office:value-type="float" office:value="0.009337">
                <text:p>0.009337</text:p>
              </table:table-cell>
              <table:table-cell office:value-type="float" office:value="0.010306">
                <text:p>0.010306</text:p>
              </table:table-cell>
              <table:table-cell office:value-type="float" office:value="0.011167">
                <text:p>0.011167</text:p>
              </table:table-cell>
              <table:table-cell office:value-type="float" office:value="0.013397">
                <text:p>0.013397</text:p>
              </table:table-cell>
            </table:table-row>
            <table:table-row>
              <table:table-cell office:value-type="string">
                <text:p>pi2</text:p>
                <draw:g>
                  <svg:desc>Timing.I374:Timing.I374</svg:desc>
                </draw:g>
              </table:table-cell>
              <table:table-cell office:value-type="float" office:value="0.003205">
                <text:p>0.003205</text:p>
                <draw:g>
                  <svg:desc>Timing.J374:Timing.S374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pi3</text:p>
                <draw:g>
                  <svg:desc>Timing.I375:Timing.I375</svg:desc>
                </draw:g>
              </table:table-cell>
              <table:table-cell office:value-type="float" office:value="0.002477">
                <text:p>0.002477</text:p>
                <draw:g>
                  <svg:desc>Timing.J375:Timing.S375</svg:desc>
                </draw:g>
              </table:table-cell>
              <table:table-cell office:value-type="float" office:value="0.002679">
                <text:p>0.002679</text:p>
              </table:table-cell>
              <table:table-cell office:value-type="float" office:value="0.002754">
                <text:p>0.002754</text:p>
              </table:table-cell>
              <table:table-cell office:value-type="float" office:value="0.002935">
                <text:p>0.002935</text:p>
              </table:table-cell>
              <table:table-cell office:value-type="float" office:value="0.003146">
                <text:p>0.003146</text:p>
              </table:table-cell>
              <table:table-cell office:value-type="float" office:value="0.003509">
                <text:p>0.003509</text:p>
              </table:table-cell>
              <table:table-cell office:value-type="float" office:value="0.004621">
                <text:p>0.004621</text:p>
              </table:table-cell>
              <table:table-cell office:value-type="float" office:value="0.004977">
                <text:p>0.004977</text:p>
              </table:table-cell>
              <table:table-cell office:value-type="float" office:value="0.005453">
                <text:p>0.005453</text:p>
              </table:table-cell>
              <table:table-cell office:value-type="float" office:value="0.007625">
                <text:p>0.007625</text:p>
              </table:table-cell>
            </table:table-row>
            <table:table-row>
              <table:table-cell office:value-type="string">
                <text:p>pi4</text:p>
                <draw:g>
                  <svg:desc>Timing.I376:Timing.I376</svg:desc>
                </draw:g>
              </table:table-cell>
              <table:table-cell office:value-type="float" office:value="0.003428">
                <text:p>0.003428</text:p>
                <draw:g>
                  <svg:desc>Timing.J376:Timing.S3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521">
                <text:p>0.003521</text:p>
              </table:table-cell>
              <table:table-cell office:value-type="float" office:value="NaN">
                <text:p>NaN</text:p>
              </table:table-cell>
              <table:table-cell office:value-type="float" office:value="0.004315">
                <text:p>0.004315</text:p>
              </table:table-cell>
              <table:table-cell office:value-type="float" office:value="NaN">
                <text:p>NaN</text:p>
              </table:table-cell>
              <table:table-cell office:value-type="float" office:value="0.004609">
                <text:p>0.004609</text:p>
              </table:table-cell>
              <table:table-cell office:value-type="float" office:value="NaN">
                <text:p>NaN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06cm" svg:height="11.742cm" xlink:href=".." xlink:type="simple" chart:class="chart:bar" chart:style-name="ch1">
        <chart:title svg:x="9.922cm" svg:y="0.37cm" chart:style-name="ch2">
          <text:p>Inline float - 10 iterations</text:p>
        </chart:title>
        <chart:subtitle svg:x="10.636cm" svg:y="1.383cm" chart:style-name="ch3">
          <text:p>vc4 -n=12, v3d -n=8</text:p>
        </chart:subtitle>
        <chart:legend chart:legend-position="end" svg:x="23.701cm" svg:y="4.825cm" style:legend-expansion="high" chart:style-name="ch4"/>
        <chart:plot-area chart:style-name="ch5" table:cell-range-address="Timing.J406:Timing.AF410 Timing.I406:Timing.I410 Timing.T526:Timing.T526" chart:data-source-has-labels="both" svg:x="1.509cm" svg:y="2.3cm" svg:width="21.694cm" svg:height="8.227cm">
          <chart:coordinate-region svg:x="2.421cm" svg:y="2.5cm" svg:width="20.782cm" svg:height="7.38cm"/>
          <chart:axis chart:dimension="x" chart:name="primary-x" chart:style-name="ch6" chartooo:axis-type="auto">
            <chartooo:date-scale/>
            <chart:title svg:x="11.068cm" svg:y="10.761cm" chart:style-name="ch7">
              <text:p>Matrix dimension</text:p>
            </chart:title>
            <chart:categories table:cell-range-address="Timing.J406:Timing.AF406"/>
          </chart:axis>
          <chart:axis chart:dimension="x" chart:name="secondary-x" chart:style-name="ch8"/>
          <chart:axis chart:dimension="y" chart:name="primary-y" chart:style-name="ch9">
            <chart:title svg:x="0.451cm" svg:y="7.105cm" chart:style-name="ch10">
              <text:p>Seconds</text:p>
            </chart:title>
            <chart:grid chart:style-name="ch11" chart:class="major"/>
          </chart:axis>
          <chart:series chart:style-name="ch12" chart:values-cell-range-address="Timing.J407:Timing.AF407" chart:label-cell-address="Timing.I407:Timing.I407" chart:class="chart:bar">
            <chart:data-point chart:repeated="23"/>
          </chart:series>
          <chart:series chart:style-name="ch13" chart:values-cell-range-address="Timing.J408:Timing.AF408" chart:label-cell-address="Timing.I408:Timing.I408" chart:class="chart:bar">
            <chart:data-point chart:repeated="23"/>
          </chart:series>
          <chart:series chart:style-name="ch14" chart:values-cell-range-address="Timing.J409:Timing.AF409" chart:label-cell-address="Timing.I409:Timing.I409" chart:class="chart:bar">
            <chart:data-point chart:repeated="23"/>
          </chart:series>
          <chart:series chart:style-name="ch15" chart:values-cell-range-address="Timing.J410:Timing.AF410" chart:label-cell-address="Timing.I410:Timing.I410" chart:class="chart:bar">
            <chart:data-point chart:repeated="23"/>
            <loext:propertry-mapping loext:property="FillColor" loext:cell-range-address="Timing.T526:Timing.T5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406:Timing.AF406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I407:Timing.I407</svg:desc>
                </draw:g>
              </table:table-cell>
              <table:table-cell office:value-type="float" office:value="0.006209">
                <text:p>0.006209</text:p>
                <draw:g>
                  <svg:desc>Timing.J407:Timing.AF407</svg:desc>
                </draw:g>
              </table:table-cell>
              <table:table-cell office:value-type="float" office:value="0.008314">
                <text:p>0.008314</text:p>
              </table:table-cell>
              <table:table-cell office:value-type="float" office:value="0.010069">
                <text:p>0.010069</text:p>
              </table:table-cell>
              <table:table-cell office:value-type="float" office:value="0.011528">
                <text:p>0.011528</text:p>
              </table:table-cell>
              <table:table-cell office:value-type="float" office:value="0.013592">
                <text:p>0.013592</text:p>
              </table:table-cell>
              <table:table-cell office:value-type="float" office:value="0.016279">
                <text:p>0.016279</text:p>
              </table:table-cell>
              <table:table-cell office:value-type="float" office:value="0.03483">
                <text:p>0.03483</text:p>
              </table:table-cell>
              <table:table-cell office:value-type="float" office:value="0.038595">
                <text:p>0.038595</text:p>
              </table:table-cell>
              <table:table-cell office:value-type="float" office:value="0.043437">
                <text:p>0.043437</text:p>
              </table:table-cell>
              <table:table-cell office:value-type="float" office:value="0.047916">
                <text:p>0.047916</text:p>
              </table:table-cell>
              <table:table-cell office:value-type="float" office:value="0.052428">
                <text:p>0.052428</text:p>
              </table:table-cell>
              <table:table-cell office:value-type="float" office:value="0.056623">
                <text:p>0.056623</text:p>
              </table:table-cell>
              <table:table-cell office:value-type="float" office:value="0.089863">
                <text:p>0.089863</text:p>
              </table:table-cell>
              <table:table-cell office:value-type="float" office:value="0.09469">
                <text:p>0.09469</text:p>
              </table:table-cell>
              <table:table-cell office:value-type="float" office:value="0.101911">
                <text:p>0.101911</text:p>
              </table:table-cell>
              <table:table-cell office:value-type="float" office:value="0.109103">
                <text:p>0.109103</text:p>
              </table:table-cell>
              <table:table-cell office:value-type="float" office:value="0.115419">
                <text:p>0.115419</text:p>
              </table:table-cell>
              <table:table-cell office:value-type="float" office:value="0.134602">
                <text:p>0.134602</text:p>
              </table:table-cell>
              <table:table-cell office:value-type="float" office:value="0.170062">
                <text:p>0.170062</text:p>
              </table:table-cell>
              <table:table-cell office:value-type="float" office:value="0.177448">
                <text:p>0.177448</text:p>
              </table:table-cell>
              <table:table-cell office:value-type="float" office:value="0.186684">
                <text:p>0.18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2</text:p>
                <draw:g>
                  <svg:desc>Timing.I408:Timing.I408</svg:desc>
                </draw:g>
              </table:table-cell>
              <table:table-cell office:value-type="float" office:value="0.003467">
                <text:p>0.003467</text:p>
                <draw:g>
                  <svg:desc>Timing.J408:Timing.AF408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  <table:table-cell office:value-type="float" office:value="0.069002">
                <text:p>0.069002</text:p>
              </table:table-cell>
              <table:table-cell office:value-type="float" office:value="0.070138">
                <text:p>0.070138</text:p>
              </table:table-cell>
              <table:table-cell office:value-type="float" office:value="0.113362">
                <text:p>0.113362</text:p>
              </table:table-cell>
              <table:table-cell office:value-type="float" office:value="0.121933">
                <text:p>0.121933</text:p>
              </table:table-cell>
              <table:table-cell office:value-type="float" office:value="0.130795">
                <text:p>0.130795</text:p>
              </table:table-cell>
              <table:table-cell office:value-type="float" office:value="0.139617">
                <text:p>0.139617</text:p>
              </table:table-cell>
              <table:table-cell office:value-type="float" office:value="0.148483">
                <text:p>0.148483</text:p>
              </table:table-cell>
              <table:table-cell office:value-type="float" office:value="0.157388">
                <text:p>0.157388</text:p>
              </table:table-cell>
              <table:table-cell office:value-type="float" office:value="0.221621">
                <text:p>0.221621</text:p>
              </table:table-cell>
              <table:table-cell office:value-type="float" office:value="0.234097">
                <text:p>0.234097</text:p>
              </table:table-cell>
              <table:table-cell office:value-type="float" office:value="0.243718">
                <text:p>0.243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I409:Timing.I409</svg:desc>
                </draw:g>
              </table:table-cell>
              <table:table-cell office:value-type="float" office:value="0.002753">
                <text:p>0.002753</text:p>
                <draw:g>
                  <svg:desc>Timing.J409:Timing.AF409</svg:desc>
                </draw:g>
              </table:table-cell>
              <table:table-cell office:value-type="float" office:value="0.004351">
                <text:p>0.004351</text:p>
              </table:table-cell>
              <table:table-cell office:value-type="float" office:value="0.006419">
                <text:p>0.006419</text:p>
              </table:table-cell>
              <table:table-cell office:value-type="float" office:value="0.007146">
                <text:p>0.007146</text:p>
              </table:table-cell>
              <table:table-cell office:value-type="float" office:value="0.008835">
                <text:p>0.008835</text:p>
              </table:table-cell>
              <table:table-cell office:value-type="float" office:value="0.012222">
                <text:p>0.012222</text:p>
              </table:table-cell>
              <table:table-cell office:value-type="float" office:value="0.034048">
                <text:p>0.034048</text:p>
              </table:table-cell>
              <table:table-cell office:value-type="float" office:value="0.03827">
                <text:p>0.03827</text:p>
              </table:table-cell>
              <table:table-cell office:value-type="float" office:value="0.043657">
                <text:p>0.043657</text:p>
              </table:table-cell>
              <table:table-cell office:value-type="float" office:value="0.060283">
                <text:p>0.060283</text:p>
              </table:table-cell>
              <table:table-cell office:value-type="float" office:value="0.066079">
                <text:p>0.066079</text:p>
              </table:table-cell>
              <table:table-cell office:value-type="float" office:value="0.057862">
                <text:p>0.057862</text:p>
              </table:table-cell>
              <table:table-cell office:value-type="float" office:value="0.114961">
                <text:p>0.114961</text:p>
              </table:table-cell>
              <table:table-cell office:value-type="float" office:value="0.124308">
                <text:p>0.124308</text:p>
              </table:table-cell>
              <table:table-cell office:value-type="float" office:value="0.133582">
                <text:p>0.133582</text:p>
              </table:table-cell>
              <table:table-cell office:value-type="float" office:value="0.142299">
                <text:p>0.142299</text:p>
              </table:table-cell>
              <table:table-cell office:value-type="float" office:value="0.151706">
                <text:p>0.151706</text:p>
              </table:table-cell>
              <table:table-cell office:value-type="float" office:value="0.160021">
                <text:p>0.160021</text:p>
              </table:table-cell>
              <table:table-cell office:value-type="float" office:value="0.224211">
                <text:p>0.224211</text:p>
              </table:table-cell>
              <table:table-cell office:value-type="float" office:value="0.236045">
                <text:p>0.236045</text:p>
              </table:table-cell>
              <table:table-cell office:value-type="float" office:value="0.247366">
                <text:p>0.24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</text:p>
                <draw:g>
                  <svg:desc>Timing.I410:Timing.I410</svg:desc>
                </draw:g>
              </table:table-cell>
              <table:table-cell office:value-type="float" office:value="0.003499">
                <text:p>0.003499</text:p>
                <draw:g>
                  <svg:desc>Timing.J410:Timing.AF4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68">
                <text:p>0.00368</text:p>
              </table:table-cell>
              <table:table-cell office:value-type="float" office:value="NaN">
                <text:p>NaN</text:p>
              </table:table-cell>
              <table:table-cell office:value-type="float" office:value="0.004912">
                <text:p>0.004912</text:p>
              </table:table-cell>
              <table:table-cell office:value-type="float" office:value="NaN">
                <text:p>NaN</text:p>
              </table:table-cell>
              <table:table-cell office:value-type="float" office:value="0.006071">
                <text:p>0.006071</text:p>
              </table:table-cell>
              <table:table-cell office:value-type="float" office:value="NaN">
                <text:p>NaN</text:p>
              </table:table-cell>
              <table:table-cell office:value-type="float" office:value="0.008499">
                <text:p>0.008499</text:p>
              </table:table-cell>
              <table:table-cell office:value-type="float" office:value="NaN">
                <text:p>NaN</text:p>
              </table:table-cell>
              <table:table-cell office:value-type="float" office:value="0.009589">
                <text:p>0.009589</text:p>
              </table:table-cell>
              <table:table-cell office:value-type="float" office:value="NaN">
                <text:p>NaN</text:p>
              </table:table-cell>
              <table:table-cell office:value-type="float" office:value="0.013167">
                <text:p>0.013167</text:p>
              </table:table-cell>
              <table:table-cell office:value-type="float" office:value="NaN">
                <text:p>NaN</text:p>
              </table:table-cell>
              <table:table-cell office:value-type="float" office:value="0.017471">
                <text:p>0.017471</text:p>
              </table:table-cell>
              <table:table-cell office:value-type="float" office:value="NaN">
                <text:p>NaN</text:p>
              </table:table-cell>
              <table:table-cell office:value-type="float" office:value="0.019331">
                <text:p>0.019331</text:p>
              </table:table-cell>
              <table:table-cell office:value-type="float" office:value="NaN">
                <text:p>NaN</text:p>
              </table:table-cell>
              <table:table-cell office:value-type="float" office:value="0.021194">
                <text:p>0.021194</text:p>
              </table:table-cell>
              <table:table-cell office:value-type="float" office:value="NaN">
                <text:p>NaN</text:p>
              </table:table-cell>
              <table:table-cell office:value-type="float" office:value="0.026998">
                <text:p>0.026998</text:p>
              </table:table-cell>
              <table:table-cell office:value-type="float" office:value="NaN">
                <text:p>NaN</text:p>
              </table:table-cell>
              <table:table-cell office:value-type="float" office:value="0.029371">
                <text:p>0.029371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ing.T526:Timing.T526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47cm" svg:height="11.157cm" xlink:href=".." xlink:type="simple" chart:class="chart:bar" chart:style-name="ch1">
        <chart:title svg:x="6.747cm" svg:y="0.359cm" chart:style-name="ch2">
          <text:p>Compile Times DFT inline float</text:p>
        </chart:title>
        <chart:legend chart:legend-position="end" svg:x="17.272cm" svg:y="4.781cm" style:legend-expansion="high" chart:style-name="ch3"/>
        <chart:plot-area chart:style-name="ch4" table:cell-range-address="Timing.I928:Timing.AE931" chart:data-source-has-labels="both" svg:x="1.405cm" svg:y="1.361cm" svg:width="15.473cm" svg:height="8.592cm">
          <chart:coordinate-region svg:x="2.212cm" svg:y="1.56cm" svg:width="14.666cm" svg:height="7.746cm"/>
          <chart:axis chart:dimension="x" chart:name="primary-x" chart:style-name="ch5" chartooo:axis-type="auto">
            <chartooo:date-scale/>
            <chart:title svg:x="7.853cm" svg:y="10.176cm" chart:style-name="ch6">
              <text:p>Matrix dimension</text:p>
            </chart:title>
            <chart:categories table:cell-range-address="Timing.J928:Timing.AE928"/>
          </chart:axis>
          <chart:axis chart:dimension="y" chart:name="primary-y" chart:style-name="ch7">
            <chart:title svg:x="0.451cm" svg:y="6.349cm" chart:style-name="ch8">
              <text:p>Seconds</text:p>
            </chart:title>
            <chart:grid chart:style-name="ch9" chart:class="major"/>
          </chart:axis>
          <chart:series chart:style-name="ch10" chart:values-cell-range-address="Timing.J929:Timing.AE929" chart:label-cell-address="Timing.I929:Timing.I929" chart:class="chart:bar">
            <chart:data-point chart:repeated="22"/>
          </chart:series>
          <chart:series chart:style-name="ch11" chart:values-cell-range-address="Timing.J930:Timing.AE930" chart:label-cell-address="Timing.I930:Timing.I930" chart:class="chart:bar">
            <chart:data-point chart:repeated="22"/>
          </chart:series>
          <chart:series chart:style-name="ch12" chart:values-cell-range-address="Timing.J931:Timing.AE931" chart:label-cell-address="Timing.I931:Timing.I931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928:Timing.AE928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</table:table-row>
          </table:table-header-rows>
          <table:table-rows>
            <table:table-row>
              <table:table-cell office:value-type="string">
                <text:p>pi4</text:p>
                <draw:g>
                  <svg:desc>Timing.I929:Timing.I929</svg:desc>
                </draw:g>
              </table:table-cell>
              <table:table-cell office:value-type="float" office:value="0.071671">
                <text:p>0.071671</text:p>
                <draw:g>
                  <svg:desc>Timing.J929:Timing.AE9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51943">
                <text:p>0.251943</text:p>
              </table:table-cell>
              <table:table-cell office:value-type="float" office:value="NaN">
                <text:p>NaN</text:p>
              </table:table-cell>
              <table:table-cell office:value-type="float" office:value="0.562059">
                <text:p>0.562059</text:p>
              </table:table-cell>
              <table:table-cell office:value-type="float" office:value="NaN">
                <text:p>NaN</text:p>
              </table:table-cell>
              <table:table-cell office:value-type="float" office:value="1.023402">
                <text:p>1.023402</text:p>
              </table:table-cell>
              <table:table-cell office:value-type="float" office:value="NaN">
                <text:p>NaN</text:p>
              </table:table-cell>
              <table:table-cell office:value-type="float" office:value="1.652271">
                <text:p>1.652271</text:p>
              </table:table-cell>
              <table:table-cell office:value-type="float" office:value="NaN">
                <text:p>NaN</text:p>
              </table:table-cell>
              <table:table-cell office:value-type="float" office:value="2.500869">
                <text:p>2.500869</text:p>
              </table:table-cell>
              <table:table-cell office:value-type="float" office:value="NaN">
                <text:p>NaN</text:p>
              </table:table-cell>
              <table:table-cell office:value-type="float" office:value="3.748443">
                <text:p>3.748443</text:p>
              </table:table-cell>
              <table:table-cell office:value-type="float" office:value="NaN">
                <text:p>NaN</text:p>
              </table:table-cell>
              <table:table-cell office:value-type="float" office:value="5.309578">
                <text:p>5.309578</text:p>
              </table:table-cell>
              <table:table-cell office:value-type="float" office:value="NaN">
                <text:p>NaN</text:p>
              </table:table-cell>
              <table:table-cell office:value-type="float" office:value="7.351509">
                <text:p>7.351509</text:p>
              </table:table-cell>
              <table:table-cell office:value-type="float" office:value="NaN">
                <text:p>NaN</text:p>
              </table:table-cell>
              <table:table-cell office:value-type="float" office:value="9.894971">
                <text:p>9.894971</text:p>
              </table:table-cell>
              <table:table-cell office:value-type="float" office:value="NaN">
                <text:p>NaN</text:p>
              </table:table-cell>
              <table:table-cell office:value-type="float" office:value="13.086277">
                <text:p>13.086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I930:Timing.I930</svg:desc>
                </draw:g>
              </table:table-cell>
              <table:table-cell office:value-type="float" office:value="0.452014">
                <text:p>0.452014</text:p>
                <draw:g>
                  <svg:desc>Timing.J930:Timing.AE930</svg:desc>
                </draw:g>
              </table:table-cell>
              <table:table-cell office:value-type="float" office:value="1.524951">
                <text:p>1.524951</text:p>
              </table:table-cell>
              <table:table-cell office:value-type="float" office:value="3.056426">
                <text:p>3.056426</text:p>
              </table:table-cell>
              <table:table-cell office:value-type="float" office:value="5.204508">
                <text:p>5.204508</text:p>
              </table:table-cell>
              <table:table-cell office:value-type="float" office:value="8.006829">
                <text:p>8.006829</text:p>
              </table:table-cell>
              <table:table-cell office:value-type="float" office:value="11.719279">
                <text:p>11.719279</text:p>
              </table:table-cell>
              <table:table-cell office:value-type="float" office:value="16.237323">
                <text:p>16.237323</text:p>
              </table:table-cell>
              <table:table-cell office:value-type="float" office:value="21.837356">
                <text:p>21.837356</text:p>
              </table:table-cell>
              <table:table-cell office:value-type="float" office:value="28.609456">
                <text:p>28.609456</text:p>
              </table:table-cell>
              <table:table-cell office:value-type="float" office:value="36.66401">
                <text:p>36.66401</text:p>
              </table:table-cell>
              <table:table-cell office:value-type="float" office:value="46.134142">
                <text:p>46.134142</text:p>
              </table:table-cell>
              <table:table-cell office:value-type="float" office:value="56.594752">
                <text:p>56.594752</text:p>
              </table:table-cell>
              <table:table-cell office:value-type="float" office:value="69.179324">
                <text:p>69.179324</text:p>
              </table:table-cell>
              <table:table-cell office:value-type="float" office:value="83.576478">
                <text:p>83.576478</text:p>
              </table:table-cell>
              <table:table-cell office:value-type="float" office:value="99.942624">
                <text:p>99.942624</text:p>
              </table:table-cell>
              <table:table-cell office:value-type="float" office:value="118.398273">
                <text:p>118.398273</text:p>
              </table:table-cell>
              <table:table-cell office:value-type="float" office:value="139.108634">
                <text:p>139.108634</text:p>
              </table:table-cell>
              <table:table-cell office:value-type="float" office:value="162.249476">
                <text:p>162.249476</text:p>
              </table:table-cell>
              <table:table-cell office:value-type="float" office:value="187.951824">
                <text:p>187.951824</text:p>
              </table:table-cell>
              <table:table-cell office:value-type="float" office:value="216.437811">
                <text:p>216.437811</text:p>
              </table:table-cell>
              <table:table-cell office:value-type="float" office:value="247.852676">
                <text:p>247.852676</text:p>
              </table:table-cell>
              <table:table-cell office:value-type="float" office:value="282.01021">
                <text:p>282.01021</text:p>
              </table:table-cell>
            </table:table-row>
            <table:table-row>
              <table:table-cell office:value-type="string">
                <text:p>pi3 std::set</text:p>
                <draw:g>
                  <svg:desc>Timing.I931:Timing.I931</svg:desc>
                </draw:g>
              </table:table-cell>
              <table:table-cell office:value-type="float" office:value="0.548715">
                <text:p>0.548715</text:p>
                <draw:g>
                  <svg:desc>Timing.J931:Timing.AE931</svg:desc>
                </draw:g>
              </table:table-cell>
              <table:table-cell office:value-type="float" office:value="1.567364">
                <text:p>1.567364</text:p>
              </table:table-cell>
              <table:table-cell office:value-type="float" office:value="2.777147">
                <text:p>2.777147</text:p>
              </table:table-cell>
              <table:table-cell office:value-type="float" office:value="4.236371">
                <text:p>4.236371</text:p>
              </table:table-cell>
              <table:table-cell office:value-type="float" office:value="NaN">
                <text:p>NaN</text:p>
              </table:table-cell>
              <table:table-cell office:value-type="float" office:value="7.92113">
                <text:p>7.92113</text:p>
              </table:table-cell>
              <table:table-cell office:value-type="float" office:value="10.181178">
                <text:p>10.181178</text:p>
              </table:table-cell>
              <table:table-cell office:value-type="float" office:value="12.783973">
                <text:p>12.783973</text:p>
              </table:table-cell>
              <table:table-cell office:value-type="float" office:value="15.696467">
                <text:p>15.696467</text:p>
              </table:table-cell>
              <table:table-cell office:value-type="float" office:value="18.885156">
                <text:p>18.885156</text:p>
              </table:table-cell>
              <table:table-cell office:value-type="float" office:value="22.539911">
                <text:p>22.539911</text:p>
              </table:table-cell>
              <table:table-cell office:value-type="float" office:value="22.539911">
                <text:p>22.539911</text:p>
              </table:table-cell>
              <table:table-cell office:value-type="float" office:value="30.976053">
                <text:p>30.976053</text:p>
              </table:table-cell>
              <table:table-cell office:value-type="float" office:value="35.749879">
                <text:p>35.749879</text:p>
              </table:table-cell>
              <table:table-cell office:value-type="float" office:value="40.951506">
                <text:p>40.951506</text:p>
              </table:table-cell>
              <table:table-cell office:value-type="float" office:value="46.634502">
                <text:p>46.634502</text:p>
              </table:table-cell>
              <table:table-cell office:value-type="float" office:value="52.886342">
                <text:p>52.886342</text:p>
              </table:table-cell>
              <table:table-cell office:value-type="float" office:value="59.292052">
                <text:p>59.292052</text:p>
              </table:table-cell>
              <table:table-cell office:value-type="float" office:value="66.613522">
                <text:p>66.613522</text:p>
              </table:table-cell>
              <table:table-cell office:value-type="float" office:value="74.265161">
                <text:p>74.265161</text:p>
              </table:table-cell>
              <table:table-cell office:value-type="float" office:value="82.522381">
                <text:p>82.522381</text:p>
              </table:table-cell>
              <table:table-cell office:value-type="float" office:value="90.893683">
                <text:p>90.8936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